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co1" style:family="table-column">
      <style:table-column-properties fo:break-before="auto" style:column-width="4.3138in"/>
    </style:style>
    <style:style style:name="co2" style:family="table-column">
      <style:table-column-properties fo:break-before="auto" style:column-width="0.8236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2.678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4.32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one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e 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ength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tcode</text:p>
          </table:table-cell>
          <table:table-cell office:value-type="string" calcext:value-type="string">
            <text:p>alternate</text:p>
          </table:table-cell>
          <table:table-cell/>
        </table:table-row>
        <table:table-row table:style-name="ro1">
          <table:table-cell office:value-type="string" calcext:value-type="string">
            <text:p>Action 52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1:0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GOpW3zfMATE</text:p>
          </table:table-cell>
          <table:table-cell/>
          <table:table-cell table:formula="of:=&quot;['&quot; &amp; [.A2] &amp; &quot;', '&quot; &amp; YEAR([.B2]) &amp; &quot;-&quot; &amp; MONTH([.B2]) &amp; &quot;-&quot; &amp; DAY([.B2]) &amp; &quot;', '&quot; &amp; [.C2] &amp; &quot;', '&quot; &amp; [.D2] &amp; &quot;', '&quot; &amp; [.E2] &amp; &quot;', '&quot; &amp; [.F2] &amp; &quot;'],&quot;" office:value-type="string" office:string-value="['Action 52', '2017-11-28', '1:04', 'Dingdong, Julian', 'GOpW3zfMATE', '']," calcext:value-type="string">
            <text:p>['Action 52', '2017-11-28', '1:04', 'Dingdong, Julian', 'GOpW3zfMATE', ''],</text:p>
          </table:table-cell>
        </table:table-row>
        <table:table-row table:style-name="ro1">
          <table:table-cell office:value-type="string" calcext:value-type="string">
            <text:p>Adventure Quest</text:p>
          </table:table-cell>
          <table:table-cell office:value-type="date" office:date-value="2023-04-23" calcext:value-type="date">
            <text:p>2023-04-23</text:p>
          </table:table-cell>
          <table:table-cell office:value-type="string" calcext:value-type="string">
            <text:p>0:44</text:p>
          </table:table-cell>
          <table:table-cell office:value-type="string" calcext:value-type="string">
            <text:p>Lyle, Adam</text:p>
          </table:table-cell>
          <table:table-cell office:value-type="string" calcext:value-type="string">
            <text:p>VFHfssdiZ0U</text:p>
          </table:table-cell>
          <table:table-cell/>
          <table:table-cell table:formula="of:=&quot;['&quot; &amp; [.A3] &amp; &quot;', '&quot; &amp; YEAR([.B3]) &amp; &quot;-&quot; &amp; MONTH([.B3]) &amp; &quot;-&quot; &amp; DAY([.B3]) &amp; &quot;', '&quot; &amp; [.C3] &amp; &quot;', '&quot; &amp; [.D3] &amp; &quot;', '&quot; &amp; [.E3] &amp; &quot;', '&quot; &amp; [.F3] &amp; &quot;'],&quot;" office:value-type="string" office:string-value="['Adventure Quest', '2023-4-23', '0:44', 'Lyle, Adam', 'VFHfssdiZ0U', '']," calcext:value-type="string">
            <text:p>['Adventure Quest', '2023-4-23', '0:44', 'Lyle, Adam', 'VFHfssdiZ0U', ''],</text:p>
          </table:table-cell>
        </table:table-row>
        <table:table-row table:style-name="ro1">
          <table:table-cell office:value-type="string" calcext:value-type="string">
            <text:p>Adventures Of Chris, The</text:p>
          </table:table-cell>
          <table:table-cell office:value-type="date" office:date-value="2020-11-25" calcext:value-type="date">
            <text:p>2020-11-25</text:p>
          </table:table-cell>
          <table:table-cell office:value-type="string" calcext:value-type="string">
            <text:p>2:20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cMXmVMK2wZ8</text:p>
          </table:table-cell>
          <table:table-cell/>
          <table:table-cell table:formula="of:=&quot;['&quot; &amp; [.A4] &amp; &quot;', '&quot; &amp; YEAR([.B4]) &amp; &quot;-&quot; &amp; MONTH([.B4]) &amp; &quot;-&quot; &amp; DAY([.B4]) &amp; &quot;', '&quot; &amp; [.C4] &amp; &quot;', '&quot; &amp; [.D4] &amp; &quot;', '&quot; &amp; [.E4] &amp; &quot;', '&quot; &amp; [.F4] &amp; &quot;'],&quot;" office:value-type="string" office:string-value="['Adventures Of Chris, The', '2020-11-25', '2:20', 'Zach, Lyle', 'cMXmVMK2wZ8', '']," calcext:value-type="string">
            <text:p>['Adventures Of Chris, The', '2020-11-25', '2:20', 'Zach, Lyle', 'cMXmVMK2wZ8', ''],</text:p>
          </table:table-cell>
        </table:table-row>
        <table:table-row table:style-name="ro1">
          <table:table-cell office:value-type="string" calcext:value-type="string">
            <text:p>AI Artwork (Volume 1)</text:p>
          </table:table-cell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1:5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jtHGuWAzDNU</text:p>
          </table:table-cell>
          <table:table-cell/>
          <table:table-cell table:formula="of:=&quot;['&quot; &amp; [.A5] &amp; &quot;', '&quot; &amp; YEAR([.B5]) &amp; &quot;-&quot; &amp; MONTH([.B5]) &amp; &quot;-&quot; &amp; DAY([.B5]) &amp; &quot;', '&quot; &amp; [.C5] &amp; &quot;', '&quot; &amp; [.D5] &amp; &quot;', '&quot; &amp; [.E5] &amp; &quot;', '&quot; &amp; [.F5] &amp; &quot;'],&quot;" office:value-type="string" office:string-value="['AI Artwork (Volume 1)', '2022-6-19', '1:51', 'Zach, Tomar', 'jtHGuWAzDNU', '']," calcext:value-type="string">
            <text:p>['AI Artwork (Volume 1)', '2022-6-19', '1:51', 'Zach, Tomar', 'jtHGuWAzDNU', ''],</text:p>
          </table:table-cell>
        </table:table-row>
        <table:table-row table:style-name="ro1">
          <table:table-cell office:value-type="string" calcext:value-type="string">
            <text:p>AI Dungeon</text:p>
          </table:table-cell>
          <table:table-cell office:value-type="date" office:date-value="2019-12-07" calcext:value-type="date">
            <text:p>2019-12-07</text:p>
          </table:table-cell>
          <table:table-cell office:value-type="string" calcext:value-type="string">
            <text:p>2:28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cj4VpPioYUs</text:p>
          </table:table-cell>
          <table:table-cell/>
          <table:table-cell table:formula="of:=&quot;['&quot; &amp; [.A6] &amp; &quot;', '&quot; &amp; YEAR([.B6]) &amp; &quot;-&quot; &amp; MONTH([.B6]) &amp; &quot;-&quot; &amp; DAY([.B6]) &amp; &quot;', '&quot; &amp; [.C6] &amp; &quot;', '&quot; &amp; [.D6] &amp; &quot;', '&quot; &amp; [.E6] &amp; &quot;', '&quot; &amp; [.F6] &amp; &quot;'],&quot;" office:value-type="string" office:string-value="['AI Dungeon', '2019-12-7', '2:28', 'Zach, Cory, Tomar', 'cj4VpPioYUs', '']," calcext:value-type="string">
            <text:p>['AI Dungeon', '2019-12-7', '2:28', 'Zach, Cory, Tomar', 'cj4VpPioYUs', ''],</text:p>
          </table:table-cell>
        </table:table-row>
        <table:table-row table:style-name="ro1">
          <table:table-cell office:value-type="string" calcext:value-type="string">
            <text:p>AI Games</text:p>
          </table:table-cell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2:17</text:p>
          </table:table-cell>
          <table:table-cell office:value-type="string" calcext:value-type="string">
            <text:p>Zach, Cory, Lyle, Tomar</text:p>
          </table:table-cell>
          <table:table-cell office:value-type="string" calcext:value-type="string">
            <text:p>t8H_7xwrvNg</text:p>
          </table:table-cell>
          <table:table-cell/>
          <table:table-cell table:formula="of:=&quot;['&quot; &amp; [.A7] &amp; &quot;', '&quot; &amp; YEAR([.B7]) &amp; &quot;-&quot; &amp; MONTH([.B7]) &amp; &quot;-&quot; &amp; DAY([.B7]) &amp; &quot;', '&quot; &amp; [.C7] &amp; &quot;', '&quot; &amp; [.D7] &amp; &quot;', '&quot; &amp; [.E7] &amp; &quot;', '&quot; &amp; [.F7] &amp; &quot;'],&quot;" office:value-type="string" office:string-value="['AI Games', '2022-5-9', '2:17', 'Zach, Cory, Lyle, Tomar', 't8H_7xwrvNg', '']," calcext:value-type="string">
            <text:p>['AI Games', '2022-5-9', '2:17', 'Zach, Cory, Lyle, Tomar', 't8H_7xwrvNg', ''],</text:p>
          </table:table-cell>
        </table:table-row>
        <table:table-row table:style-name="ro1">
          <table:table-cell office:value-type="string" calcext:value-type="string">
            <text:p>Aladdin</text:p>
          </table:table-cell>
          <table:table-cell office:value-type="date" office:date-value="2024-05-16" calcext:value-type="date">
            <text:p>2024-05-16</text:p>
          </table:table-cell>
          <table:table-cell office:value-type="string" calcext:value-type="string">
            <text:p>1:30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lECYn5ETaMk</text:p>
          </table:table-cell>
          <table:table-cell/>
          <table:table-cell table:formula="of:=&quot;['&quot; &amp; [.A8] &amp; &quot;', '&quot; &amp; YEAR([.B8]) &amp; &quot;-&quot; &amp; MONTH([.B8]) &amp; &quot;-&quot; &amp; DAY([.B8]) &amp; &quot;', '&quot; &amp; [.C8] &amp; &quot;', '&quot; &amp; [.D8] &amp; &quot;', '&quot; &amp; [.E8] &amp; &quot;', '&quot; &amp; [.F8] &amp; &quot;'],&quot;" office:value-type="string" office:string-value="['Aladdin', '2024-5-16', '1:30', 'Dave, Cory', 'lECYn5ETaMk', '']," calcext:value-type="string">
            <text:p>['Aladdin', '2024-5-16', '1:30', 'Dave, Cory', 'lECYn5ETaMk', ''],</text:p>
          </table:table-cell>
        </table:table-row>
        <table:table-row table:style-name="ro1">
          <table:table-cell office:value-type="string" calcext:value-type="string">
            <text:p>Aliens Are Green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0:51</text:p>
          </table:table-cell>
          <table:table-cell office:value-type="string" calcext:value-type="string">
            <text:p>Zach, Adam, Tomar</text:p>
          </table:table-cell>
          <table:table-cell office:value-type="string" calcext:value-type="string">
            <text:p>QFNJ0JbRVR8</text:p>
          </table:table-cell>
          <table:table-cell/>
          <table:table-cell table:formula="of:=&quot;['&quot; &amp; [.A9] &amp; &quot;', '&quot; &amp; YEAR([.B9]) &amp; &quot;-&quot; &amp; MONTH([.B9]) &amp; &quot;-&quot; &amp; DAY([.B9]) &amp; &quot;', '&quot; &amp; [.C9] &amp; &quot;', '&quot; &amp; [.D9] &amp; &quot;', '&quot; &amp; [.E9] &amp; &quot;', '&quot; &amp; [.F9] &amp; &quot;'],&quot;" office:value-type="string" office:string-value="['Aliens Are Green', '2024-10-22', '0:51', 'Zach, Adam, Tomar', 'QFNJ0JbRVR8', '']," calcext:value-type="string">
            <text:p>['Aliens Are Green', '2024-10-22', '0:51', 'Zach, Adam, Tomar', 'QFNJ0JbRVR8', ''],</text:p>
          </table:table-cell>
        </table:table-row>
        <table:table-row table:style-name="ro1">
          <table:table-cell office:value-type="string" calcext:value-type="string">
            <text:p>American Truck Simulator</text:p>
          </table:table-cell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0:4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zvbxF3ufwz4</text:p>
          </table:table-cell>
          <table:table-cell office:value-type="string" calcext:value-type="string">
            <text:p>1Ts61CRKupk</text:p>
          </table:table-cell>
          <table:table-cell table:formula="of:=&quot;['&quot; &amp; [.A10] &amp; &quot;', '&quot; &amp; YEAR([.B10]) &amp; &quot;-&quot; &amp; MONTH([.B10]) &amp; &quot;-&quot; &amp; DAY([.B10]) &amp; &quot;', '&quot; &amp; [.C10] &amp; &quot;', '&quot; &amp; [.D10] &amp; &quot;', '&quot; &amp; [.E10] &amp; &quot;', '&quot; &amp; [.F10] &amp; &quot;'],&quot;" office:value-type="string" office:string-value="['American Truck Simulator', '2017-8-15', '0:41', 'Dingdong, Julian', 'zvbxF3ufwz4', '1Ts61CRKupk']," calcext:value-type="string">
            <text:p>['American Truck Simulator', '2017-8-15', '0:41', 'Dingdong, Julian', 'zvbxF3ufwz4', '1Ts61CRKupk'],</text:p>
          </table:table-cell>
        </table:table-row>
        <table:table-row table:style-name="ro1">
          <table:table-cell office:value-type="string" calcext:value-type="string">
            <text:p>Amnesia - Rebirth</text:p>
          </table:table-cell>
          <table:table-cell office:value-type="date" office:date-value="2020-10-22" calcext:value-type="date">
            <text:p>2020-10-22</text:p>
          </table:table-cell>
          <table:table-cell office:value-type="string" calcext:value-type="string">
            <text:p>1:1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LRhCqHxJrB8</text:p>
          </table:table-cell>
          <table:table-cell/>
          <table:table-cell table:formula="of:=&quot;['&quot; &amp; [.A11] &amp; &quot;', '&quot; &amp; YEAR([.B11]) &amp; &quot;-&quot; &amp; MONTH([.B11]) &amp; &quot;-&quot; &amp; DAY([.B11]) &amp; &quot;', '&quot; &amp; [.C11] &amp; &quot;', '&quot; &amp; [.D11] &amp; &quot;', '&quot; &amp; [.E11] &amp; &quot;', '&quot; &amp; [.F11] &amp; &quot;'],&quot;" office:value-type="string" office:string-value="['Amnesia - Rebirth', '2020-10-22', '1:12', 'Lyle, Tomar', 'LRhCqHxJrB8', '']," calcext:value-type="string">
            <text:p>['Amnesia - Rebirth', '2020-10-22', '1:12', 'Lyle, Tomar', 'LRhCqHxJrB8', ''],</text:p>
          </table:table-cell>
        </table:table-row>
        <table:table-row table:style-name="ro1">
          <table:table-cell office:value-type="string" calcext:value-type="string">
            <text:p>Among Us VR</text:p>
          </table:table-cell>
          <table:table-cell office:value-type="date" office:date-value="2025-01-27" calcext:value-type="date">
            <text:p>2025-01-27</text:p>
          </table:table-cell>
          <table:table-cell office:value-type="string" calcext:value-type="string">
            <text:p>0:3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UmUtACGkU48</text:p>
          </table:table-cell>
          <table:table-cell/>
          <table:table-cell table:formula="of:=&quot;['&quot; &amp; [.A12] &amp; &quot;', '&quot; &amp; YEAR([.B12]) &amp; &quot;-&quot; &amp; MONTH([.B12]) &amp; &quot;-&quot; &amp; DAY([.B12]) &amp; &quot;', '&quot; &amp; [.C12] &amp; &quot;', '&quot; &amp; [.D12] &amp; &quot;', '&quot; &amp; [.E12] &amp; &quot;', '&quot; &amp; [.F12] &amp; &quot;'],&quot;" office:value-type="string" office:string-value="['Among Us VR', '2025-1-27', '0:35', 'Cory, Dave', 'UmUtACGkU48', '']," calcext:value-type="string">
            <text:p>['Among Us VR', '2025-1-27', '0:35', 'Cory, Dave', 'UmUtACGkU48', ''],</text:p>
          </table:table-cell>
        </table:table-row>
        <table:table-row table:style-name="ro1">
          <table:table-cell office:value-type="string" calcext:value-type="string">
            <text:p>Antarctic Adventure</text:p>
          </table:table-cell>
          <table:table-cell office:value-type="date" office:date-value="2017-12-21" calcext:value-type="date">
            <text:p>2017-12-21</text:p>
          </table:table-cell>
          <table:table-cell office:value-type="string" calcext:value-type="string">
            <text:p>0:1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VL6HlBgZFg</text:p>
          </table:table-cell>
          <table:table-cell/>
          <table:table-cell table:formula="of:=&quot;['&quot; &amp; [.A13] &amp; &quot;', '&quot; &amp; YEAR([.B13]) &amp; &quot;-&quot; &amp; MONTH([.B13]) &amp; &quot;-&quot; &amp; DAY([.B13]) &amp; &quot;', '&quot; &amp; [.C13] &amp; &quot;', '&quot; &amp; [.D13] &amp; &quot;', '&quot; &amp; [.E13] &amp; &quot;', '&quot; &amp; [.F13] &amp; &quot;'],&quot;" office:value-type="string" office:string-value="['Antarctic Adventure', '2017-12-21', '0:15', 'Dingdong, Julian', 'CVL6HlBgZFg', '']," calcext:value-type="string">
            <text:p>['Antarctic Adventure', '2017-12-21', '0:15', 'Dingdong, Julian', 'CVL6HlBgZFg', ''],</text:p>
          </table:table-cell>
        </table:table-row>
        <table:table-row table:style-name="ro1">
          <table:table-cell office:value-type="string" calcext:value-type="string">
            <text:p>Ape Escape</text:p>
          </table:table-cell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1:3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EjIsUZGjYF0</text:p>
          </table:table-cell>
          <table:table-cell/>
          <table:table-cell table:formula="of:=&quot;['&quot; &amp; [.A14] &amp; &quot;', '&quot; &amp; YEAR([.B14]) &amp; &quot;-&quot; &amp; MONTH([.B14]) &amp; &quot;-&quot; &amp; DAY([.B14]) &amp; &quot;', '&quot; &amp; [.C14] &amp; &quot;', '&quot; &amp; [.D14] &amp; &quot;', '&quot; &amp; [.E14] &amp; &quot;', '&quot; &amp; [.F14] &amp; &quot;'],&quot;" office:value-type="string" office:string-value="['Ape Escape', '2017-10-4', '1:33', 'Dingdong, Julian', 'EjIsUZGjYF0', '']," calcext:value-type="string">
            <text:p>['Ape Escape', '2017-10-4', '1:33', 'Dingdong, Julian', 'EjIsUZGjYF0', ''],</text:p>
          </table:table-cell>
        </table:table-row>
        <table:table-row table:style-name="ro1">
          <table:table-cell office:value-type="string" calcext:value-type="string">
            <text:p>Ape Out</text:p>
          </table:table-cell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0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3QZ4IXdP86I</text:p>
          </table:table-cell>
          <table:table-cell/>
          <table:table-cell table:formula="of:=&quot;['&quot; &amp; [.A15] &amp; &quot;', '&quot; &amp; YEAR([.B15]) &amp; &quot;-&quot; &amp; MONTH([.B15]) &amp; &quot;-&quot; &amp; DAY([.B15]) &amp; &quot;', '&quot; &amp; [.C15] &amp; &quot;', '&quot; &amp; [.D15] &amp; &quot;', '&quot; &amp; [.E15] &amp; &quot;', '&quot; &amp; [.F15] &amp; &quot;'],&quot;" office:value-type="string" office:string-value="['Ape Out', '2022-2-26', '0:26', 'Lyle, Tomar', '3QZ4IXdP86I', '']," calcext:value-type="string">
            <text:p>['Ape Out', '2022-2-26', '0:26', 'Lyle, Tomar', '3QZ4IXdP86I', ''],</text:p>
          </table:table-cell>
        </table:table-row>
        <table:table-row table:style-name="ro1">
          <table:table-cell office:value-type="string" calcext:value-type="string">
            <text:p>Astro's Playroom</text:p>
          </table:table-cell>
          <table:table-cell office:value-type="date" office:date-value="2020-11-26" calcext:value-type="date">
            <text:p>2020-11-26</text:p>
          </table:table-cell>
          <table:table-cell office:value-type="string" calcext:value-type="string">
            <text:p>0:4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mfkaBdth51s</text:p>
          </table:table-cell>
          <table:table-cell/>
          <table:table-cell table:formula="of:=&quot;['&quot; &amp; [.A16] &amp; &quot;', '&quot; &amp; YEAR([.B16]) &amp; &quot;-&quot; &amp; MONTH([.B16]) &amp; &quot;-&quot; &amp; DAY([.B16]) &amp; &quot;', '&quot; &amp; [.C16] &amp; &quot;', '&quot; &amp; [.D16] &amp; &quot;', '&quot; &amp; [.E16] &amp; &quot;', '&quot; &amp; [.F16] &amp; &quot;'],&quot;" office:value-type="string" office:string-value="['Astro's Playroom', '2020-11-26', '0:46', 'Lyle, Tomar', 'mfkaBdth51s', '']," calcext:value-type="string">
            <text:p>['Astro's Playroom', '2020-11-26', '0:46', 'Lyle, Tomar', 'mfkaBdth51s', ''],</text:p>
          </table:table-cell>
        </table:table-row>
        <table:table-row table:style-name="ro1">
          <table:table-cell office:value-type="string" calcext:value-type="string">
            <text:p>At Dead Of Night</text:p>
          </table:table-cell>
          <table:table-cell office:value-type="date" office:date-value="2021-01-27" calcext:value-type="date">
            <text:p>2021-01-27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wzkLVdNX8-I</text:p>
          </table:table-cell>
          <table:table-cell/>
          <table:table-cell table:formula="of:=&quot;['&quot; &amp; [.A17] &amp; &quot;', '&quot; &amp; YEAR([.B17]) &amp; &quot;-&quot; &amp; MONTH([.B17]) &amp; &quot;-&quot; &amp; DAY([.B17]) &amp; &quot;', '&quot; &amp; [.C17] &amp; &quot;', '&quot; &amp; [.D17] &amp; &quot;', '&quot; &amp; [.E17] &amp; &quot;', '&quot; &amp; [.F17] &amp; &quot;'],&quot;" office:value-type="string" office:string-value="['At Dead Of Night', '2021-1-27', '0:43', 'Zach, Tomar', 'wzkLVdNX8-I', '']," calcext:value-type="string">
            <text:p>['At Dead Of Night', '2021-1-27', '0:43', 'Zach, Tomar', 'wzkLVdNX8-I', ''],</text:p>
          </table:table-cell>
        </table:table-row>
        <table:table-row table:style-name="ro1">
          <table:table-cell office:value-type="string" calcext:value-type="string">
            <text:p>Avatar - Frontiers of Pandora</text:p>
          </table:table-cell>
          <table:table-cell office:value-type="date" office:date-value="2024-06-25" calcext:value-type="date">
            <text:p>2024-06-25</text:p>
          </table:table-cell>
          <table:table-cell office:value-type="string" calcext:value-type="string">
            <text:p>0:56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ranF2UzDKRw</text:p>
          </table:table-cell>
          <table:table-cell/>
          <table:table-cell table:formula="of:=&quot;['&quot; &amp; [.A18] &amp; &quot;', '&quot; &amp; YEAR([.B18]) &amp; &quot;-&quot; &amp; MONTH([.B18]) &amp; &quot;-&quot; &amp; DAY([.B18]) &amp; &quot;', '&quot; &amp; [.C18] &amp; &quot;', '&quot; &amp; [.D18] &amp; &quot;', '&quot; &amp; [.E18] &amp; &quot;', '&quot; &amp; [.F18] &amp; &quot;'],&quot;" office:value-type="string" office:string-value="['Avatar - Frontiers of Pandora', '2024-6-25', '0:56', 'Zach, Lyle, Tomar', 'ranF2UzDKRw', '']," calcext:value-type="string">
            <text:p>['Avatar - Frontiers of Pandora', '2024-6-25', '0:56', 'Zach, Lyle, Tomar', 'ranF2UzDKRw', ''],</text:p>
          </table:table-cell>
        </table:table-row>
        <table:table-row table:style-name="ro1">
          <table:table-cell office:value-type="string" calcext:value-type="string">
            <text:p>Baldi's Basics</text:p>
          </table:table-cell>
          <table:table-cell office:value-type="date" office:date-value="2024-10-25" calcext:value-type="date">
            <text:p>2024-10-25</text:p>
          </table:table-cell>
          <table:table-cell office:value-type="string" calcext:value-type="string">
            <text:p>0:32</text:p>
          </table:table-cell>
          <table:table-cell office:value-type="string" calcext:value-type="string">
            <text:p>Cory, Adam, Niall</text:p>
          </table:table-cell>
          <table:table-cell office:value-type="string" calcext:value-type="string">
            <text:p>oMXw6dH0nLc</text:p>
          </table:table-cell>
          <table:table-cell/>
          <table:table-cell table:formula="of:=&quot;['&quot; &amp; [.A19] &amp; &quot;', '&quot; &amp; YEAR([.B19]) &amp; &quot;-&quot; &amp; MONTH([.B19]) &amp; &quot;-&quot; &amp; DAY([.B19]) &amp; &quot;', '&quot; &amp; [.C19] &amp; &quot;', '&quot; &amp; [.D19] &amp; &quot;', '&quot; &amp; [.E19] &amp; &quot;', '&quot; &amp; [.F19] &amp; &quot;'],&quot;" office:value-type="string" office:string-value="['Baldi's Basics', '2024-10-25', '0:32', 'Cory, Adam, Niall', 'oMXw6dH0nLc', '']," calcext:value-type="string">
            <text:p>['Baldi's Basics', '2024-10-25', '0:32', 'Cory, Adam, Niall', 'oMXw6dH0nLc', ''],</text:p>
          </table:table-cell>
        </table:table-row>
        <table:table-row table:style-name="ro1">
          <table:table-cell office:value-type="string" calcext:value-type="string">
            <text:p>Ball, The</text:p>
          </table:table-cell>
          <table:table-cell office:value-type="date" office:date-value="2020-11-18" calcext:value-type="date">
            <text:p>2020-11-18</text:p>
          </table:table-cell>
          <table:table-cell office:value-type="string" calcext:value-type="string">
            <text:p>0:4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_x_DAAIUyGw</text:p>
          </table:table-cell>
          <table:table-cell/>
          <table:table-cell table:formula="of:=&quot;['&quot; &amp; [.A20] &amp; &quot;', '&quot; &amp; YEAR([.B20]) &amp; &quot;-&quot; &amp; MONTH([.B20]) &amp; &quot;-&quot; &amp; DAY([.B20]) &amp; &quot;', '&quot; &amp; [.C20] &amp; &quot;', '&quot; &amp; [.D20] &amp; &quot;', '&quot; &amp; [.E20] &amp; &quot;', '&quot; &amp; [.F20] &amp; &quot;'],&quot;" office:value-type="string" office:string-value="['Ball, The', '2020-11-18', '0:44', 'Lyle, Tomar', '_x_DAAIUyGw', '']," calcext:value-type="string">
            <text:p>['Ball, The', '2020-11-18', '0:44', 'Lyle, Tomar', '_x_DAAIUyGw', ''],</text:p>
          </table:table-cell>
        </table:table-row>
        <table:table-row table:style-name="ro1">
          <table:table-cell office:value-type="string" calcext:value-type="string">
            <text:p>Banjo Kazooie</text:p>
          </table:table-cell>
          <table:table-cell office:value-type="date" office:date-value="2017-05-06" calcext:value-type="date">
            <text:p>2017-05-06</text:p>
          </table:table-cell>
          <table:table-cell office:value-type="string" calcext:value-type="string">
            <text:p>1:5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qQ0GkTtm5hY</text:p>
          </table:table-cell>
          <table:table-cell/>
          <table:table-cell table:formula="of:=&quot;['&quot; &amp; [.A21] &amp; &quot;', '&quot; &amp; YEAR([.B21]) &amp; &quot;-&quot; &amp; MONTH([.B21]) &amp; &quot;-&quot; &amp; DAY([.B21]) &amp; &quot;', '&quot; &amp; [.C21] &amp; &quot;', '&quot; &amp; [.D21] &amp; &quot;', '&quot; &amp; [.E21] &amp; &quot;', '&quot; &amp; [.F21] &amp; &quot;'],&quot;" office:value-type="string" office:string-value="['Banjo Kazooie', '2017-5-6', '1:51', 'Dingdong, Julian', 'qQ0GkTtm5hY', '']," calcext:value-type="string">
            <text:p>['Banjo Kazooie', '2017-5-6', '1:51', 'Dingdong, Julian', 'qQ0GkTtm5hY', ''],</text:p>
          </table:table-cell>
        </table:table-row>
        <table:table-row table:style-name="ro1">
          <table:table-cell office:value-type="string" calcext:value-type="string">
            <text:p>Bayonetta</text:p>
          </table:table-cell>
          <table:table-cell office:value-type="date" office:date-value="2020-09-11" calcext:value-type="date">
            <text:p>2020-09-11</text:p>
          </table:table-cell>
          <table:table-cell office:value-type="string" calcext:value-type="string">
            <text:p>1:3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7nzCWSWiR1w</text:p>
          </table:table-cell>
          <table:table-cell/>
          <table:table-cell table:formula="of:=&quot;['&quot; &amp; [.A22] &amp; &quot;', '&quot; &amp; YEAR([.B22]) &amp; &quot;-&quot; &amp; MONTH([.B22]) &amp; &quot;-&quot; &amp; DAY([.B22]) &amp; &quot;', '&quot; &amp; [.C22] &amp; &quot;', '&quot; &amp; [.D22] &amp; &quot;', '&quot; &amp; [.E22] &amp; &quot;', '&quot; &amp; [.F22] &amp; &quot;'],&quot;" office:value-type="string" office:string-value="['Bayonetta', '2020-9-11', '1:35', 'Lyle, Tomar', '7nzCWSWiR1w', '']," calcext:value-type="string">
            <text:p>['Bayonetta', '2020-9-11', '1:35', 'Lyle, Tomar', '7nzCWSWiR1w', ''],</text:p>
          </table:table-cell>
        </table:table-row>
        <table:table-row table:style-name="ro1">
          <table:table-cell office:value-type="string" calcext:value-type="string">
            <text:p>BeamNG</text:p>
          </table:table-cell>
          <table:table-cell office:value-type="date" office:date-value="2019-04-08" calcext:value-type="date">
            <text:p>2019-04-08</text:p>
          </table:table-cell>
          <table:table-cell office:value-type="string" calcext:value-type="string">
            <text:p>2:34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ZbCmHk8F6A8</text:p>
          </table:table-cell>
          <table:table-cell/>
          <table:table-cell table:formula="of:=&quot;['&quot; &amp; [.A23] &amp; &quot;', '&quot; &amp; YEAR([.B23]) &amp; &quot;-&quot; &amp; MONTH([.B23]) &amp; &quot;-&quot; &amp; DAY([.B23]) &amp; &quot;', '&quot; &amp; [.C23] &amp; &quot;', '&quot; &amp; [.D23] &amp; &quot;', '&quot; &amp; [.E23] &amp; &quot;', '&quot; &amp; [.F23] &amp; &quot;'],&quot;" office:value-type="string" office:string-value="['BeamNG', '2019-4-8', '2:34', 'Mick, Tomar', 'ZbCmHk8F6A8', '']," calcext:value-type="string">
            <text:p>['BeamNG', '2019-4-8', '2:34', 'Mick, Tomar', 'ZbCmHk8F6A8', ''],</text:p>
          </table:table-cell>
        </table:table-row>
        <table:table-row table:style-name="ro1">
          <table:table-cell office:value-type="string" calcext:value-type="string">
            <text:p>Beyond Good &amp; Evil</text:p>
          </table:table-cell>
          <table:table-cell office:value-type="date" office:date-value="2020-08-20" calcext:value-type="date">
            <text:p>2020-08-20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VEaKgw6n8ao</text:p>
          </table:table-cell>
          <table:table-cell/>
          <table:table-cell table:formula="of:=&quot;['&quot; &amp; [.A24] &amp; &quot;', '&quot; &amp; YEAR([.B24]) &amp; &quot;-&quot; &amp; MONTH([.B24]) &amp; &quot;-&quot; &amp; DAY([.B24]) &amp; &quot;', '&quot; &amp; [.C24] &amp; &quot;', '&quot; &amp; [.D24] &amp; &quot;', '&quot; &amp; [.E24] &amp; &quot;', '&quot; &amp; [.F24] &amp; &quot;'],&quot;" office:value-type="string" office:string-value="['Beyond Good &amp; Evil', '2020-8-20', '1:01', 'Lyle, Tomar', 'VEaKgw6n8ao', '']," calcext:value-type="string">
            <text:p>['Beyond Good &amp; Evil', '2020-8-20', '1:01', 'Lyle, Tomar', 'VEaKgw6n8ao', ''],</text:p>
          </table:table-cell>
        </table:table-row>
        <table:table-row table:style-name="ro1">
          <table:table-cell office:value-type="string" calcext:value-type="string">
            <text:p>Binding Of Isaac - Antibirth</text:p>
          </table:table-cell>
          <table:table-cell office:value-type="date" office:date-value="2019-04-19" calcext:value-type="date">
            <text:p>2019-04-19</text:p>
          </table:table-cell>
          <table:table-cell office:value-type="string" calcext:value-type="string">
            <text:p>1:22</text:p>
          </table:table-cell>
          <table:table-cell office:value-type="string" calcext:value-type="string">
            <text:p>Tomar, Mick</text:p>
          </table:table-cell>
          <table:table-cell office:value-type="string" calcext:value-type="string">
            <text:p>bLiB2Sl1_Lk</text:p>
          </table:table-cell>
          <table:table-cell/>
          <table:table-cell table:formula="of:=&quot;['&quot; &amp; [.A25] &amp; &quot;', '&quot; &amp; YEAR([.B25]) &amp; &quot;-&quot; &amp; MONTH([.B25]) &amp; &quot;-&quot; &amp; DAY([.B25]) &amp; &quot;', '&quot; &amp; [.C25] &amp; &quot;', '&quot; &amp; [.D25] &amp; &quot;', '&quot; &amp; [.E25] &amp; &quot;', '&quot; &amp; [.F25] &amp; &quot;'],&quot;" office:value-type="string" office:string-value="['Binding Of Isaac - Antibirth', '2019-4-19', '1:22', 'Tomar, Mick', 'bLiB2Sl1_Lk', '']," calcext:value-type="string">
            <text:p>['Binding Of Isaac - Antibirth', '2019-4-19', '1:22', 'Tomar, Mick', 'bLiB2Sl1_Lk', ''],</text:p>
          </table:table-cell>
        </table:table-row>
        <table:table-row table:style-name="ro1">
          <table:table-cell office:value-type="string" calcext:value-type="string">
            <text:p>Binding Of Isaac, The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2:59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f3nA65byfUg</text:p>
          </table:table-cell>
          <table:table-cell/>
          <table:table-cell table:formula="of:=&quot;['&quot; &amp; [.A26] &amp; &quot;', '&quot; &amp; YEAR([.B26]) &amp; &quot;-&quot; &amp; MONTH([.B26]) &amp; &quot;-&quot; &amp; DAY([.B26]) &amp; &quot;', '&quot; &amp; [.C26] &amp; &quot;', '&quot; &amp; [.D26] &amp; &quot;', '&quot; &amp; [.E26] &amp; &quot;', '&quot; &amp; [.F26] &amp; &quot;'],&quot;" office:value-type="string" office:string-value="['Binding Of Isaac, The', '2019-1-31', '2:59', 'Mick, Tomar', 'f3nA65byfUg', '']," calcext:value-type="string">
            <text:p>['Binding Of Isaac, The', '2019-1-31', '2:59', 'Mick, Tomar', 'f3nA65byfUg', ''],</text:p>
          </table:table-cell>
        </table:table-row>
        <table:table-row table:style-name="ro1">
          <table:table-cell office:value-type="string" calcext:value-type="string">
            <text:p>Biomutant</text:p>
          </table:table-cell>
          <table:table-cell office:value-type="date" office:date-value="2021-11-01" calcext:value-type="date">
            <text:p>2021-11-01</text:p>
          </table:table-cell>
          <table:table-cell office:value-type="string" calcext:value-type="string">
            <text:p>1:1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qtdYwfTDe6E</text:p>
          </table:table-cell>
          <table:table-cell/>
          <table:table-cell table:formula="of:=&quot;['&quot; &amp; [.A27] &amp; &quot;', '&quot; &amp; YEAR([.B27]) &amp; &quot;-&quot; &amp; MONTH([.B27]) &amp; &quot;-&quot; &amp; DAY([.B27]) &amp; &quot;', '&quot; &amp; [.C27] &amp; &quot;', '&quot; &amp; [.D27] &amp; &quot;', '&quot; &amp; [.E27] &amp; &quot;', '&quot; &amp; [.F27] &amp; &quot;'],&quot;" office:value-type="string" office:string-value="['Biomutant', '2021-11-1', '1:17', 'Lyle, Tomar', 'qtdYwfTDe6E', '']," calcext:value-type="string">
            <text:p>['Biomutant', '2021-11-1', '1:17', 'Lyle, Tomar', 'qtdYwfTDe6E', ''],</text:p>
          </table:table-cell>
        </table:table-row>
        <table:table-row table:style-name="ro1">
          <table:table-cell office:value-type="string" calcext:value-type="string">
            <text:p>Black Baby</text:p>
          </table:table-cell>
          <table:table-cell office:value-type="date" office:date-value="2018-08-26" calcext:value-type="date">
            <text:p>2018-08-26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4W5ToU4ww5Q</text:p>
          </table:table-cell>
          <table:table-cell/>
          <table:table-cell table:formula="of:=&quot;['&quot; &amp; [.A28] &amp; &quot;', '&quot; &amp; YEAR([.B28]) &amp; &quot;-&quot; &amp; MONTH([.B28]) &amp; &quot;-&quot; &amp; DAY([.B28]) &amp; &quot;', '&quot; &amp; [.C28] &amp; &quot;', '&quot; &amp; [.D28] &amp; &quot;', '&quot; &amp; [.E28] &amp; &quot;', '&quot; &amp; [.F28] &amp; &quot;'],&quot;" office:value-type="string" office:string-value="['Black Baby', '2018-8-26', '1:00', 'Zach, Lyle', '4W5ToU4ww5Q', '']," calcext:value-type="string">
            <text:p>['Black Baby', '2018-8-26', '1:00', 'Zach, Lyle', '4W5ToU4ww5Q', ''],</text:p>
          </table:table-cell>
        </table:table-row>
        <table:table-row table:style-name="ro1">
          <table:table-cell office:value-type="string" calcext:value-type="string">
            <text:p>Blair Witch</text:p>
          </table:table-cell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1:16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OPiII1O9G3k</text:p>
          </table:table-cell>
          <table:table-cell/>
          <table:table-cell table:formula="of:=&quot;['&quot; &amp; [.A29] &amp; &quot;', '&quot; &amp; YEAR([.B29]) &amp; &quot;-&quot; &amp; MONTH([.B29]) &amp; &quot;-&quot; &amp; DAY([.B29]) &amp; &quot;', '&quot; &amp; [.C29] &amp; &quot;', '&quot; &amp; [.D29] &amp; &quot;', '&quot; &amp; [.E29] &amp; &quot;', '&quot; &amp; [.F29] &amp; &quot;'],&quot;" office:value-type="string" office:string-value="['Blair Witch', '2019-10-26', '1:16', 'Zach, Tomar', 'OPiII1O9G3k', '']," calcext:value-type="string">
            <text:p>['Blair Witch', '2019-10-26', '1:16', 'Zach, Tomar', 'OPiII1O9G3k', ''],</text:p>
          </table:table-cell>
        </table:table-row>
        <table:table-row table:style-name="ro1">
          <table:table-cell office:value-type="string" calcext:value-type="string">
            <text:p>Blasphemous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0:4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NbuVYaP9Wc</text:p>
          </table:table-cell>
          <table:table-cell/>
          <table:table-cell table:formula="of:=&quot;['&quot; &amp; [.A30] &amp; &quot;', '&quot; &amp; YEAR([.B30]) &amp; &quot;-&quot; &amp; MONTH([.B30]) &amp; &quot;-&quot; &amp; DAY([.B30]) &amp; &quot;', '&quot; &amp; [.C30] &amp; &quot;', '&quot; &amp; [.D30] &amp; &quot;', '&quot; &amp; [.E30] &amp; &quot;', '&quot; &amp; [.F30] &amp; &quot;'],&quot;" office:value-type="string" office:string-value="['Blasphemous', '2019-9-23', '0:46', 'Lyle, Tomar', 'xNbuVYaP9Wc', '']," calcext:value-type="string">
            <text:p>['Blasphemous', '2019-9-23', '0:46', 'Lyle, Tomar', 'xNbuVYaP9Wc', ''],</text:p>
          </table:table-cell>
        </table:table-row>
        <table:table-row table:style-name="ro1">
          <table:table-cell office:value-type="string" calcext:value-type="string">
            <text:p>Bloodborne</text:p>
          </table:table-cell>
          <table:table-cell office:value-type="date" office:date-value="2017-08-19" calcext:value-type="date">
            <text:p>2017-08-19</text:p>
          </table:table-cell>
          <table:table-cell office:value-type="string" calcext:value-type="string">
            <text:p>2:36</text:p>
          </table:table-cell>
          <table:table-cell office:value-type="string" calcext:value-type="string">
            <text:p>Dingdong, Julian, Mick</text:p>
          </table:table-cell>
          <table:table-cell office:value-type="string" calcext:value-type="string">
            <text:p>_2Jfeiyp98s</text:p>
          </table:table-cell>
          <table:table-cell office:value-type="string" calcext:value-type="string">
            <text:p>Gzi-SKiygwg</text:p>
          </table:table-cell>
          <table:table-cell table:formula="of:=&quot;['&quot; &amp; [.A31] &amp; &quot;', '&quot; &amp; YEAR([.B31]) &amp; &quot;-&quot; &amp; MONTH([.B31]) &amp; &quot;-&quot; &amp; DAY([.B31]) &amp; &quot;', '&quot; &amp; [.C31] &amp; &quot;', '&quot; &amp; [.D31] &amp; &quot;', '&quot; &amp; [.E31] &amp; &quot;', '&quot; &amp; [.F31] &amp; &quot;'],&quot;" office:value-type="string" office:string-value="['Bloodborne', '2017-8-19', '2:36', 'Dingdong, Julian, Mick', '_2Jfeiyp98s', 'Gzi-SKiygwg']," calcext:value-type="string">
            <text:p>['Bloodborne', '2017-8-19', '2:36', 'Dingdong, Julian, Mick', '_2Jfeiyp98s', 'Gzi-SKiygwg'],</text:p>
          </table:table-cell>
        </table:table-row>
        <table:table-row table:style-name="ro1">
          <table:table-cell office:value-type="string" calcext:value-type="string">
            <text:p>Blue Stinger</text:p>
          </table:table-cell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0:5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s-iWXO0zSMo</text:p>
          </table:table-cell>
          <table:table-cell/>
          <table:table-cell table:formula="of:=&quot;['&quot; &amp; [.A32] &amp; &quot;', '&quot; &amp; YEAR([.B32]) &amp; &quot;-&quot; &amp; MONTH([.B32]) &amp; &quot;-&quot; &amp; DAY([.B32]) &amp; &quot;', '&quot; &amp; [.C32] &amp; &quot;', '&quot; &amp; [.D32] &amp; &quot;', '&quot; &amp; [.E32] &amp; &quot;', '&quot; &amp; [.F32] &amp; &quot;'],&quot;" office:value-type="string" office:string-value="['Blue Stinger', '2017-8-29', '0:56', 'Dingdong, Julian', 's-iWXO0zSMo', '']," calcext:value-type="string">
            <text:p>['Blue Stinger', '2017-8-29', '0:56', 'Dingdong, Julian', 's-iWXO0zSMo', ''],</text:p>
          </table:table-cell>
        </table:table-row>
        <table:table-row table:style-name="ro1">
          <table:table-cell office:value-type="string" calcext:value-type="string">
            <text:p>Body Discovery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0:1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kKwf26aiqqc</text:p>
          </table:table-cell>
          <table:table-cell/>
          <table:table-cell table:formula="of:=&quot;['&quot; &amp; [.A33] &amp; &quot;', '&quot; &amp; YEAR([.B33]) &amp; &quot;-&quot; &amp; MONTH([.B33]) &amp; &quot;-&quot; &amp; DAY([.B33]) &amp; &quot;', '&quot; &amp; [.C33] &amp; &quot;', '&quot; &amp; [.D33] &amp; &quot;', '&quot; &amp; [.E33] &amp; &quot;', '&quot; &amp; [.F33] &amp; &quot;'],&quot;" office:value-type="string" office:string-value="['Body Discovery', '2019-6-24', '0:19', 'Lyle, Tomar', 'kKwf26aiqqc', '']," calcext:value-type="string">
            <text:p>['Body Discovery', '2019-6-24', '0:19', 'Lyle, Tomar', 'kKwf26aiqqc', ''],</text:p>
          </table:table-cell>
        </table:table-row>
        <table:table-row table:style-name="ro1">
          <table:table-cell office:value-type="string" calcext:value-type="string">
            <text:p>Bowser's Fury</text:p>
          </table:table-cell>
          <table:table-cell office:value-type="date" office:date-value="2021-03-05" calcext:value-type="date">
            <text:p>2021-03-05</text:p>
          </table:table-cell>
          <table:table-cell office:value-type="string" calcext:value-type="string">
            <text:p>1:5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9r99PWSA3W4</text:p>
          </table:table-cell>
          <table:table-cell/>
          <table:table-cell table:formula="of:=&quot;['&quot; &amp; [.A34] &amp; &quot;', '&quot; &amp; YEAR([.B34]) &amp; &quot;-&quot; &amp; MONTH([.B34]) &amp; &quot;-&quot; &amp; DAY([.B34]) &amp; &quot;', '&quot; &amp; [.C34] &amp; &quot;', '&quot; &amp; [.D34] &amp; &quot;', '&quot; &amp; [.E34] &amp; &quot;', '&quot; &amp; [.F34] &amp; &quot;'],&quot;" office:value-type="string" office:string-value="['Bowser's Fury', '2021-3-5', '1:59', 'Lyle, Tomar', '9r99PWSA3W4', '']," calcext:value-type="string">
            <text:p>['Bowser's Fury', '2021-3-5', '1:59', 'Lyle, Tomar', '9r99PWSA3W4', ''],</text:p>
          </table:table-cell>
        </table:table-row>
        <table:table-row table:style-name="ro1">
          <table:table-cell office:value-type="string" calcext:value-type="string">
            <text:p>Bramble</text:p>
          </table:table-cell>
          <table:table-cell office:value-type="date" office:date-value="2023-05-30" calcext:value-type="date">
            <text:p>2023-05-30</text:p>
          </table:table-cell>
          <table:table-cell office:value-type="string" calcext:value-type="string">
            <text:p>3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lwzgVRNI4P0</text:p>
          </table:table-cell>
          <table:table-cell/>
          <table:table-cell table:formula="of:=&quot;['&quot; &amp; [.A35] &amp; &quot;', '&quot; &amp; YEAR([.B35]) &amp; &quot;-&quot; &amp; MONTH([.B35]) &amp; &quot;-&quot; &amp; DAY([.B35]) &amp; &quot;', '&quot; &amp; [.C35] &amp; &quot;', '&quot; &amp; [.D35] &amp; &quot;', '&quot; &amp; [.E35] &amp; &quot;', '&quot; &amp; [.F35] &amp; &quot;'],&quot;" office:value-type="string" office:string-value="['Bramble', '2023-5-30', '3:26', 'Lyle, Tomar', 'lwzgVRNI4P0', '']," calcext:value-type="string">
            <text:p>['Bramble', '2023-5-30', '3:26', 'Lyle, Tomar', 'lwzgVRNI4P0', ''],</text:p>
          </table:table-cell>
        </table:table-row>
        <table:table-row table:style-name="ro1">
          <table:table-cell office:value-type="string" calcext:value-type="string">
            <text:p>Bubsy - The Woolies Strike Back</text:p>
          </table:table-cell>
          <table:table-cell office:value-type="date" office:date-value="2017-11-05" calcext:value-type="date">
            <text:p>2017-11-05</text:p>
          </table:table-cell>
          <table:table-cell office:value-type="string" calcext:value-type="string">
            <text:p>0:1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4MPKOdqbUk</text:p>
          </table:table-cell>
          <table:table-cell/>
          <table:table-cell table:formula="of:=&quot;['&quot; &amp; [.A36] &amp; &quot;', '&quot; &amp; YEAR([.B36]) &amp; &quot;-&quot; &amp; MONTH([.B36]) &amp; &quot;-&quot; &amp; DAY([.B36]) &amp; &quot;', '&quot; &amp; [.C36] &amp; &quot;', '&quot; &amp; [.D36] &amp; &quot;', '&quot; &amp; [.E36] &amp; &quot;', '&quot; &amp; [.F36] &amp; &quot;'],&quot;" office:value-type="string" office:string-value="['Bubsy - The Woolies Strike Back', '2017-11-5', '0:15', 'Dingdong, Julian', 'v4MPKOdqbUk', '']," calcext:value-type="string">
            <text:p>['Bubsy - The Woolies Strike Back', '2017-11-5', '0:15', 'Dingdong, Julian', 'v4MPKOdqbUk', ''],</text:p>
          </table:table-cell>
        </table:table-row>
        <table:table-row table:style-name="ro1">
          <table:table-cell office:value-type="string" calcext:value-type="string">
            <text:p>Buckshot Roulette</text:p>
          </table:table-cell>
          <table:table-cell office:value-type="date" office:date-value="2024-10-24" calcext:value-type="date">
            <text:p>2024-10-24</text:p>
          </table:table-cell>
          <table:table-cell office:value-type="string" calcext:value-type="string">
            <text:p>0:5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Z683Eo_G1Mg</text:p>
          </table:table-cell>
          <table:table-cell/>
          <table:table-cell table:formula="of:=&quot;['&quot; &amp; [.A37] &amp; &quot;', '&quot; &amp; YEAR([.B37]) &amp; &quot;-&quot; &amp; MONTH([.B37]) &amp; &quot;-&quot; &amp; DAY([.B37]) &amp; &quot;', '&quot; &amp; [.C37] &amp; &quot;', '&quot; &amp; [.D37] &amp; &quot;', '&quot; &amp; [.E37] &amp; &quot;', '&quot; &amp; [.F37] &amp; &quot;'],&quot;" office:value-type="string" office:string-value="['Buckshot Roulette', '2024-10-24', '0:59', 'Cory, Dave', 'Z683Eo_G1Mg', '']," calcext:value-type="string">
            <text:p>['Buckshot Roulette', '2024-10-24', '0:59', 'Cory, Dave', 'Z683Eo_G1Mg', ''],</text:p>
          </table:table-cell>
        </table:table-row>
        <table:table-row table:style-name="ro1">
          <table:table-cell office:value-type="string" calcext:value-type="string">
            <text:p>Bully</text:p>
          </table:table-cell>
          <table:table-cell office:value-type="date" office:date-value="2018-03-24" calcext:value-type="date">
            <text:p>2018-03-24</text:p>
          </table:table-cell>
          <table:table-cell office:value-type="string" calcext:value-type="string">
            <text:p>1:21</text:p>
          </table:table-cell>
          <table:table-cell office:value-type="string" calcext:value-type="string">
            <text:p>Niall, Amin</text:p>
          </table:table-cell>
          <table:table-cell office:value-type="string" calcext:value-type="string">
            <text:p>LMfSp-y6umI</text:p>
          </table:table-cell>
          <table:table-cell/>
          <table:table-cell table:formula="of:=&quot;['&quot; &amp; [.A38] &amp; &quot;', '&quot; &amp; YEAR([.B38]) &amp; &quot;-&quot; &amp; MONTH([.B38]) &amp; &quot;-&quot; &amp; DAY([.B38]) &amp; &quot;', '&quot; &amp; [.C38] &amp; &quot;', '&quot; &amp; [.D38] &amp; &quot;', '&quot; &amp; [.E38] &amp; &quot;', '&quot; &amp; [.F38] &amp; &quot;'],&quot;" office:value-type="string" office:string-value="['Bully', '2018-3-24', '1:21', 'Niall, Amin', 'LMfSp-y6umI', '']," calcext:value-type="string">
            <text:p>['Bully', '2018-3-24', '1:21', 'Niall, Amin', 'LMfSp-y6umI', ''],</text:p>
          </table:table-cell>
        </table:table-row>
        <table:table-row table:style-name="ro1">
          <table:table-cell office:value-type="string" calcext:value-type="string">
            <text:p>Cabin Factory, The</text:p>
          </table:table-cell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ijukO8vKZfY</text:p>
          </table:table-cell>
          <table:table-cell/>
          <table:table-cell table:formula="of:=&quot;['&quot; &amp; [.A39] &amp; &quot;', '&quot; &amp; YEAR([.B39]) &amp; &quot;-&quot; &amp; MONTH([.B39]) &amp; &quot;-&quot; &amp; DAY([.B39]) &amp; &quot;', '&quot; &amp; [.C39] &amp; &quot;', '&quot; &amp; [.D39] &amp; &quot;', '&quot; &amp; [.E39] &amp; &quot;', '&quot; &amp; [.F39] &amp; &quot;'],&quot;" office:value-type="string" office:string-value="['Cabin Factory, The', '2025-10-22', '0:45', 'Lyle, Tomar', 'ijukO8vKZfY', '']," calcext:value-type="string">
            <text:p>['Cabin Factory, The', '2025-10-22', '0:45', 'Lyle, Tomar', 'ijukO8vKZfY', ''],</text:p>
          </table:table-cell>
        </table:table-row>
        <table:table-row table:style-name="ro1">
          <table:table-cell office:value-type="string" calcext:value-type="string">
            <text:p>Carrion</text:p>
          </table:table-cell>
          <table:table-cell office:value-type="date" office:date-value="2020-08-06" calcext:value-type="date">
            <text:p>2020-08-06</text:p>
          </table:table-cell>
          <table:table-cell office:value-type="string" calcext:value-type="string">
            <text:p>0:4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JhfQgdvIABg</text:p>
          </table:table-cell>
          <table:table-cell/>
          <table:table-cell table:formula="of:=&quot;['&quot; &amp; [.A40] &amp; &quot;', '&quot; &amp; YEAR([.B40]) &amp; &quot;-&quot; &amp; MONTH([.B40]) &amp; &quot;-&quot; &amp; DAY([.B40]) &amp; &quot;', '&quot; &amp; [.C40] &amp; &quot;', '&quot; &amp; [.D40] &amp; &quot;', '&quot; &amp; [.E40] &amp; &quot;', '&quot; &amp; [.F40] &amp; &quot;'],&quot;" office:value-type="string" office:string-value="['Carrion', '2020-8-6', '0:41', 'Lyle, Tomar', 'JhfQgdvIABg', '']," calcext:value-type="string">
            <text:p>['Carrion', '2020-8-6', '0:41', 'Lyle, Tomar', 'JhfQgdvIABg', ''],</text:p>
          </table:table-cell>
        </table:table-row>
        <table:table-row table:style-name="ro1">
          <table:table-cell office:value-type="string" calcext:value-type="string">
            <text:p>Casper - Ep 1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6ufqYiMEe5Q</text:p>
          </table:table-cell>
          <table:table-cell/>
          <table:table-cell table:formula="of:=&quot;['&quot; &amp; [.A41] &amp; &quot;', '&quot; &amp; YEAR([.B41]) &amp; &quot;-&quot; &amp; MONTH([.B41]) &amp; &quot;-&quot; &amp; DAY([.B41]) &amp; &quot;', '&quot; &amp; [.C41] &amp; &quot;', '&quot; &amp; [.D41] &amp; &quot;', '&quot; &amp; [.E41] &amp; &quot;', '&quot; &amp; [.F41] &amp; &quot;'],&quot;" office:value-type="string" office:string-value="['Casper - Ep 1', '2016-10-27', '0:10', 'Dingdong, Julian', '6ufqYiMEe5Q', '']," calcext:value-type="string">
            <text:p>['Casper - Ep 1', '2016-10-27', '0:10', 'Dingdong, Julian', '6ufqYiMEe5Q', ''],</text:p>
          </table:table-cell>
        </table:table-row>
        <table:table-row table:style-name="ro1">
          <table:table-cell office:value-type="string" calcext:value-type="string">
            <text:p>Casper - Ep 2</text:p>
          </table:table-cell>
          <table:table-cell office:value-type="date" office:date-value="2016-10-28" calcext:value-type="date">
            <text:p>2016-10-28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afK1v2w_rTo</text:p>
          </table:table-cell>
          <table:table-cell/>
          <table:table-cell table:formula="of:=&quot;['&quot; &amp; [.A42] &amp; &quot;', '&quot; &amp; YEAR([.B42]) &amp; &quot;-&quot; &amp; MONTH([.B42]) &amp; &quot;-&quot; &amp; DAY([.B42]) &amp; &quot;', '&quot; &amp; [.C42] &amp; &quot;', '&quot; &amp; [.D42] &amp; &quot;', '&quot; &amp; [.E42] &amp; &quot;', '&quot; &amp; [.F42] &amp; &quot;'],&quot;" office:value-type="string" office:string-value="['Casper - Ep 2', '2016-10-28', '0:10', 'Dingdong, Julian', 'afK1v2w_rTo', '']," calcext:value-type="string">
            <text:p>['Casper - Ep 2', '2016-10-28', '0:10', 'Dingdong, Julian', 'afK1v2w_rTo', ''],</text:p>
          </table:table-cell>
        </table:table-row>
        <table:table-row table:style-name="ro1">
          <table:table-cell office:value-type="string" calcext:value-type="string">
            <text:p>Castle Crashers</text:p>
          </table:table-cell>
          <table:table-cell office:value-type="date" office:date-value="2025-06-26" calcext:value-type="date">
            <text:p>2025-06-26</text:p>
          </table:table-cell>
          <table:table-cell office:value-type="string" calcext:value-type="string">
            <text:p>1:18</text:p>
          </table:table-cell>
          <table:table-cell office:value-type="string" calcext:value-type="string">
            <text:p>Cory, Dave, Tom</text:p>
          </table:table-cell>
          <table:table-cell office:value-type="string" calcext:value-type="string">
            <text:p>uCLXRmW7Glc</text:p>
          </table:table-cell>
          <table:table-cell/>
          <table:table-cell table:formula="of:=&quot;['&quot; &amp; [.A43] &amp; &quot;', '&quot; &amp; YEAR([.B43]) &amp; &quot;-&quot; &amp; MONTH([.B43]) &amp; &quot;-&quot; &amp; DAY([.B43]) &amp; &quot;', '&quot; &amp; [.C43] &amp; &quot;', '&quot; &amp; [.D43] &amp; &quot;', '&quot; &amp; [.E43] &amp; &quot;', '&quot; &amp; [.F43] &amp; &quot;'],&quot;" office:value-type="string" office:string-value="['Castle Crashers', '2025-6-26', '1:18', 'Cory, Dave, Tom', 'uCLXRmW7Glc', '']," calcext:value-type="string">
            <text:p>['Castle Crashers', '2025-6-26', '1:18', 'Cory, Dave, Tom', 'uCLXRmW7Glc', ''],</text:p>
          </table:table-cell>
        </table:table-row>
        <table:table-row table:style-name="ro1">
          <table:table-cell office:value-type="string" calcext:value-type="string">
            <text:p>Castlevania</text:p>
          </table:table-cell>
          <table:table-cell office:value-type="date" office:date-value="2019-11-04" calcext:value-type="date">
            <text:p>2019-11-04</text:p>
          </table:table-cell>
          <table:table-cell office:value-type="string" calcext:value-type="string">
            <text:p>1:14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EEVzMJ4f-l8</text:p>
          </table:table-cell>
          <table:table-cell/>
          <table:table-cell table:formula="of:=&quot;['&quot; &amp; [.A44] &amp; &quot;', '&quot; &amp; YEAR([.B44]) &amp; &quot;-&quot; &amp; MONTH([.B44]) &amp; &quot;-&quot; &amp; DAY([.B44]) &amp; &quot;', '&quot; &amp; [.C44] &amp; &quot;', '&quot; &amp; [.D44] &amp; &quot;', '&quot; &amp; [.E44] &amp; &quot;', '&quot; &amp; [.F44] &amp; &quot;'],&quot;" office:value-type="string" office:string-value="['Castlevania', '2019-11-4', '1:14', 'Dave, Cory', 'EEVzMJ4f-l8', '']," calcext:value-type="string">
            <text:p>['Castlevania', '2019-11-4', '1:14', 'Dave, Cory', 'EEVzMJ4f-l8', ''],</text:p>
          </table:table-cell>
        </table:table-row>
        <table:table-row table:style-name="ro1">
          <table:table-cell office:value-type="string" calcext:value-type="string">
            <text:p>Castlevania - Rondo Of Blood</text:p>
          </table:table-cell>
          <table:table-cell office:value-type="date" office:date-value="2019-11-26" calcext:value-type="date">
            <text:p>2019-11-26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tnS4ZZkW8oc</text:p>
          </table:table-cell>
          <table:table-cell/>
          <table:table-cell table:formula="of:=&quot;['&quot; &amp; [.A45] &amp; &quot;', '&quot; &amp; YEAR([.B45]) &amp; &quot;-&quot; &amp; MONTH([.B45]) &amp; &quot;-&quot; &amp; DAY([.B45]) &amp; &quot;', '&quot; &amp; [.C45] &amp; &quot;', '&quot; &amp; [.D45] &amp; &quot;', '&quot; &amp; [.E45] &amp; &quot;', '&quot; &amp; [.F45] &amp; &quot;'],&quot;" office:value-type="string" office:string-value="['Castlevania - Rondo Of Blood', '2019-11-26', '0:50', 'Dave, Cory', 'tnS4ZZkW8oc', '']," calcext:value-type="string">
            <text:p>['Castlevania - Rondo Of Blood', '2019-11-26', '0:50', 'Dave, Cory', 'tnS4ZZkW8oc', ''],</text:p>
          </table:table-cell>
        </table:table-row>
        <table:table-row table:style-name="ro1">
          <table:table-cell office:value-type="string" calcext:value-type="string">
            <text:p>Catwoman</text:p>
          </table:table-cell>
          <table:table-cell office:value-type="date" office:date-value="2016-08-09" calcext:value-type="date">
            <text:p>2016-08-09</text:p>
          </table:table-cell>
          <table:table-cell office:value-type="string" calcext:value-type="string">
            <text:p>0:4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9KqUe11srkY</text:p>
          </table:table-cell>
          <table:table-cell/>
          <table:table-cell table:formula="of:=&quot;['&quot; &amp; [.A46] &amp; &quot;', '&quot; &amp; YEAR([.B46]) &amp; &quot;-&quot; &amp; MONTH([.B46]) &amp; &quot;-&quot; &amp; DAY([.B46]) &amp; &quot;', '&quot; &amp; [.C46] &amp; &quot;', '&quot; &amp; [.D46] &amp; &quot;', '&quot; &amp; [.E46] &amp; &quot;', '&quot; &amp; [.F46] &amp; &quot;'],&quot;" office:value-type="string" office:string-value="['Catwoman', '2016-8-9', '0:40', 'Dingdong, Julian', '9KqUe11srkY', '']," calcext:value-type="string">
            <text:p>['Catwoman', '2016-8-9', '0:40', 'Dingdong, Julian', '9KqUe11srkY', ''],</text:p>
          </table:table-cell>
        </table:table-row>
        <table:table-row table:style-name="ro1">
          <table:table-cell office:value-type="string" calcext:value-type="string">
            <text:p>Chameleon Twist - Ep 1</text:p>
          </table:table-cell>
          <table:table-cell office:value-type="date" office:date-value="2016-10-17" calcext:value-type="date">
            <text:p>2016-10-17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Lyle</text:p>
          </table:table-cell>
          <table:table-cell office:value-type="string" calcext:value-type="string">
            <text:p>qxpcHcp6-T0</text:p>
          </table:table-cell>
          <table:table-cell/>
          <table:table-cell table:formula="of:=&quot;['&quot; &amp; [.A47] &amp; &quot;', '&quot; &amp; YEAR([.B47]) &amp; &quot;-&quot; &amp; MONTH([.B47]) &amp; &quot;-&quot; &amp; DAY([.B47]) &amp; &quot;', '&quot; &amp; [.C47] &amp; &quot;', '&quot; &amp; [.D47] &amp; &quot;', '&quot; &amp; [.E47] &amp; &quot;', '&quot; &amp; [.F47] &amp; &quot;'],&quot;" office:value-type="string" office:string-value="['Chameleon Twist - Ep 1', '2016-10-17', '0:10', 'Dingdong, Lyle', 'qxpcHcp6-T0', '']," calcext:value-type="string">
            <text:p>['Chameleon Twist - Ep 1', '2016-10-17', '0:10', 'Dingdong, Lyle', 'qxpcHcp6-T0', ''],</text:p>
          </table:table-cell>
        </table:table-row>
        <table:table-row table:style-name="ro1">
          <table:table-cell office:value-type="string" calcext:value-type="string">
            <text:p>Chameleon Twist - Ep 2</text:p>
          </table:table-cell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Lyle</text:p>
          </table:table-cell>
          <table:table-cell office:value-type="string" calcext:value-type="string">
            <text:p>z9m4TjhsoS8</text:p>
          </table:table-cell>
          <table:table-cell/>
          <table:table-cell table:formula="of:=&quot;['&quot; &amp; [.A48] &amp; &quot;', '&quot; &amp; YEAR([.B48]) &amp; &quot;-&quot; &amp; MONTH([.B48]) &amp; &quot;-&quot; &amp; DAY([.B48]) &amp; &quot;', '&quot; &amp; [.C48] &amp; &quot;', '&quot; &amp; [.D48] &amp; &quot;', '&quot; &amp; [.E48] &amp; &quot;', '&quot; &amp; [.F48] &amp; &quot;'],&quot;" office:value-type="string" office:string-value="['Chameleon Twist - Ep 2', '2016-10-18', '0:10', 'Dingdong, Lyle', 'z9m4TjhsoS8', '']," calcext:value-type="string">
            <text:p>['Chameleon Twist - Ep 2', '2016-10-18', '0:10', 'Dingdong, Lyle', 'z9m4TjhsoS8', ''],</text:p>
          </table:table-cell>
        </table:table-row>
        <table:table-row table:style-name="ro1">
          <table:table-cell office:value-type="string" calcext:value-type="string">
            <text:p>Chivalry - Medieval Warfare</text:p>
          </table:table-cell>
          <table:table-cell office:value-type="date" office:date-value="2014-11-20" calcext:value-type="date">
            <text:p>2014-11-20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xIX5ICTpthE</text:p>
          </table:table-cell>
          <table:table-cell/>
          <table:table-cell table:formula="of:=&quot;['&quot; &amp; [.A49] &amp; &quot;', '&quot; &amp; YEAR([.B49]) &amp; &quot;-&quot; &amp; MONTH([.B49]) &amp; &quot;-&quot; &amp; DAY([.B49]) &amp; &quot;', '&quot; &amp; [.C49] &amp; &quot;', '&quot; &amp; [.D49] &amp; &quot;', '&quot; &amp; [.E49] &amp; &quot;', '&quot; &amp; [.F49] &amp; &quot;'],&quot;" office:value-type="string" office:string-value="['Chivalry - Medieval Warfare', '2014-11-20', '0:10', 'Solo', 'xIX5ICTpthE', '']," calcext:value-type="string">
            <text:p>['Chivalry - Medieval Warfare', '2014-11-20', '0:10', 'Solo', 'xIX5ICTpthE', ''],</text:p>
          </table:table-cell>
        </table:table-row>
        <table:table-row table:style-name="ro1">
          <table:table-cell office:value-type="string" calcext:value-type="string">
            <text:p>Christmas Nights Into Dreams</text:p>
          </table:table-cell>
          <table:table-cell office:value-type="date" office:date-value="2016-12-31" calcext:value-type="date">
            <text:p>2016-12-31</text:p>
          </table:table-cell>
          <table:table-cell office:value-type="string" calcext:value-type="string">
            <text:p>0:1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ndOYC_2-9A</text:p>
          </table:table-cell>
          <table:table-cell/>
          <table:table-cell table:formula="of:=&quot;['&quot; &amp; [.A50] &amp; &quot;', '&quot; &amp; YEAR([.B50]) &amp; &quot;-&quot; &amp; MONTH([.B50]) &amp; &quot;-&quot; &amp; DAY([.B50]) &amp; &quot;', '&quot; &amp; [.C50] &amp; &quot;', '&quot; &amp; [.D50] &amp; &quot;', '&quot; &amp; [.E50] &amp; &quot;', '&quot; &amp; [.F50] &amp; &quot;'],&quot;" office:value-type="string" office:string-value="['Christmas Nights Into Dreams', '2016-12-31', '0:13', 'Dingdong, Julian', 'CndOYC_2-9A', '']," calcext:value-type="string">
            <text:p>['Christmas Nights Into Dreams', '2016-12-31', '0:13', 'Dingdong, Julian', 'CndOYC_2-9A', ''],</text:p>
          </table:table-cell>
        </table:table-row>
        <table:table-row table:style-name="ro1">
          <table:table-cell office:value-type="string" calcext:value-type="string">
            <text:p>Chronicles of Mystara Ep 1</text:p>
          </table:table-cell>
          <table:table-cell office:value-type="date" office:date-value="2016-04-19" calcext:value-type="date">
            <text:p>2016-04-19</text:p>
          </table:table-cell>
          <table:table-cell office:value-type="string" calcext:value-type="string">
            <text:p>0:14</text:p>
          </table:table-cell>
          <table:table-cell office:value-type="string" calcext:value-type="string">
            <text:p>Dingdong</text:p>
          </table:table-cell>
          <table:table-cell office:value-type="string" calcext:value-type="string">
            <text:p>wXK0hxCnRKk</text:p>
          </table:table-cell>
          <table:table-cell/>
          <table:table-cell table:formula="of:=&quot;['&quot; &amp; [.A51] &amp; &quot;', '&quot; &amp; YEAR([.B51]) &amp; &quot;-&quot; &amp; MONTH([.B51]) &amp; &quot;-&quot; &amp; DAY([.B51]) &amp; &quot;', '&quot; &amp; [.C51] &amp; &quot;', '&quot; &amp; [.D51] &amp; &quot;', '&quot; &amp; [.E51] &amp; &quot;', '&quot; &amp; [.F51] &amp; &quot;'],&quot;" office:value-type="string" office:string-value="['Chronicles of Mystara Ep 1', '2016-4-19', '0:14', 'Dingdong', 'wXK0hxCnRKk', '']," calcext:value-type="string">
            <text:p>['Chronicles of Mystara Ep 1', '2016-4-19', '0:14', 'Dingdong', 'wXK0hxCnRKk', ''],</text:p>
          </table:table-cell>
        </table:table-row>
        <table:table-row table:style-name="ro1">
          <table:table-cell office:value-type="string" calcext:value-type="string">
            <text:p>Chronicles of Mystara Ep 2</text:p>
          </table:table-cell>
          <table:table-cell office:value-type="date" office:date-value="2016-04-25" calcext:value-type="date">
            <text:p>2016-04-25</text:p>
          </table:table-cell>
          <table:table-cell office:value-type="string" calcext:value-type="string">
            <text:p>0:13</text:p>
          </table:table-cell>
          <table:table-cell office:value-type="string" calcext:value-type="string">
            <text:p>Dingdong</text:p>
          </table:table-cell>
          <table:table-cell office:value-type="string" calcext:value-type="string">
            <text:p>8fu6W-R_Pzs</text:p>
          </table:table-cell>
          <table:table-cell/>
          <table:table-cell table:formula="of:=&quot;['&quot; &amp; [.A52] &amp; &quot;', '&quot; &amp; YEAR([.B52]) &amp; &quot;-&quot; &amp; MONTH([.B52]) &amp; &quot;-&quot; &amp; DAY([.B52]) &amp; &quot;', '&quot; &amp; [.C52] &amp; &quot;', '&quot; &amp; [.D52] &amp; &quot;', '&quot; &amp; [.E52] &amp; &quot;', '&quot; &amp; [.F52] &amp; &quot;'],&quot;" office:value-type="string" office:string-value="['Chronicles of Mystara Ep 2', '2016-4-25', '0:13', 'Dingdong', '8fu6W-R_Pzs', '']," calcext:value-type="string">
            <text:p>['Chronicles of Mystara Ep 2', '2016-4-25', '0:13', 'Dingdong', '8fu6W-R_Pzs', ''],</text:p>
          </table:table-cell>
        </table:table-row>
        <table:table-row table:style-name="ro1">
          <table:table-cell office:value-type="string" calcext:value-type="string">
            <text:p>Civilization VI</text:p>
          </table:table-cell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Zach, Tomar, Cory</text:p>
          </table:table-cell>
          <table:table-cell office:value-type="string" calcext:value-type="string">
            <text:p>swpHQjgsYfM</text:p>
          </table:table-cell>
          <table:table-cell/>
          <table:table-cell table:formula="of:=&quot;['&quot; &amp; [.A53] &amp; &quot;', '&quot; &amp; YEAR([.B53]) &amp; &quot;-&quot; &amp; MONTH([.B53]) &amp; &quot;-&quot; &amp; DAY([.B53]) &amp; &quot;', '&quot; &amp; [.C53] &amp; &quot;', '&quot; &amp; [.D53] &amp; &quot;', '&quot; &amp; [.E53] &amp; &quot;', '&quot; &amp; [.F53] &amp; &quot;'],&quot;" office:value-type="string" office:string-value="['Civilization VI', '2022-3-29', '5:55', 'Zach, Tomar, Cory', 'swpHQjgsYfM', '']," calcext:value-type="string">
            <text:p>['Civilization VI', '2022-3-29', '5:55', 'Zach, Tomar, Cory', 'swpHQjgsYfM', ''],</text:p>
          </table:table-cell>
        </table:table-row>
        <table:table-row table:style-name="ro1">
          <table:table-cell office:value-type="string" calcext:value-type="string">
            <text:p>Clair Obscur - Expedition 33</text:p>
          </table:table-cell>
          <table:table-cell office:value-type="date" office:date-value="2025-09-01" calcext:value-type="date">
            <text:p>2025-09-01</text:p>
          </table:table-cell>
          <table:table-cell office:value-type="string" calcext:value-type="string">
            <text:p>1:11</text:p>
          </table:table-cell>
          <table:table-cell office:value-type="string" calcext:value-type="string">
            <text:p>Lyle, Niall</text:p>
          </table:table-cell>
          <table:table-cell office:value-type="string" calcext:value-type="string">
            <text:p>MUCnMwlnxV4</text:p>
          </table:table-cell>
          <table:table-cell/>
          <table:table-cell table:formula="of:=&quot;['&quot; &amp; [.A54] &amp; &quot;', '&quot; &amp; YEAR([.B54]) &amp; &quot;-&quot; &amp; MONTH([.B54]) &amp; &quot;-&quot; &amp; DAY([.B54]) &amp; &quot;', '&quot; &amp; [.C54] &amp; &quot;', '&quot; &amp; [.D54] &amp; &quot;', '&quot; &amp; [.E54] &amp; &quot;', '&quot; &amp; [.F54] &amp; &quot;'],&quot;" office:value-type="string" office:string-value="['Clair Obscur - Expedition 33', '2025-9-1', '1:11', 'Lyle, Niall', 'MUCnMwlnxV4', '']," calcext:value-type="string">
            <text:p>['Clair Obscur - Expedition 33', '2025-9-1', '1:11', 'Lyle, Niall', 'MUCnMwlnxV4', ''],</text:p>
          </table:table-cell>
        </table:table-row>
        <table:table-row table:style-name="ro1">
          <table:table-cell office:value-type="string" calcext:value-type="string">
            <text:p>Classrooms, The</text:p>
          </table:table-cell>
          <table:table-cell office:value-type="date" office:date-value="2024-10-19" calcext:value-type="date">
            <text:p>2024-10-19</text:p>
          </table:table-cell>
          <table:table-cell office:value-type="string" calcext:value-type="string">
            <text:p>0:57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PU16PtCdemM</text:p>
          </table:table-cell>
          <table:table-cell/>
          <table:table-cell table:formula="of:=&quot;['&quot; &amp; [.A55] &amp; &quot;', '&quot; &amp; YEAR([.B55]) &amp; &quot;-&quot; &amp; MONTH([.B55]) &amp; &quot;-&quot; &amp; DAY([.B55]) &amp; &quot;', '&quot; &amp; [.C55] &amp; &quot;', '&quot; &amp; [.D55] &amp; &quot;', '&quot; &amp; [.E55] &amp; &quot;', '&quot; &amp; [.F55] &amp; &quot;'],&quot;" office:value-type="string" office:string-value="['Classrooms, The', '2024-10-19', '0:57', 'Cory, Dave', 'PU16PtCdemM', '']," calcext:value-type="string">
            <text:p>['Classrooms, The', '2024-10-19', '0:57', 'Cory, Dave', 'PU16PtCdemM', ''],</text:p>
          </table:table-cell>
        </table:table-row>
        <table:table-row table:style-name="ro1">
          <table:table-cell office:value-type="string" calcext:value-type="string">
            <text:p>Conker's Bad Fur Day</text:p>
          </table:table-cell>
          <table:table-cell office:value-type="date" office:date-value="2024-06-15" calcext:value-type="date">
            <text:p>2024-06-15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Cory, Hans</text:p>
          </table:table-cell>
          <table:table-cell office:value-type="string" calcext:value-type="string">
            <text:p>dZpgrOFQyms</text:p>
          </table:table-cell>
          <table:table-cell/>
          <table:table-cell table:formula="of:=&quot;['&quot; &amp; [.A56] &amp; &quot;', '&quot; &amp; YEAR([.B56]) &amp; &quot;-&quot; &amp; MONTH([.B56]) &amp; &quot;-&quot; &amp; DAY([.B56]) &amp; &quot;', '&quot; &amp; [.C56] &amp; &quot;', '&quot; &amp; [.D56] &amp; &quot;', '&quot; &amp; [.E56] &amp; &quot;', '&quot; &amp; [.F56] &amp; &quot;'],&quot;" office:value-type="string" office:string-value="['Conker's Bad Fur Day', '2024-6-15', '5:53', 'Cory, Hans', 'dZpgrOFQyms', '']," calcext:value-type="string">
            <text:p>['Conker's Bad Fur Day', '2024-6-15', '5:53', 'Cory, Hans', 'dZpgrOFQyms', ''],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G-eLLSKJcdM</text:p>
          </table:table-cell>
          <table:table-cell/>
          <table:table-cell table:formula="of:=&quot;['&quot; &amp; [.A57] &amp; &quot;', '&quot; &amp; YEAR([.B57]) &amp; &quot;-&quot; &amp; MONTH([.B57]) &amp; &quot;-&quot; &amp; DAY([.B57]) &amp; &quot;', '&quot; &amp; [.C57] &amp; &quot;', '&quot; &amp; [.D57] &amp; &quot;', '&quot; &amp; [.E57] &amp; &quot;', '&quot; &amp; [.F57] &amp; &quot;'],&quot;" office:value-type="string" office:string-value="['Control', '2019-10-2', '0:50', 'Lyle, Tomar', 'G-eLLSKJcdM', '']," calcext:value-type="string">
            <text:p>['Control', '2019-10-2', '0:50', 'Lyle, Tomar', 'G-eLLSKJcdM', ''],</text:p>
          </table:table-cell>
        </table:table-row>
        <table:table-row table:style-name="ro1">
          <table:table-cell office:value-type="string" calcext:value-type="string">
            <text:p>Cool Dino Games (Weird Itch.Io Games)</text:p>
          </table:table-cell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1:14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XDPMdntfHfY</text:p>
          </table:table-cell>
          <table:table-cell/>
          <table:table-cell table:formula="of:=&quot;['&quot; &amp; [.A58] &amp; &quot;', '&quot; &amp; YEAR([.B58]) &amp; &quot;-&quot; &amp; MONTH([.B58]) &amp; &quot;-&quot; &amp; DAY([.B58]) &amp; &quot;', '&quot; &amp; [.C58] &amp; &quot;', '&quot; &amp; [.D58] &amp; &quot;', '&quot; &amp; [.E58] &amp; &quot;', '&quot; &amp; [.F58] &amp; &quot;'],&quot;" office:value-type="string" office:string-value="['Cool Dino Games (Weird Itch.Io Games)', '2020-5-21', '1:14', 'Zach, Lyle', 'XDPMdntfHfY', '']," calcext:value-type="string">
            <text:p>['Cool Dino Games (Weird Itch.Io Games)', '2020-5-21', '1:14', 'Zach, Lyle', 'XDPMdntfHfY', ''],</text:p>
          </table:table-cell>
        </table:table-row>
        <table:table-row table:style-name="ro1">
          <table:table-cell office:value-type="string" calcext:value-type="string">
            <text:p>Cosmic Boll</text:p>
          </table:table-cell>
          <table:table-cell office:value-type="date" office:date-value="2018-08-28" calcext:value-type="date">
            <text:p>2018-08-28</text:p>
          </table:table-cell>
          <table:table-cell office:value-type="string" calcext:value-type="string">
            <text:p>0:17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8ju-mwGVfEA</text:p>
          </table:table-cell>
          <table:table-cell/>
          <table:table-cell table:formula="of:=&quot;['&quot; &amp; [.A59] &amp; &quot;', '&quot; &amp; YEAR([.B59]) &amp; &quot;-&quot; &amp; MONTH([.B59]) &amp; &quot;-&quot; &amp; DAY([.B59]) &amp; &quot;', '&quot; &amp; [.C59] &amp; &quot;', '&quot; &amp; [.D59] &amp; &quot;', '&quot; &amp; [.E59] &amp; &quot;', '&quot; &amp; [.F59] &amp; &quot;'],&quot;" office:value-type="string" office:string-value="['Cosmic Boll', '2018-8-28', '0:17', 'Zach, Lyle', '8ju-mwGVfEA', '']," calcext:value-type="string">
            <text:p>['Cosmic Boll', '2018-8-28', '0:17', 'Zach, Lyle', '8ju-mwGVfEA', ''],</text:p>
          </table:table-cell>
        </table:table-row>
        <table:table-row table:style-name="ro1">
          <table:table-cell office:value-type="string" calcext:value-type="string">
            <text:p>Crash Bandicoot</text:p>
          </table:table-cell>
          <table:table-cell office:value-type="date" office:date-value="2017-04-16" calcext:value-type="date">
            <text:p>2017-04-16</text:p>
          </table:table-cell>
          <table:table-cell office:value-type="string" calcext:value-type="string">
            <text:p>1:5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jdCOEY5hnY8</text:p>
          </table:table-cell>
          <table:table-cell/>
          <table:table-cell table:formula="of:=&quot;['&quot; &amp; [.A60] &amp; &quot;', '&quot; &amp; YEAR([.B60]) &amp; &quot;-&quot; &amp; MONTH([.B60]) &amp; &quot;-&quot; &amp; DAY([.B60]) &amp; &quot;', '&quot; &amp; [.C60] &amp; &quot;', '&quot; &amp; [.D60] &amp; &quot;', '&quot; &amp; [.E60] &amp; &quot;', '&quot; &amp; [.F60] &amp; &quot;'],&quot;" office:value-type="string" office:string-value="['Crash Bandicoot', '2017-4-16', '1:56', 'Dingdong, Julian', 'jdCOEY5hnY8', '']," calcext:value-type="string">
            <text:p>['Crash Bandicoot', '2017-4-16', '1:56', 'Dingdong, Julian', 'jdCOEY5hnY8', ''],</text:p>
          </table:table-cell>
        </table:table-row>
        <table:table-row table:style-name="ro1">
          <table:table-cell office:value-type="string" calcext:value-type="string">
            <text:p>Crash Bandicoot - Wrath Of Cortex</text:p>
          </table:table-cell>
          <table:table-cell office:value-type="date" office:date-value="2017-04-13" calcext:value-type="date">
            <text:p>2017-04-13</text:p>
          </table:table-cell>
          <table:table-cell office:value-type="string" calcext:value-type="string">
            <text:p>1:3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_nRfJptXgWg</text:p>
          </table:table-cell>
          <table:table-cell/>
          <table:table-cell table:formula="of:=&quot;['&quot; &amp; [.A61] &amp; &quot;', '&quot; &amp; YEAR([.B61]) &amp; &quot;-&quot; &amp; MONTH([.B61]) &amp; &quot;-&quot; &amp; DAY([.B61]) &amp; &quot;', '&quot; &amp; [.C61] &amp; &quot;', '&quot; &amp; [.D61] &amp; &quot;', '&quot; &amp; [.E61] &amp; &quot;', '&quot; &amp; [.F61] &amp; &quot;'],&quot;" office:value-type="string" office:string-value="['Crash Bandicoot - Wrath Of Cortex', '2017-4-13', '1:36', 'Dingdong, Julian', '_nRfJptXgWg', '']," calcext:value-type="string">
            <text:p>['Crash Bandicoot - Wrath Of Cortex', '2017-4-13', '1:36', 'Dingdong, Julian', '_nRfJptXgWg', ''],</text:p>
          </table:table-cell>
        </table:table-row>
        <table:table-row table:style-name="ro1">
          <table:table-cell office:value-type="string" calcext:value-type="string">
            <text:p>Crash Bandicoot 2 - Cortex Strikes Back</text:p>
          </table:table-cell>
          <table:table-cell office:value-type="date" office:date-value="2016-10-08" calcext:value-type="date">
            <text:p>2016-10-08</text:p>
          </table:table-cell>
          <table:table-cell office:value-type="string" calcext:value-type="string">
            <text:p>3:3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f0UrsTrH7uw</text:p>
          </table:table-cell>
          <table:table-cell/>
          <table:table-cell table:formula="of:=&quot;['&quot; &amp; [.A62] &amp; &quot;', '&quot; &amp; YEAR([.B62]) &amp; &quot;-&quot; &amp; MONTH([.B62]) &amp; &quot;-&quot; &amp; DAY([.B62]) &amp; &quot;', '&quot; &amp; [.C62] &amp; &quot;', '&quot; &amp; [.D62] &amp; &quot;', '&quot; &amp; [.E62] &amp; &quot;', '&quot; &amp; [.F62] &amp; &quot;'],&quot;" office:value-type="string" office:string-value="['Crash Bandicoot 2 - Cortex Strikes Back', '2016-10-8', '3:35', 'Dingdong, Julian', 'f0UrsTrH7uw', '']," calcext:value-type="string">
            <text:p>['Crash Bandicoot 2 - Cortex Strikes Back', '2016-10-8', '3:35', 'Dingdong, Julian', 'f0UrsTrH7uw', ''],</text:p>
          </table:table-cell>
        </table:table-row>
        <table:table-row table:style-name="ro1">
          <table:table-cell office:value-type="string" calcext:value-type="string">
            <text:p>Crash Bandicoot 3 - Warped</text:p>
          </table:table-cell>
          <table:table-cell office:value-type="date" office:date-value="2017-06-20" calcext:value-type="date">
            <text:p>2017-06-20</text:p>
          </table:table-cell>
          <table:table-cell office:value-type="string" calcext:value-type="string">
            <text:p>1:5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sn3T7xdPwss</text:p>
          </table:table-cell>
          <table:table-cell/>
          <table:table-cell table:formula="of:=&quot;['&quot; &amp; [.A63] &amp; &quot;', '&quot; &amp; YEAR([.B63]) &amp; &quot;-&quot; &amp; MONTH([.B63]) &amp; &quot;-&quot; &amp; DAY([.B63]) &amp; &quot;', '&quot; &amp; [.C63] &amp; &quot;', '&quot; &amp; [.D63] &amp; &quot;', '&quot; &amp; [.E63] &amp; &quot;', '&quot; &amp; [.F63] &amp; &quot;'],&quot;" office:value-type="string" office:string-value="['Crash Bandicoot 3 - Warped', '2017-6-20', '1:57', 'Dingdong, Julian', 'sn3T7xdPwss', '']," calcext:value-type="string">
            <text:p>['Crash Bandicoot 3 - Warped', '2017-6-20', '1:57', 'Dingdong, Julian', 'sn3T7xdPwss', ''],</text:p>
          </table:table-cell>
        </table:table-row>
        <table:table-row table:style-name="ro1">
          <table:table-cell office:value-type="string" calcext:value-type="string">
            <text:p>Crash Bandicoot 4 - It's About Time</text:p>
          </table:table-cell>
          <table:table-cell office:value-type="date" office:date-value="2020-09-18" calcext:value-type="date">
            <text:p>2020-09-18</text:p>
          </table:table-cell>
          <table:table-cell office:value-type="string" calcext:value-type="string">
            <text:p>2:0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aqtrkxRBUs</text:p>
          </table:table-cell>
          <table:table-cell/>
          <table:table-cell table:formula="of:=&quot;['&quot; &amp; [.A64] &amp; &quot;', '&quot; &amp; YEAR([.B64]) &amp; &quot;-&quot; &amp; MONTH([.B64]) &amp; &quot;-&quot; &amp; DAY([.B64]) &amp; &quot;', '&quot; &amp; [.C64] &amp; &quot;', '&quot; &amp; [.D64] &amp; &quot;', '&quot; &amp; [.E64] &amp; &quot;', '&quot; &amp; [.F64] &amp; &quot;'],&quot;" office:value-type="string" office:string-value="['Crash Bandicoot 4 - It's About Time', '2020-9-18', '2:08', 'Lyle, Tomar', 'OaqtrkxRBUs', '']," calcext:value-type="string">
            <text:p>['Crash Bandicoot 4 - It's About Time', '2020-9-18', '2:08', 'Lyle, Tomar', 'OaqtrkxRBUs', ''],</text:p>
          </table:table-cell>
        </table:table-row>
        <table:table-row table:style-name="ro1">
          <table:table-cell office:value-type="string" calcext:value-type="string">
            <text:p>Crash Bandicoot For PC</text:p>
          </table:table-cell>
          <table:table-cell office:value-type="date" office:date-value="2017-09-02" calcext:value-type="date">
            <text:p>2017-09-02</text:p>
          </table:table-cell>
          <table:table-cell office:value-type="string" calcext:value-type="string">
            <text:p>0:16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qnHSQPcuv-E</text:p>
          </table:table-cell>
          <table:table-cell/>
          <table:table-cell table:formula="of:=&quot;['&quot; &amp; [.A65] &amp; &quot;', '&quot; &amp; YEAR([.B65]) &amp; &quot;-&quot; &amp; MONTH([.B65]) &amp; &quot;-&quot; &amp; DAY([.B65]) &amp; &quot;', '&quot; &amp; [.C65] &amp; &quot;', '&quot; &amp; [.D65] &amp; &quot;', '&quot; &amp; [.E65] &amp; &quot;', '&quot; &amp; [.F65] &amp; &quot;'],&quot;" office:value-type="string" office:string-value="['Crash Bandicoot For PC', '2017-9-2', '0:16', 'Dingdong, Julian, Matt', 'qnHSQPcuv-E', '']," calcext:value-type="string">
            <text:p>['Crash Bandicoot For PC', '2017-9-2', '0:16', 'Dingdong, Julian, Matt', 'qnHSQPcuv-E', ''],</text:p>
          </table:table-cell>
        </table:table-row>
        <table:table-row table:style-name="ro1">
          <table:table-cell office:value-type="string" calcext:value-type="string">
            <text:p>Crash N. Sane Trilogy</text:p>
          </table:table-cell>
          <table:table-cell office:value-type="date" office:date-value="2017-06-29" calcext:value-type="date">
            <text:p>2017-06-29</text:p>
          </table:table-cell>
          <table:table-cell office:value-type="string" calcext:value-type="string">
            <text:p>3:5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ZZs7SaQOiVc</text:p>
          </table:table-cell>
          <table:table-cell/>
          <table:table-cell table:formula="of:=&quot;['&quot; &amp; [.A66] &amp; &quot;', '&quot; &amp; YEAR([.B66]) &amp; &quot;-&quot; &amp; MONTH([.B66]) &amp; &quot;-&quot; &amp; DAY([.B66]) &amp; &quot;', '&quot; &amp; [.C66] &amp; &quot;', '&quot; &amp; [.D66] &amp; &quot;', '&quot; &amp; [.E66] &amp; &quot;', '&quot; &amp; [.F66] &amp; &quot;'],&quot;" office:value-type="string" office:string-value="['Crash N. Sane Trilogy', '2017-6-29', '3:52', 'Dingdong, Julian', 'ZZs7SaQOiVc', '']," calcext:value-type="string">
            <text:p>['Crash N. Sane Trilogy', '2017-6-29', '3:52', 'Dingdong, Julian', 'ZZs7SaQOiVc', ''],</text:p>
          </table:table-cell>
        </table:table-row>
        <table:table-row table:style-name="ro1">
          <table:table-cell office:value-type="string" calcext:value-type="string">
            <text:p>Crash N.Tense Adventure (Fan Game)</text:p>
          </table:table-cell>
          <table:table-cell office:value-type="date" office:date-value="2018-08-27" calcext:value-type="date">
            <text:p>2018-08-27</text:p>
          </table:table-cell>
          <table:table-cell office:value-type="string" calcext:value-type="string">
            <text:p>0:28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j4fDuGmH_xc</text:p>
          </table:table-cell>
          <table:table-cell/>
          <table:table-cell table:formula="of:=&quot;['&quot; &amp; [.A67] &amp; &quot;', '&quot; &amp; YEAR([.B67]) &amp; &quot;-&quot; &amp; MONTH([.B67]) &amp; &quot;-&quot; &amp; DAY([.B67]) &amp; &quot;', '&quot; &amp; [.C67] &amp; &quot;', '&quot; &amp; [.D67] &amp; &quot;', '&quot; &amp; [.E67] &amp; &quot;', '&quot; &amp; [.F67] &amp; &quot;'],&quot;" office:value-type="string" office:string-value="['Crash N.Tense Adventure (Fan Game)', '2018-8-27', '0:28', 'Zach, Lyle', 'j4fDuGmH_xc', '']," calcext:value-type="string">
            <text:p>['Crash N.Tense Adventure (Fan Game)', '2018-8-27', '0:28', 'Zach, Lyle', 'j4fDuGmH_xc', ''],</text:p>
          </table:table-cell>
        </table:table-row>
        <table:table-row table:style-name="ro1">
          <table:table-cell office:value-type="string" calcext:value-type="string">
            <text:p>Crash Team Racing Nitro-Fueled</text:p>
          </table:table-cell>
          <table:table-cell office:value-type="date" office:date-value="2019-06-22" calcext:value-type="date">
            <text:p>2019-06-22</text:p>
          </table:table-cell>
          <table:table-cell office:value-type="string" calcext:value-type="string">
            <text:p>1:5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UdrqiRM8-lI</text:p>
          </table:table-cell>
          <table:table-cell/>
          <table:table-cell table:formula="of:=&quot;['&quot; &amp; [.A68] &amp; &quot;', '&quot; &amp; YEAR([.B68]) &amp; &quot;-&quot; &amp; MONTH([.B68]) &amp; &quot;-&quot; &amp; DAY([.B68]) &amp; &quot;', '&quot; &amp; [.C68] &amp; &quot;', '&quot; &amp; [.D68] &amp; &quot;', '&quot; &amp; [.E68] &amp; &quot;', '&quot; &amp; [.F68] &amp; &quot;'],&quot;" office:value-type="string" office:string-value="['Crash Team Racing Nitro-Fueled', '2019-6-22', '1:55', 'Lyle, Tomar', 'UdrqiRM8-lI', '']," calcext:value-type="string">
            <text:p>['Crash Team Racing Nitro-Fueled', '2019-6-22', '1:55', 'Lyle, Tomar', 'UdrqiRM8-lI', ''],</text:p>
          </table:table-cell>
        </table:table-row>
        <table:table-row table:style-name="ro1">
          <table:table-cell office:value-type="string" calcext:value-type="string">
            <text:p>Crash Twinsanity</text:p>
          </table:table-cell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1:3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KnUxkIfRQQ8</text:p>
          </table:table-cell>
          <table:table-cell/>
          <table:table-cell table:formula="of:=&quot;['&quot; &amp; [.A69] &amp; &quot;', '&quot; &amp; YEAR([.B69]) &amp; &quot;-&quot; &amp; MONTH([.B69]) &amp; &quot;-&quot; &amp; DAY([.B69]) &amp; &quot;', '&quot; &amp; [.C69] &amp; &quot;', '&quot; &amp; [.D69] &amp; &quot;', '&quot; &amp; [.E69] &amp; &quot;', '&quot; &amp; [.F69] &amp; &quot;'],&quot;" office:value-type="string" office:string-value="['Crash Twinsanity', '2017-9-25', '1:31', 'Dingdong, Julian', 'KnUxkIfRQQ8', '']," calcext:value-type="string">
            <text:p>['Crash Twinsanity', '2017-9-25', '1:31', 'Dingdong, Julian', 'KnUxkIfRQQ8', ''],</text:p>
          </table:table-cell>
        </table:table-row>
        <table:table-row table:style-name="ro1">
          <table:table-cell office:value-type="string" calcext:value-type="string">
            <text:p>Creepy Pasta Land 2 - SCP Force</text:p>
          </table:table-cell>
          <table:table-cell office:value-type="date" office:date-value="2017-09-16" calcext:value-type="date">
            <text:p>2017-09-16</text:p>
          </table:table-cell>
          <table:table-cell office:value-type="string" calcext:value-type="string">
            <text:p>0:20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wn3s-4rS7qA</text:p>
          </table:table-cell>
          <table:table-cell/>
          <table:table-cell table:formula="of:=&quot;['&quot; &amp; [.A70] &amp; &quot;', '&quot; &amp; YEAR([.B70]) &amp; &quot;-&quot; &amp; MONTH([.B70]) &amp; &quot;-&quot; &amp; DAY([.B70]) &amp; &quot;', '&quot; &amp; [.C70] &amp; &quot;', '&quot; &amp; [.D70] &amp; &quot;', '&quot; &amp; [.E70] &amp; &quot;', '&quot; &amp; [.F70] &amp; &quot;'],&quot;" office:value-type="string" office:string-value="['Creepy Pasta Land 2 - SCP Force', '2017-9-16', '0:20', 'Dingdong, Julian, Matt', 'wn3s-4rS7qA', '']," calcext:value-type="string">
            <text:p>['Creepy Pasta Land 2 - SCP Force', '2017-9-16', '0:20', 'Dingdong, Julian, Matt', 'wn3s-4rS7qA', ''],</text:p>
          </table:table-cell>
        </table:table-row>
        <table:table-row table:style-name="ro1">
          <table:table-cell office:value-type="string" calcext:value-type="string">
            <text:p>Croc</text:p>
          </table:table-cell>
          <table:table-cell office:value-type="date" office:date-value="2018-06-20" calcext:value-type="date">
            <text:p>2018-06-20</text:p>
          </table:table-cell>
          <table:table-cell office:value-type="string" calcext:value-type="string">
            <text:p>1:5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cuC5oFVWVFg</text:p>
          </table:table-cell>
          <table:table-cell/>
          <table:table-cell table:formula="of:=&quot;['&quot; &amp; [.A71] &amp; &quot;', '&quot; &amp; YEAR([.B71]) &amp; &quot;-&quot; &amp; MONTH([.B71]) &amp; &quot;-&quot; &amp; DAY([.B71]) &amp; &quot;', '&quot; &amp; [.C71] &amp; &quot;', '&quot; &amp; [.D71] &amp; &quot;', '&quot; &amp; [.E71] &amp; &quot;', '&quot; &amp; [.F71] &amp; &quot;'],&quot;" office:value-type="string" office:string-value="['Croc', '2018-6-20', '1:53', 'Zach, Lyle', 'cuC5oFVWVFg', '']," calcext:value-type="string">
            <text:p>['Croc', '2018-6-20', '1:53', 'Zach, Lyle', 'cuC5oFVWVFg', ''],</text:p>
          </table:table-cell>
        </table:table-row>
        <table:table-row table:style-name="ro1">
          <table:table-cell office:value-type="string" calcext:value-type="string">
            <text:p>Crumble</text:p>
          </table:table-cell>
          <table:table-cell office:value-type="date" office:date-value="2020-12-17" calcext:value-type="date">
            <text:p>2020-12-17</text:p>
          </table:table-cell>
          <table:table-cell office:value-type="string" calcext:value-type="string">
            <text:p>1:1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GAaPxWKlYT4</text:p>
          </table:table-cell>
          <table:table-cell/>
          <table:table-cell table:formula="of:=&quot;['&quot; &amp; [.A72] &amp; &quot;', '&quot; &amp; YEAR([.B72]) &amp; &quot;-&quot; &amp; MONTH([.B72]) &amp; &quot;-&quot; &amp; DAY([.B72]) &amp; &quot;', '&quot; &amp; [.C72] &amp; &quot;', '&quot; &amp; [.D72] &amp; &quot;', '&quot; &amp; [.E72] &amp; &quot;', '&quot; &amp; [.F72] &amp; &quot;'],&quot;" office:value-type="string" office:string-value="['Crumble', '2020-12-17', '1:13', 'Lyle, Tomar', 'GAaPxWKlYT4', '']," calcext:value-type="string">
            <text:p>['Crumble', '2020-12-17', '1:13', 'Lyle, Tomar', 'GAaPxWKlYT4', ''],</text:p>
          </table:table-cell>
        </table:table-row>
        <table:table-row table:style-name="ro1">
          <table:table-cell office:value-type="string" calcext:value-type="string">
            <text:p>Cubix</text:p>
          </table:table-cell>
          <table:table-cell office:value-type="date" office:date-value="2016-08-21" calcext:value-type="date">
            <text:p>2016-08-21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rToD75vUAjg</text:p>
          </table:table-cell>
          <table:table-cell/>
          <table:table-cell table:formula="of:=&quot;['&quot; &amp; [.A73] &amp; &quot;', '&quot; &amp; YEAR([.B73]) &amp; &quot;-&quot; &amp; MONTH([.B73]) &amp; &quot;-&quot; &amp; DAY([.B73]) &amp; &quot;', '&quot; &amp; [.C73] &amp; &quot;', '&quot; &amp; [.D73] &amp; &quot;', '&quot; &amp; [.E73] &amp; &quot;', '&quot; &amp; [.F73] &amp; &quot;'],&quot;" office:value-type="string" office:string-value="['Cubix', '2016-8-21', '0:11', 'Dingdong, Julian', 'rToD75vUAjg', '']," calcext:value-type="string">
            <text:p>['Cubix', '2016-8-21', '0:11', 'Dingdong, Julian', 'rToD75vUAjg', ''],</text:p>
          </table:table-cell>
        </table:table-row>
        <table:table-row table:style-name="ro1">
          <table:table-cell office:value-type="string" calcext:value-type="string">
            <text:p>Cuphead</text:p>
          </table:table-cell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88Z8gPa2zc4</text:p>
          </table:table-cell>
          <table:table-cell/>
          <table:table-cell table:formula="of:=&quot;['&quot; &amp; [.A74] &amp; &quot;', '&quot; &amp; YEAR([.B74]) &amp; &quot;-&quot; &amp; MONTH([.B74]) &amp; &quot;-&quot; &amp; DAY([.B74]) &amp; &quot;', '&quot; &amp; [.C74] &amp; &quot;', '&quot; &amp; [.D74] &amp; &quot;', '&quot; &amp; [.E74] &amp; &quot;', '&quot; &amp; [.F74] &amp; &quot;'],&quot;" office:value-type="string" office:string-value="['Cuphead', '2017-10-4', '0:10', 'Dingdong, Julian', '88Z8gPa2zc4', '']," calcext:value-type="string">
            <text:p>['Cuphead', '2017-10-4', '0:10', 'Dingdong, Julian', '88Z8gPa2zc4', ''],</text:p>
          </table:table-cell>
        </table:table-row>
        <table:table-row table:style-name="ro1">
          <table:table-cell office:value-type="string" calcext:value-type="string">
            <text:p>Cuphead Gameplay - It's Not Easy.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0:1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uCcKjRRaHoc</text:p>
          </table:table-cell>
          <table:table-cell/>
          <table:table-cell table:formula="of:=&quot;['&quot; &amp; [.A75] &amp; &quot;', '&quot; &amp; YEAR([.B75]) &amp; &quot;-&quot; &amp; MONTH([.B75]) &amp; &quot;-&quot; &amp; DAY([.B75]) &amp; &quot;', '&quot; &amp; [.C75] &amp; &quot;', '&quot; &amp; [.D75] &amp; &quot;', '&quot; &amp; [.E75] &amp; &quot;', '&quot; &amp; [.F75] &amp; &quot;'],&quot;" office:value-type="string" office:string-value="['Cuphead Gameplay - It's Not Easy.', '2017-10-2', '0:17', 'Dingdong, Julian', 'uCcKjRRaHoc', '']," calcext:value-type="string">
            <text:p>['Cuphead Gameplay - It's Not Easy.', '2017-10-2', '0:17', 'Dingdong, Julian', 'uCcKjRRaHoc', ''],</text:p>
          </table:table-cell>
        </table:table-row>
        <table:table-row table:style-name="ro1">
          <table:table-cell office:value-type="string" calcext:value-type="string">
            <text:p>Cyberpunk 2077</text:p>
          </table:table-cell>
          <table:table-cell office:value-type="date" office:date-value="2020-12-15" calcext:value-type="date">
            <text:p>2020-12-15</text:p>
          </table:table-cell>
          <table:table-cell office:value-type="string" calcext:value-type="string">
            <text:p>1:2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bApCo-rbx98</text:p>
          </table:table-cell>
          <table:table-cell/>
          <table:table-cell table:formula="of:=&quot;['&quot; &amp; [.A76] &amp; &quot;', '&quot; &amp; YEAR([.B76]) &amp; &quot;-&quot; &amp; MONTH([.B76]) &amp; &quot;-&quot; &amp; DAY([.B76]) &amp; &quot;', '&quot; &amp; [.C76] &amp; &quot;', '&quot; &amp; [.D76] &amp; &quot;', '&quot; &amp; [.E76] &amp; &quot;', '&quot; &amp; [.F76] &amp; &quot;'],&quot;" office:value-type="string" office:string-value="['Cyberpunk 2077', '2020-12-15', '1:23', 'Zach, Tomar', 'bApCo-rbx98', '']," calcext:value-type="string">
            <text:p>['Cyberpunk 2077', '2020-12-15', '1:23', 'Zach, Tomar', 'bApCo-rbx98', ''],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0:5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3QUsAoYSq4</text:p>
          </table:table-cell>
          <table:table-cell/>
          <table:table-cell table:formula="of:=&quot;['&quot; &amp; [.A77] &amp; &quot;', '&quot; &amp; YEAR([.B77]) &amp; &quot;-&quot; &amp; MONTH([.B77]) &amp; &quot;-&quot; &amp; DAY([.B77]) &amp; &quot;', '&quot; &amp; [.C77] &amp; &quot;', '&quot; &amp; [.D77] &amp; &quot;', '&quot; &amp; [.E77] &amp; &quot;', '&quot; &amp; [.F77] &amp; &quot;'],&quot;" office:value-type="string" office:string-value="['D', '2017-10-19', '0:52', 'Dingdong, Julian', 'V3QUsAoYSq4', '']," calcext:value-type="string">
            <text:p>['D', '2017-10-19', '0:52', 'Dingdong, Julian', 'V3QUsAoYSq4', ''],</text:p>
          </table:table-cell>
        </table:table-row>
        <table:table-row table:style-name="ro1">
          <table:table-cell office:value-type="string" calcext:value-type="string">
            <text:p>Dark Messiah Of Might And Magic</text:p>
          </table:table-cell>
          <table:table-cell office:value-type="date" office:date-value="2021-07-07" calcext:value-type="date">
            <text:p>2021-07-07</text:p>
          </table:table-cell>
          <table:table-cell office:value-type="string" calcext:value-type="string">
            <text:p>1:1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F0Rj1MBUSM</text:p>
          </table:table-cell>
          <table:table-cell/>
          <table:table-cell table:formula="of:=&quot;['&quot; &amp; [.A78] &amp; &quot;', '&quot; &amp; YEAR([.B78]) &amp; &quot;-&quot; &amp; MONTH([.B78]) &amp; &quot;-&quot; &amp; DAY([.B78]) &amp; &quot;', '&quot; &amp; [.C78] &amp; &quot;', '&quot; &amp; [.D78] &amp; &quot;', '&quot; &amp; [.E78] &amp; &quot;', '&quot; &amp; [.F78] &amp; &quot;'],&quot;" office:value-type="string" office:string-value="['Dark Messiah Of Might And Magic', '2021-7-7', '1:15', 'Lyle, Tomar', 'TF0Rj1MBUSM', '']," calcext:value-type="string">
            <text:p>['Dark Messiah Of Might And Magic', '2021-7-7', '1:15', 'Lyle, Tomar', 'TF0Rj1MBUSM', ''],</text:p>
          </table:table-cell>
        </table:table-row>
        <table:table-row table:style-name="ro1">
          <table:table-cell office:value-type="string" calcext:value-type="string">
            <text:p>Dark Souls (2014)</text:p>
          </table:table-cell>
          <table:table-cell office:value-type="date" office:date-value="2014-05-26" calcext:value-type="date">
            <text:p>2014-05-2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pXEbzzlJHrg</text:p>
          </table:table-cell>
          <table:table-cell/>
          <table:table-cell table:formula="of:=&quot;['&quot; &amp; [.A79] &amp; &quot;', '&quot; &amp; YEAR([.B79]) &amp; &quot;-&quot; &amp; MONTH([.B79]) &amp; &quot;-&quot; &amp; DAY([.B79]) &amp; &quot;', '&quot; &amp; [.C79] &amp; &quot;', '&quot; &amp; [.D79] &amp; &quot;', '&quot; &amp; [.E79] &amp; &quot;', '&quot; &amp; [.F79] &amp; &quot;'],&quot;" office:value-type="string" office:string-value="['Dark Souls (2014)', '2014-5-26', '11:46', 'Solo', 'pXEbzzlJHrg', '']," calcext:value-type="string">
            <text:p>['Dark Souls (2014)', '2014-5-26', '11:46', 'Solo', 'pXEbzzlJHrg', ''],</text:p>
          </table:table-cell>
        </table:table-row>
        <table:table-row table:style-name="ro1">
          <table:table-cell office:value-type="string" calcext:value-type="string">
            <text:p>Dark Souls (2017)</text:p>
          </table:table-cell>
          <table:table-cell office:value-type="date" office:date-value="2017-07-08" calcext:value-type="date">
            <text:p>2017-07-08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mTImiu5VERs</text:p>
          </table:table-cell>
          <table:table-cell/>
          <table:table-cell table:formula="of:=&quot;['&quot; &amp; [.A80] &amp; &quot;', '&quot; &amp; YEAR([.B80]) &amp; &quot;-&quot; &amp; MONTH([.B80]) &amp; &quot;-&quot; &amp; DAY([.B80]) &amp; &quot;', '&quot; &amp; [.C80] &amp; &quot;', '&quot; &amp; [.D80] &amp; &quot;', '&quot; &amp; [.E80] &amp; &quot;', '&quot; &amp; [.F80] &amp; &quot;'],&quot;" office:value-type="string" office:string-value="['Dark Souls (2017)', '2017-7-8', '5:35', 'Dingdong, Julian', 'mTImiu5VERs', '']," calcext:value-type="string">
            <text:p>['Dark Souls (2017)', '2017-7-8', '5:35', 'Dingdong, Julian', 'mTImiu5VERs', ''],</text:p>
          </table:table-cell>
        </table:table-row>
        <table:table-row table:style-name="ro1">
          <table:table-cell office:value-type="string" calcext:value-type="string">
            <text:p>Dark Souls (2023)</text:p>
          </table:table-cell>
          <table:table-cell office:value-type="date" office:date-value="2023-06-30" calcext:value-type="date">
            <text:p>2023-06-30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Cory, Adam</text:p>
          </table:table-cell>
          <table:table-cell office:value-type="string" calcext:value-type="string">
            <text:p>I1ZQhassRGk</text:p>
          </table:table-cell>
          <table:table-cell/>
          <table:table-cell table:formula="of:=&quot;['&quot; &amp; [.A81] &amp; &quot;', '&quot; &amp; YEAR([.B81]) &amp; &quot;-&quot; &amp; MONTH([.B81]) &amp; &quot;-&quot; &amp; DAY([.B81]) &amp; &quot;', '&quot; &amp; [.C81] &amp; &quot;', '&quot; &amp; [.D81] &amp; &quot;', '&quot; &amp; [.E81] &amp; &quot;', '&quot; &amp; [.F81] &amp; &quot;'],&quot;" office:value-type="string" office:string-value="['Dark Souls (2023)', '2023-6-30', '9:18', 'Cory, Adam', 'I1ZQhassRGk', '']," calcext:value-type="string">
            <text:p>['Dark Souls (2023)', '2023-6-30', '9:18', 'Cory, Adam', 'I1ZQhassRGk', ''],</text:p>
          </table:table-cell>
        </table:table-row>
        <table:table-row table:style-name="ro1">
          <table:table-cell office:value-type="string" calcext:value-type="string">
            <text:p>Dark Souls 2 (2014) - Ep 1</text:p>
          </table:table-cell>
          <table:table-cell office:value-type="date" office:date-value="2014-07-22" calcext:value-type="date">
            <text:p>2014-07-22</text:p>
          </table:table-cell>
          <table:table-cell office:value-type="string" calcext:value-type="string">
            <text:p>0:1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yfbSzP3RVnA</text:p>
          </table:table-cell>
          <table:table-cell/>
          <table:table-cell table:formula="of:=&quot;['&quot; &amp; [.A82] &amp; &quot;', '&quot; &amp; YEAR([.B82]) &amp; &quot;-&quot; &amp; MONTH([.B82]) &amp; &quot;-&quot; &amp; DAY([.B82]) &amp; &quot;', '&quot; &amp; [.C82] &amp; &quot;', '&quot; &amp; [.D82] &amp; &quot;', '&quot; &amp; [.E82] &amp; &quot;', '&quot; &amp; [.F82] &amp; &quot;'],&quot;" office:value-type="string" office:string-value="['Dark Souls 2 (2014) - Ep 1', '2014-7-22', '0:17', 'Solo', 'yfbSzP3RVnA', '']," calcext:value-type="string">
            <text:p>['Dark Souls 2 (2014) - Ep 1', '2014-7-22', '0:17', 'Solo', 'yfbSzP3RVnA', ''],</text:p>
          </table:table-cell>
        </table:table-row>
        <table:table-row table:style-name="ro1">
          <table:table-cell office:value-type="string" calcext:value-type="string">
            <text:p>Dark Souls 2 (2014) - Ep 2</text:p>
          </table:table-cell>
          <table:table-cell office:value-type="date" office:date-value="2014-07-23" calcext:value-type="date">
            <text:p>2014-07-23</text:p>
          </table:table-cell>
          <table:table-cell office:value-type="string" calcext:value-type="string">
            <text:p>0:1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AhqDWNCzuG4</text:p>
          </table:table-cell>
          <table:table-cell/>
          <table:table-cell table:formula="of:=&quot;['&quot; &amp; [.A83] &amp; &quot;', '&quot; &amp; YEAR([.B83]) &amp; &quot;-&quot; &amp; MONTH([.B83]) &amp; &quot;-&quot; &amp; DAY([.B83]) &amp; &quot;', '&quot; &amp; [.C83] &amp; &quot;', '&quot; &amp; [.D83] &amp; &quot;', '&quot; &amp; [.E83] &amp; &quot;', '&quot; &amp; [.F83] &amp; &quot;'],&quot;" office:value-type="string" office:string-value="['Dark Souls 2 (2014) - Ep 2', '2014-7-23', '0:18', 'Solo', 'AhqDWNCzuG4', '']," calcext:value-type="string">
            <text:p>['Dark Souls 2 (2014) - Ep 2', '2014-7-23', '0:18', 'Solo', 'AhqDWNCzuG4', ''],</text:p>
          </table:table-cell>
        </table:table-row>
        <table:table-row table:style-name="ro1">
          <table:table-cell office:value-type="string" calcext:value-type="string">
            <text:p>Dark Souls 2 (2014) - Ep 3</text:p>
          </table:table-cell>
          <table:table-cell office:value-type="date" office:date-value="2014-07-25" calcext:value-type="date">
            <text:p>2014-07-25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f_-plyvmpmo</text:p>
          </table:table-cell>
          <table:table-cell/>
          <table:table-cell table:formula="of:=&quot;['&quot; &amp; [.A84] &amp; &quot;', '&quot; &amp; YEAR([.B84]) &amp; &quot;-&quot; &amp; MONTH([.B84]) &amp; &quot;-&quot; &amp; DAY([.B84]) &amp; &quot;', '&quot; &amp; [.C84] &amp; &quot;', '&quot; &amp; [.D84] &amp; &quot;', '&quot; &amp; [.E84] &amp; &quot;', '&quot; &amp; [.F84] &amp; &quot;'],&quot;" office:value-type="string" office:string-value="['Dark Souls 2 (2014) - Ep 3', '2014-7-25', '0:10', 'Solo', 'f_-plyvmpmo', '']," calcext:value-type="string">
            <text:p>['Dark Souls 2 (2014) - Ep 3', '2014-7-25', '0:10', 'Solo', 'f_-plyvmpmo', ''],</text:p>
          </table:table-cell>
        </table:table-row>
        <table:table-row table:style-name="ro1">
          <table:table-cell office:value-type="string" calcext:value-type="string">
            <text:p>Dark Souls 2 (2023)</text:p>
          </table:table-cell>
          <table:table-cell office:value-type="date" office:date-value="2023-08-07" calcext:value-type="date">
            <text:p>2023-08-07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Cory, Adam</text:p>
          </table:table-cell>
          <table:table-cell office:value-type="string" calcext:value-type="string">
            <text:p>bptvUwy5VCg</text:p>
          </table:table-cell>
          <table:table-cell/>
          <table:table-cell table:formula="of:=&quot;['&quot; &amp; [.A85] &amp; &quot;', '&quot; &amp; YEAR([.B85]) &amp; &quot;-&quot; &amp; MONTH([.B85]) &amp; &quot;-&quot; &amp; DAY([.B85]) &amp; &quot;', '&quot; &amp; [.C85] &amp; &quot;', '&quot; &amp; [.D85] &amp; &quot;', '&quot; &amp; [.E85] &amp; &quot;', '&quot; &amp; [.F85] &amp; &quot;'],&quot;" office:value-type="string" office:string-value="['Dark Souls 2 (2023)', '2023-8-7', '6:00', 'Cory, Adam', 'bptvUwy5VCg', '']," calcext:value-type="string">
            <text:p>['Dark Souls 2 (2023)', '2023-8-7', '6:00', 'Cory, Adam', 'bptvUwy5VCg', ''],</text:p>
          </table:table-cell>
        </table:table-row>
        <table:table-row table:style-name="ro1">
          <table:table-cell office:value-type="string" calcext:value-type="string">
            <text:p>Dark Souls 3 (2018) - Ep 1</text:p>
          </table:table-cell>
          <table:table-cell office:value-type="date" office:date-value="2018-07-03" calcext:value-type="date">
            <text:p>2018-07-03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H_zCtE21NCA</text:p>
          </table:table-cell>
          <table:table-cell/>
          <table:table-cell table:formula="of:=&quot;['&quot; &amp; [.A86] &amp; &quot;', '&quot; &amp; YEAR([.B86]) &amp; &quot;-&quot; &amp; MONTH([.B86]) &amp; &quot;-&quot; &amp; DAY([.B86]) &amp; &quot;', '&quot; &amp; [.C86] &amp; &quot;', '&quot; &amp; [.D86] &amp; &quot;', '&quot; &amp; [.E86] &amp; &quot;', '&quot; &amp; [.F86] &amp; &quot;'],&quot;" office:value-type="string" office:string-value="['Dark Souls 3 (2018) - Ep 1', '2018-7-3', '0:21', 'Solo', 'H_zCtE21NCA', '']," calcext:value-type="string">
            <text:p>['Dark Souls 3 (2018) - Ep 1', '2018-7-3', '0:21', 'Solo', 'H_zCtE21NCA', ''],</text:p>
          </table:table-cell>
        </table:table-row>
        <table:table-row table:style-name="ro1">
          <table:table-cell office:value-type="string" calcext:value-type="string">
            <text:p>Dark Souls 3 (2018) - Ep 2</text:p>
          </table:table-cell>
          <table:table-cell office:value-type="date" office:date-value="2018-07-08" calcext:value-type="date">
            <text:p>2018-07-08</text:p>
          </table:table-cell>
          <table:table-cell office:value-type="string" calcext:value-type="string">
            <text:p>0:20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MZm-b4sIpCI</text:p>
          </table:table-cell>
          <table:table-cell/>
          <table:table-cell table:formula="of:=&quot;['&quot; &amp; [.A87] &amp; &quot;', '&quot; &amp; YEAR([.B87]) &amp; &quot;-&quot; &amp; MONTH([.B87]) &amp; &quot;-&quot; &amp; DAY([.B87]) &amp; &quot;', '&quot; &amp; [.C87] &amp; &quot;', '&quot; &amp; [.D87] &amp; &quot;', '&quot; &amp; [.E87] &amp; &quot;', '&quot; &amp; [.F87] &amp; &quot;'],&quot;" office:value-type="string" office:string-value="['Dark Souls 3 (2018) - Ep 2', '2018-7-8', '0:20', 'Waffle', 'MZm-b4sIpCI', '']," calcext:value-type="string">
            <text:p>['Dark Souls 3 (2018) - Ep 2', '2018-7-8', '0:20', 'Waffle', 'MZm-b4sIpCI', ''],</text:p>
          </table:table-cell>
        </table:table-row>
        <table:table-row table:style-name="ro1">
          <table:table-cell office:value-type="string" calcext:value-type="string">
            <text:p>Dark Souls 3 (2019)</text:p>
          </table:table-cell>
          <table:table-cell office:value-type="date" office:date-value="2019-02-20" calcext:value-type="date">
            <text:p>2019-02-20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Y8IN00PtWb4</text:p>
          </table:table-cell>
          <table:table-cell/>
          <table:table-cell table:formula="of:=&quot;['&quot; &amp; [.A88] &amp; &quot;', '&quot; &amp; YEAR([.B88]) &amp; &quot;-&quot; &amp; MONTH([.B88]) &amp; &quot;-&quot; &amp; DAY([.B88]) &amp; &quot;', '&quot; &amp; [.C88] &amp; &quot;', '&quot; &amp; [.D88] &amp; &quot;', '&quot; &amp; [.E88] &amp; &quot;', '&quot; &amp; [.F88] &amp; &quot;'],&quot;" office:value-type="string" office:string-value="['Dark Souls 3 (2019)', '2019-2-20', '1:09', 'Mick, Tomar', 'Y8IN00PtWb4', '']," calcext:value-type="string">
            <text:p>['Dark Souls 3 (2019)', '2019-2-20', '1:09', 'Mick, Tomar', 'Y8IN00PtWb4', ''],</text:p>
          </table:table-cell>
        </table:table-row>
        <table:table-row table:style-name="ro1">
          <table:table-cell office:value-type="string" calcext:value-type="string">
            <text:p>Darkness 2, The</text:p>
          </table:table-cell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zLsVVRtqWTQ</text:p>
          </table:table-cell>
          <table:table-cell/>
          <table:table-cell table:formula="of:=&quot;['&quot; &amp; [.A89] &amp; &quot;', '&quot; &amp; YEAR([.B89]) &amp; &quot;-&quot; &amp; MONTH([.B89]) &amp; &quot;-&quot; &amp; DAY([.B89]) &amp; &quot;', '&quot; &amp; [.C89] &amp; &quot;', '&quot; &amp; [.D89] &amp; &quot;', '&quot; &amp; [.E89] &amp; &quot;', '&quot; &amp; [.F89] &amp; &quot;'],&quot;" office:value-type="string" office:string-value="['Darkness 2, The', '2022-9-17', '0:43', 'Lyle, Tomar', 'zLsVVRtqWTQ', '']," calcext:value-type="string">
            <text:p>['Darkness 2, The', '2022-9-17', '0:43', 'Lyle, Tomar', 'zLsVVRtqWTQ', ''],</text:p>
          </table:table-cell>
        </table:table-row>
        <table:table-row table:style-name="ro1">
          <table:table-cell office:value-type="string" calcext:value-type="string">
            <text:p>Day Z</text:p>
          </table:table-cell>
          <table:table-cell office:value-type="date" office:date-value="2014-11-19" calcext:value-type="date">
            <text:p>2014-11-19</text:p>
          </table:table-cell>
          <table:table-cell office:value-type="string" calcext:value-type="string">
            <text:p>2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cZoLPuTVJ00</text:p>
          </table:table-cell>
          <table:table-cell/>
          <table:table-cell table:formula="of:=&quot;['&quot; &amp; [.A90] &amp; &quot;', '&quot; &amp; YEAR([.B90]) &amp; &quot;-&quot; &amp; MONTH([.B90]) &amp; &quot;-&quot; &amp; DAY([.B90]) &amp; &quot;', '&quot; &amp; [.C90] &amp; &quot;', '&quot; &amp; [.D90] &amp; &quot;', '&quot; &amp; [.E90] &amp; &quot;', '&quot; &amp; [.F90] &amp; &quot;'],&quot;" office:value-type="string" office:string-value="['Day Z', '2014-11-19', '2:10', 'Solo', 'cZoLPuTVJ00', '']," calcext:value-type="string">
            <text:p>['Day Z', '2014-11-19', '2:10', 'Solo', 'cZoLPuTVJ00', ''],</text:p>
          </table:table-cell>
        </table:table-row>
        <table:table-row table:style-name="ro1">
          <table:table-cell office:value-type="string" calcext:value-type="string">
            <text:p>Dead Estate</text:p>
          </table:table-cell>
          <table:table-cell office:value-type="date" office:date-value="2021-11-29" calcext:value-type="date">
            <text:p>2021-11-29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qEQRe6toTdU</text:p>
          </table:table-cell>
          <table:table-cell/>
          <table:table-cell table:formula="of:=&quot;['&quot; &amp; [.A91] &amp; &quot;', '&quot; &amp; YEAR([.B91]) &amp; &quot;-&quot; &amp; MONTH([.B91]) &amp; &quot;-&quot; &amp; DAY([.B91]) &amp; &quot;', '&quot; &amp; [.C91] &amp; &quot;', '&quot; &amp; [.D91] &amp; &quot;', '&quot; &amp; [.E91] &amp; &quot;', '&quot; &amp; [.F91] &amp; &quot;'],&quot;" office:value-type="string" office:string-value="['Dead Estate', '2021-11-29', '0:45', 'Lyle, Tomar', 'qEQRe6toTdU', '']," calcext:value-type="string">
            <text:p>['Dead Estate', '2021-11-29', '0:45', 'Lyle, Tomar', 'qEQRe6toTdU', ''],</text:p>
          </table:table-cell>
        </table:table-row>
        <table:table-row table:style-name="ro1">
          <table:table-cell office:value-type="string" calcext:value-type="string">
            <text:p>Dead Island 2 - Ep 1</text:p>
          </table:table-cell>
          <table:table-cell office:value-type="date" office:date-value="2023-05-17" calcext:value-type="date">
            <text:p>2023-05-17</text:p>
          </table:table-cell>
          <table:table-cell office:value-type="string" calcext:value-type="string">
            <text:p>0:20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MomvrjEts08</text:p>
          </table:table-cell>
          <table:table-cell/>
          <table:table-cell table:formula="of:=&quot;['&quot; &amp; [.A92] &amp; &quot;', '&quot; &amp; YEAR([.B92]) &amp; &quot;-&quot; &amp; MONTH([.B92]) &amp; &quot;-&quot; &amp; DAY([.B92]) &amp; &quot;', '&quot; &amp; [.C92] &amp; &quot;', '&quot; &amp; [.D92] &amp; &quot;', '&quot; &amp; [.E92] &amp; &quot;', '&quot; &amp; [.F92] &amp; &quot;'],&quot;" office:value-type="string" office:string-value="['Dead Island 2 - Ep 1', '2023-5-17', '0:20', 'Lyle, Tomar', 'MomvrjEts08', '']," calcext:value-type="string">
            <text:p>['Dead Island 2 - Ep 1', '2023-5-17', '0:20', 'Lyle, Tomar', 'MomvrjEts08', ''],</text:p>
          </table:table-cell>
        </table:table-row>
        <table:table-row table:style-name="ro1">
          <table:table-cell office:value-type="string" calcext:value-type="string">
            <text:p>Dead Island 2 - Ep 2</text:p>
          </table:table-cell>
          <table:table-cell office:value-type="date" office:date-value="2023-05-19" calcext:value-type="date">
            <text:p>2023-05-19</text:p>
          </table:table-cell>
          <table:table-cell office:value-type="string" calcext:value-type="string">
            <text:p>0:2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gzfcK5TEh4</text:p>
          </table:table-cell>
          <table:table-cell/>
          <table:table-cell table:formula="of:=&quot;['&quot; &amp; [.A93] &amp; &quot;', '&quot; &amp; YEAR([.B93]) &amp; &quot;-&quot; &amp; MONTH([.B93]) &amp; &quot;-&quot; &amp; DAY([.B93]) &amp; &quot;', '&quot; &amp; [.C93] &amp; &quot;', '&quot; &amp; [.D93] &amp; &quot;', '&quot; &amp; [.E93] &amp; &quot;', '&quot; &amp; [.F93] &amp; &quot;'],&quot;" office:value-type="string" office:string-value="['Dead Island 2 - Ep 2', '2023-5-19', '0:29', 'Lyle, Tomar', 'XgzfcK5TEh4', '']," calcext:value-type="string">
            <text:p>['Dead Island 2 - Ep 2', '2023-5-19', '0:29', 'Lyle, Tomar', 'XgzfcK5TEh4', ''],</text:p>
          </table:table-cell>
        </table:table-row>
        <table:table-row table:style-name="ro1">
          <table:table-cell office:value-type="string" calcext:value-type="string">
            <text:p>Dead Rising</text:p>
          </table:table-cell>
          <table:table-cell office:value-type="date" office:date-value="2017-05-03" calcext:value-type="date">
            <text:p>2017-05-03</text:p>
          </table:table-cell>
          <table:table-cell office:value-type="string" calcext:value-type="string">
            <text:p>0:3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79m0hm2eEIU</text:p>
          </table:table-cell>
          <table:table-cell/>
          <table:table-cell table:formula="of:=&quot;['&quot; &amp; [.A94] &amp; &quot;', '&quot; &amp; YEAR([.B94]) &amp; &quot;-&quot; &amp; MONTH([.B94]) &amp; &quot;-&quot; &amp; DAY([.B94]) &amp; &quot;', '&quot; &amp; [.C94] &amp; &quot;', '&quot; &amp; [.D94] &amp; &quot;', '&quot; &amp; [.E94] &amp; &quot;', '&quot; &amp; [.F94] &amp; &quot;'],&quot;" office:value-type="string" office:string-value="['Dead Rising', '2017-5-3', '0:32', 'Dingdong, Julian', '79m0hm2eEIU', '']," calcext:value-type="string">
            <text:p>['Dead Rising', '2017-5-3', '0:32', 'Dingdong, Julian', '79m0hm2eEIU', ''],</text:p>
          </table:table-cell>
        </table:table-row>
        <table:table-row table:style-name="ro1">
          <table:table-cell office:value-type="string" calcext:value-type="string">
            <text:p>Dead Space</text:p>
          </table:table-cell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Cory, Jeff, Dave</text:p>
          </table:table-cell>
          <table:table-cell office:value-type="string" calcext:value-type="string">
            <text:p>eUWHkqlbaOw</text:p>
          </table:table-cell>
          <table:table-cell/>
          <table:table-cell table:formula="of:=&quot;['&quot; &amp; [.A95] &amp; &quot;', '&quot; &amp; YEAR([.B95]) &amp; &quot;-&quot; &amp; MONTH([.B95]) &amp; &quot;-&quot; &amp; DAY([.B95]) &amp; &quot;', '&quot; &amp; [.C95] &amp; &quot;', '&quot; &amp; [.D95] &amp; &quot;', '&quot; &amp; [.E95] &amp; &quot;', '&quot; &amp; [.F95] &amp; &quot;'],&quot;" office:value-type="string" office:string-value="['Dead Space', '2019-10-20', '0:43', 'Cory, Jeff, Dave', 'eUWHkqlbaOw', '']," calcext:value-type="string">
            <text:p>['Dead Space', '2019-10-20', '0:43', 'Cory, Jeff, Dave', 'eUWHkqlbaOw', ''],</text:p>
          </table:table-cell>
        </table:table-row>
        <table:table-row table:style-name="ro1">
          <table:table-cell office:value-type="string" calcext:value-type="string">
            <text:p>Deadly Premonition</text:p>
          </table:table-cell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1:4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AtK6ZakTgk</text:p>
          </table:table-cell>
          <table:table-cell/>
          <table:table-cell table:formula="of:=&quot;['&quot; &amp; [.A96] &amp; &quot;', '&quot; &amp; YEAR([.B96]) &amp; &quot;-&quot; &amp; MONTH([.B96]) &amp; &quot;-&quot; &amp; DAY([.B96]) &amp; &quot;', '&quot; &amp; [.C96] &amp; &quot;', '&quot; &amp; [.D96] &amp; &quot;', '&quot; &amp; [.E96] &amp; &quot;', '&quot; &amp; [.F96] &amp; &quot;'],&quot;" office:value-type="string" office:string-value="['Deadly Premonition', '2017-8-21', '1:46', 'Dingdong, Julian', 'VAtK6ZakTgk', '']," calcext:value-type="string">
            <text:p>['Deadly Premonition', '2017-8-21', '1:46', 'Dingdong, Julian', 'VAtK6ZakTgk', ''],</text:p>
          </table:table-cell>
        </table:table-row>
        <table:table-row table:style-name="ro1">
          <table:table-cell office:value-type="string" calcext:value-type="string">
            <text:p>Death Road To Canada</text:p>
          </table:table-cell>
          <table:table-cell office:value-type="date" office:date-value="2023-03-29" calcext:value-type="date">
            <text:p>2023-03-29</text:p>
          </table:table-cell>
          <table:table-cell office:value-type="string" calcext:value-type="string">
            <text:p>2:18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8ppRwKc3wXk</text:p>
          </table:table-cell>
          <table:table-cell/>
          <table:table-cell table:formula="of:=&quot;['&quot; &amp; [.A97] &amp; &quot;', '&quot; &amp; YEAR([.B97]) &amp; &quot;-&quot; &amp; MONTH([.B97]) &amp; &quot;-&quot; &amp; DAY([.B97]) &amp; &quot;', '&quot; &amp; [.C97] &amp; &quot;', '&quot; &amp; [.D97] &amp; &quot;', '&quot; &amp; [.E97] &amp; &quot;', '&quot; &amp; [.F97] &amp; &quot;'],&quot;" office:value-type="string" office:string-value="['Death Road To Canada', '2023-3-29', '2:18', 'Cory, Tomar', '8ppRwKc3wXk', '']," calcext:value-type="string">
            <text:p>['Death Road To Canada', '2023-3-29', '2:18', 'Cory, Tomar', '8ppRwKc3wXk', ''],</text:p>
          </table:table-cell>
        </table:table-row>
        <table:table-row table:style-name="ro1">
          <table:table-cell office:value-type="string" calcext:value-type="string">
            <text:p>Deathloop</text:p>
          </table:table-cell>
          <table:table-cell office:value-type="date" office:date-value="2021-11-03" calcext:value-type="date">
            <text:p>2021-11-03</text:p>
          </table:table-cell>
          <table:table-cell office:value-type="string" calcext:value-type="string">
            <text:p>0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H4V3njpB-I</text:p>
          </table:table-cell>
          <table:table-cell/>
          <table:table-cell table:formula="of:=&quot;['&quot; &amp; [.A98] &amp; &quot;', '&quot; &amp; YEAR([.B98]) &amp; &quot;-&quot; &amp; MONTH([.B98]) &amp; &quot;-&quot; &amp; DAY([.B98]) &amp; &quot;', '&quot; &amp; [.C98] &amp; &quot;', '&quot; &amp; [.D98] &amp; &quot;', '&quot; &amp; [.E98] &amp; &quot;', '&quot; &amp; [.F98] &amp; &quot;'],&quot;" office:value-type="string" office:string-value="['Deathloop', '2021-11-3', '0:26', 'Lyle, Tomar', 'oH4V3njpB-I', '']," calcext:value-type="string">
            <text:p>['Deathloop', '2021-11-3', '0:26', 'Lyle, Tomar', 'oH4V3njpB-I', ''],</text:p>
          </table:table-cell>
        </table:table-row>
        <table:table-row table:style-name="ro1">
          <table:table-cell office:value-type="string" calcext:value-type="string">
            <text:p>Decap Attack</text:p>
          </table:table-cell>
          <table:table-cell office:value-type="date" office:date-value="2024-05-26" calcext:value-type="date">
            <text:p>2024-05-26</text:p>
          </table:table-cell>
          <table:table-cell office:value-type="string" calcext:value-type="string">
            <text:p>1:16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wCuZnIMVo74</text:p>
          </table:table-cell>
          <table:table-cell/>
          <table:table-cell table:formula="of:=&quot;['&quot; &amp; [.A99] &amp; &quot;', '&quot; &amp; YEAR([.B99]) &amp; &quot;-&quot; &amp; MONTH([.B99]) &amp; &quot;-&quot; &amp; DAY([.B99]) &amp; &quot;', '&quot; &amp; [.C99] &amp; &quot;', '&quot; &amp; [.D99] &amp; &quot;', '&quot; &amp; [.E99] &amp; &quot;', '&quot; &amp; [.F99] &amp; &quot;'],&quot;" office:value-type="string" office:string-value="['Decap Attack', '2024-5-26', '1:16', 'Lyle, Cory', 'wCuZnIMVo74', '']," calcext:value-type="string">
            <text:p>['Decap Attack', '2024-5-26', '1:16', 'Lyle, Cory', 'wCuZnIMVo74', ''],</text:p>
          </table:table-cell>
        </table:table-row>
        <table:table-row table:style-name="ro1">
          <table:table-cell office:value-type="string" calcext:value-type="string">
            <text:p>Demon Souls (Stream) 1</text:p>
          </table:table-cell>
          <table:table-cell office:value-type="date" office:date-value="2025-09-01" calcext:value-type="date">
            <text:p>2025-09-01</text:p>
          </table:table-cell>
          <table:table-cell office:value-type="string" calcext:value-type="string">
            <text:p>1:17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hMiGl_oIN3E</text:p>
          </table:table-cell>
          <table:table-cell/>
          <table:table-cell table:formula="of:=&quot;['&quot; &amp; [.A100] &amp; &quot;', '&quot; &amp; YEAR([.B100]) &amp; &quot;-&quot; &amp; MONTH([.B100]) &amp; &quot;-&quot; &amp; DAY([.B100]) &amp; &quot;', '&quot; &amp; [.C100] &amp; &quot;', '&quot; &amp; [.D100] &amp; &quot;', '&quot; &amp; [.E100] &amp; &quot;', '&quot; &amp; [.F100] &amp; &quot;'],&quot;" office:value-type="string" office:string-value="['Demon Souls (Stream) 1', '2025-9-1', '1:17', 'Dave', 'hMiGl_oIN3E', '']," calcext:value-type="string">
            <text:p>['Demon Souls (Stream) 1', '2025-9-1', '1:17', 'Dave', 'hMiGl_oIN3E', ''],</text:p>
          </table:table-cell>
        </table:table-row>
        <table:table-row table:style-name="ro1">
          <table:table-cell office:value-type="string" calcext:value-type="string">
            <text:p>Demon Souls (Stream) 2</text:p>
          </table:table-cell>
          <table:table-cell office:value-type="date" office:date-value="2025-09-03" calcext:value-type="date">
            <text:p>2025-09-03</text:p>
          </table:table-cell>
          <table:table-cell office:value-type="string" calcext:value-type="string">
            <text:p>2:1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JZSpc3f8Lqw</text:p>
          </table:table-cell>
          <table:table-cell/>
          <table:table-cell table:formula="of:=&quot;['&quot; &amp; [.A101] &amp; &quot;', '&quot; &amp; YEAR([.B101]) &amp; &quot;-&quot; &amp; MONTH([.B101]) &amp; &quot;-&quot; &amp; DAY([.B101]) &amp; &quot;', '&quot; &amp; [.C101] &amp; &quot;', '&quot; &amp; [.D101] &amp; &quot;', '&quot; &amp; [.E101] &amp; &quot;', '&quot; &amp; [.F101] &amp; &quot;'],&quot;" office:value-type="string" office:string-value="['Demon Souls (Stream) 2', '2025-9-3', '2:10', 'Dave', 'JZSpc3f8Lqw', '']," calcext:value-type="string">
            <text:p>['Demon Souls (Stream) 2', '2025-9-3', '2:10', 'Dave', 'JZSpc3f8Lqw', ''],</text:p>
          </table:table-cell>
        </table:table-row>
        <table:table-row table:style-name="ro1">
          <table:table-cell office:value-type="string" calcext:value-type="string">
            <text:p>Demon's Souls (2020 Remake Ps5)</text:p>
          </table:table-cell>
          <table:table-cell office:value-type="date" office:date-value="2020-11-28" calcext:value-type="date">
            <text:p>2020-11-28</text:p>
          </table:table-cell>
          <table:table-cell office:value-type="string" calcext:value-type="string">
            <text:p>2:0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_O0cPTvJ7g4</text:p>
          </table:table-cell>
          <table:table-cell/>
          <table:table-cell table:formula="of:=&quot;['&quot; &amp; [.A102] &amp; &quot;', '&quot; &amp; YEAR([.B102]) &amp; &quot;-&quot; &amp; MONTH([.B102]) &amp; &quot;-&quot; &amp; DAY([.B102]) &amp; &quot;', '&quot; &amp; [.C102] &amp; &quot;', '&quot; &amp; [.D102] &amp; &quot;', '&quot; &amp; [.E102] &amp; &quot;', '&quot; &amp; [.F102] &amp; &quot;'],&quot;" office:value-type="string" office:string-value="['Demon's Souls (2020 Remake Ps5)', '2020-11-28', '2:08', 'Lyle, Tomar', '_O0cPTvJ7g4', '']," calcext:value-type="string">
            <text:p>['Demon's Souls (2020 Remake Ps5)', '2020-11-28', '2:08', 'Lyle, Tomar', '_O0cPTvJ7g4', ''],</text:p>
          </table:table-cell>
        </table:table-row>
        <table:table-row table:style-name="ro1">
          <table:table-cell office:value-type="string" calcext:value-type="string">
            <text:p>Demon's Souls With Nakey Jakey</text:p>
          </table:table-cell>
          <table:table-cell office:value-type="date" office:date-value="2019-03-19" calcext:value-type="date">
            <text:p>2019-03-19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NakeyJakey</text:p>
          </table:table-cell>
          <table:table-cell office:value-type="string" calcext:value-type="string">
            <text:p>LACXgwcMeWs</text:p>
          </table:table-cell>
          <table:table-cell office:value-type="string" calcext:value-type="string">
            <text:p>e8ooNRM39dk</text:p>
          </table:table-cell>
          <table:table-cell table:formula="of:=&quot;['&quot; &amp; [.A103] &amp; &quot;', '&quot; &amp; YEAR([.B103]) &amp; &quot;-&quot; &amp; MONTH([.B103]) &amp; &quot;-&quot; &amp; DAY([.B103]) &amp; &quot;', '&quot; &amp; [.C103] &amp; &quot;', '&quot; &amp; [.D103] &amp; &quot;', '&quot; &amp; [.E103] &amp; &quot;', '&quot; &amp; [.F103] &amp; &quot;'],&quot;" office:value-type="string" office:string-value="['Demon's Souls With Nakey Jakey', '2019-3-19', '3:39', 'NakeyJakey', 'LACXgwcMeWs', 'e8ooNRM39dk']," calcext:value-type="string">
            <text:p>['Demon's Souls With Nakey Jakey', '2019-3-19', '3:39', 'NakeyJakey', 'LACXgwcMeWs', 'e8ooNRM39dk'],</text:p>
          </table:table-cell>
        </table:table-row>
        <table:table-row table:style-name="ro1">
          <table:table-cell office:value-type="string" calcext:value-type="string">
            <text:p>Descenders</text:p>
          </table:table-cell>
          <table:table-cell office:value-type="date" office:date-value="2025-07-23" calcext:value-type="date">
            <text:p>2025-07-23</text:p>
          </table:table-cell>
          <table:table-cell office:value-type="string" calcext:value-type="string">
            <text:p>1:2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VWxKAhSHE0o</text:p>
          </table:table-cell>
          <table:table-cell/>
          <table:table-cell table:formula="of:=&quot;['&quot; &amp; [.A104] &amp; &quot;', '&quot; &amp; YEAR([.B104]) &amp; &quot;-&quot; &amp; MONTH([.B104]) &amp; &quot;-&quot; &amp; DAY([.B104]) &amp; &quot;', '&quot; &amp; [.C104] &amp; &quot;', '&quot; &amp; [.D104] &amp; &quot;', '&quot; &amp; [.E104] &amp; &quot;', '&quot; &amp; [.F104] &amp; &quot;'],&quot;" office:value-type="string" office:string-value="['Descenders', '2025-7-23', '1:29', 'Cory, Dave', 'VWxKAhSHE0o', '']," calcext:value-type="string">
            <text:p>['Descenders', '2025-7-23', '1:29', 'Cory, Dave', 'VWxKAhSHE0o', ''],</text:p>
          </table:table-cell>
        </table:table-row>
        <table:table-row table:style-name="ro1">
          <table:table-cell office:value-type="string" calcext:value-type="string">
            <text:p>Destroy All Humans!</text:p>
          </table:table-cell>
          <table:table-cell office:value-type="date" office:date-value="2020-08-08" calcext:value-type="date">
            <text:p>2020-08-08</text:p>
          </table:table-cell>
          <table:table-cell office:value-type="string" calcext:value-type="string">
            <text:p>1:06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AkhVSO0Oaiw</text:p>
          </table:table-cell>
          <table:table-cell/>
          <table:table-cell table:formula="of:=&quot;['&quot; &amp; [.A105] &amp; &quot;', '&quot; &amp; YEAR([.B105]) &amp; &quot;-&quot; &amp; MONTH([.B105]) &amp; &quot;-&quot; &amp; DAY([.B105]) &amp; &quot;', '&quot; &amp; [.C105] &amp; &quot;', '&quot; &amp; [.D105] &amp; &quot;', '&quot; &amp; [.E105] &amp; &quot;', '&quot; &amp; [.F105] &amp; &quot;'],&quot;" office:value-type="string" office:string-value="['Destroy All Humans!', '2020-8-8', '1:06', 'Zach, Lyle', 'AkhVSO0Oaiw', '']," calcext:value-type="string">
            <text:p>['Destroy All Humans!', '2020-8-8', '1:06', 'Zach, Lyle', 'AkhVSO0Oaiw', ''],</text:p>
          </table:table-cell>
        </table:table-row>
        <table:table-row table:style-name="ro1">
          <table:table-cell office:value-type="string" calcext:value-type="string">
            <text:p>Detroit - Become Human</text:p>
          </table:table-cell>
          <table:table-cell office:value-type="date" office:date-value="2021-03-14" calcext:value-type="date">
            <text:p>2021-03-14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1Y4HS-ugVBg</text:p>
          </table:table-cell>
          <table:table-cell/>
          <table:table-cell table:formula="of:=&quot;['&quot; &amp; [.A106] &amp; &quot;', '&quot; &amp; YEAR([.B106]) &amp; &quot;-&quot; &amp; MONTH([.B106]) &amp; &quot;-&quot; &amp; DAY([.B106]) &amp; &quot;', '&quot; &amp; [.C106] &amp; &quot;', '&quot; &amp; [.D106] &amp; &quot;', '&quot; &amp; [.E106] &amp; &quot;', '&quot; &amp; [.F106] &amp; &quot;'],&quot;" office:value-type="string" office:string-value="['Detroit - Become Human', '2021-3-14', '1:01', 'Lyle, Tomar', '1Y4HS-ugVBg', '']," calcext:value-type="string">
            <text:p>['Detroit - Become Human', '2021-3-14', '1:01', 'Lyle, Tomar', '1Y4HS-ugVBg', ''],</text:p>
          </table:table-cell>
        </table:table-row>
        <table:table-row table:style-name="ro1">
          <table:table-cell office:value-type="string" calcext:value-type="string">
            <text:p>Devil May Cry 5</text:p>
          </table:table-cell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1:13</text:p>
          </table:table-cell>
          <table:table-cell office:value-type="string" calcext:value-type="string">
            <text:p>Cory, Dave, Jeff</text:p>
          </table:table-cell>
          <table:table-cell office:value-type="string" calcext:value-type="string">
            <text:p>7QcsKIWEMfQ</text:p>
          </table:table-cell>
          <table:table-cell office:value-type="string" calcext:value-type="string">
            <text:p>tlXEOxLN77c</text:p>
          </table:table-cell>
          <table:table-cell table:formula="of:=&quot;['&quot; &amp; [.A107] &amp; &quot;', '&quot; &amp; YEAR([.B107]) &amp; &quot;-&quot; &amp; MONTH([.B107]) &amp; &quot;-&quot; &amp; DAY([.B107]) &amp; &quot;', '&quot; &amp; [.C107] &amp; &quot;', '&quot; &amp; [.D107] &amp; &quot;', '&quot; &amp; [.E107] &amp; &quot;', '&quot; &amp; [.F107] &amp; &quot;'],&quot;" office:value-type="string" office:string-value="['Devil May Cry 5', '2019-9-5', '1:13', 'Cory, Dave, Jeff', '7QcsKIWEMfQ', 'tlXEOxLN77c']," calcext:value-type="string">
            <text:p>['Devil May Cry 5', '2019-9-5', '1:13', 'Cory, Dave, Jeff', '7QcsKIWEMfQ', 'tlXEOxLN77c'],</text:p>
          </table:table-cell>
        </table:table-row>
        <table:table-row table:style-name="ro1">
          <table:table-cell office:value-type="string" calcext:value-type="string">
            <text:p>Devotion</text:p>
          </table:table-cell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1:1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WgnPlJWDyTY</text:p>
          </table:table-cell>
          <table:table-cell/>
          <table:table-cell table:formula="of:=&quot;['&quot; &amp; [.A108] &amp; &quot;', '&quot; &amp; YEAR([.B108]) &amp; &quot;-&quot; &amp; MONTH([.B108]) &amp; &quot;-&quot; &amp; DAY([.B108]) &amp; &quot;', '&quot; &amp; [.C108] &amp; &quot;', '&quot; &amp; [.D108] &amp; &quot;', '&quot; &amp; [.E108] &amp; &quot;', '&quot; &amp; [.F108] &amp; &quot;'],&quot;" office:value-type="string" office:string-value="['Devotion', '2019-10-19', '1:13', 'Zach, Tomar', 'WgnPlJWDyTY', '']," calcext:value-type="string">
            <text:p>['Devotion', '2019-10-19', '1:13', 'Zach, Tomar', 'WgnPlJWDyTY', ''],</text:p>
          </table:table-cell>
        </table:table-row>
        <table:table-row table:style-name="ro1">
          <table:table-cell office:value-type="string" calcext:value-type="string">
            <text:p>Digimon Rury - Ep 1</text:p>
          </table:table-cell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4zXI0ZnVQwM</text:p>
          </table:table-cell>
          <table:table-cell/>
          <table:table-cell table:formula="of:=&quot;['&quot; &amp; [.A109] &amp; &quot;', '&quot; &amp; YEAR([.B109]) &amp; &quot;-&quot; &amp; MONTH([.B109]) &amp; &quot;-&quot; &amp; DAY([.B109]) &amp; &quot;', '&quot; &amp; [.C109] &amp; &quot;', '&quot; &amp; [.D109] &amp; &quot;', '&quot; &amp; [.E109] &amp; &quot;', '&quot; &amp; [.F109] &amp; &quot;'],&quot;" office:value-type="string" office:string-value="['Digimon Rury - Ep 1', '2017-7-25', '0:10', 'Dingdong, Julian', '4zXI0ZnVQwM', '']," calcext:value-type="string">
            <text:p>['Digimon Rury - Ep 1', '2017-7-25', '0:10', 'Dingdong, Julian', '4zXI0ZnVQwM', ''],</text:p>
          </table:table-cell>
        </table:table-row>
        <table:table-row table:style-name="ro1">
          <table:table-cell office:value-type="string" calcext:value-type="string">
            <text:p>Digimon Rury - Ep 2</text:p>
          </table:table-cell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841c_f_1dCE</text:p>
          </table:table-cell>
          <table:table-cell/>
          <table:table-cell table:formula="of:=&quot;['&quot; &amp; [.A110] &amp; &quot;', '&quot; &amp; YEAR([.B110]) &amp; &quot;-&quot; &amp; MONTH([.B110]) &amp; &quot;-&quot; &amp; DAY([.B110]) &amp; &quot;', '&quot; &amp; [.C110] &amp; &quot;', '&quot; &amp; [.D110] &amp; &quot;', '&quot; &amp; [.E110] &amp; &quot;', '&quot; &amp; [.F110] &amp; &quot;'],&quot;" office:value-type="string" office:string-value="['Digimon Rury - Ep 2', '2017-7-26', '0:11', 'Dingdong, Julian', '841c_f_1dCE', '']," calcext:value-type="string">
            <text:p>['Digimon Rury - Ep 2', '2017-7-26', '0:11', 'Dingdong, Julian', '841c_f_1dCE', ''],</text:p>
          </table:table-cell>
        </table:table-row>
        <table:table-row table:style-name="ro1">
          <table:table-cell office:value-type="string" calcext:value-type="string">
            <text:p>Digimon Story - Cyber Sleuth</text:p>
          </table:table-cell>
          <table:table-cell office:value-type="date" office:date-value="2021-04-01" calcext:value-type="date">
            <text:p>2021-04-01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R--Nz8rkGe8</text:p>
          </table:table-cell>
          <table:table-cell/>
          <table:table-cell table:formula="of:=&quot;['&quot; &amp; [.A111] &amp; &quot;', '&quot; &amp; YEAR([.B111]) &amp; &quot;-&quot; &amp; MONTH([.B111]) &amp; &quot;-&quot; &amp; DAY([.B111]) &amp; &quot;', '&quot; &amp; [.C111] &amp; &quot;', '&quot; &amp; [.D111] &amp; &quot;', '&quot; &amp; [.E111] &amp; &quot;', '&quot; &amp; [.F111] &amp; &quot;'],&quot;" office:value-type="string" office:string-value="['Digimon Story - Cyber Sleuth', '2021-4-1', '5:20', 'Dingdong, Julian', 'R--Nz8rkGe8', '']," calcext:value-type="string">
            <text:p>['Digimon Story - Cyber Sleuth', '2021-4-1', '5:20', 'Dingdong, Julian', 'R--Nz8rkGe8', ''],</text:p>
          </table:table-cell>
        </table:table-row>
        <table:table-row table:style-name="ro1">
          <table:table-cell office:value-type="string" calcext:value-type="string">
            <text:p>Dinosaur Planet (Star Fox Adventures)</text:p>
          </table:table-cell>
          <table:table-cell office:value-type="date" office:date-value="2021-03-04" calcext:value-type="date">
            <text:p>2021-03-04</text:p>
          </table:table-cell>
          <table:table-cell office:value-type="string" calcext:value-type="string">
            <text:p>0:2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u0ouH5dLbc</text:p>
          </table:table-cell>
          <table:table-cell/>
          <table:table-cell table:formula="of:=&quot;['&quot; &amp; [.A112] &amp; &quot;', '&quot; &amp; YEAR([.B112]) &amp; &quot;-&quot; &amp; MONTH([.B112]) &amp; &quot;-&quot; &amp; DAY([.B112]) &amp; &quot;', '&quot; &amp; [.C112] &amp; &quot;', '&quot; &amp; [.D112] &amp; &quot;', '&quot; &amp; [.E112] &amp; &quot;', '&quot; &amp; [.F112] &amp; &quot;'],&quot;" office:value-type="string" office:string-value="['Dinosaur Planet (Star Fox Adventures)', '2021-3-4', '0:27', 'Lyle, Tomar', 'Tu0ouH5dLbc', '']," calcext:value-type="string">
            <text:p>['Dinosaur Planet (Star Fox Adventures)', '2021-3-4', '0:27', 'Lyle, Tomar', 'Tu0ouH5dLbc', ''],</text:p>
          </table:table-cell>
        </table:table-row>
        <table:table-row table:style-name="ro1">
          <table:table-cell office:value-type="string" calcext:value-type="string">
            <text:p>Disney Skate Adventure</text:p>
          </table:table-cell>
          <table:table-cell office:value-type="date" office:date-value="2016-07-30" calcext:value-type="date">
            <text:p>2016-07-30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e5EPFVu-Js</text:p>
          </table:table-cell>
          <table:table-cell/>
          <table:table-cell table:formula="of:=&quot;['&quot; &amp; [.A113] &amp; &quot;', '&quot; &amp; YEAR([.B113]) &amp; &quot;-&quot; &amp; MONTH([.B113]) &amp; &quot;-&quot; &amp; DAY([.B113]) &amp; &quot;', '&quot; &amp; [.C113] &amp; &quot;', '&quot; &amp; [.D113] &amp; &quot;', '&quot; &amp; [.E113] &amp; &quot;', '&quot; &amp; [.F113] &amp; &quot;'],&quot;" office:value-type="string" office:string-value="['Disney Skate Adventure', '2016-7-30', '0:11', 'Matt', 'Be5EPFVu-Js', '']," calcext:value-type="string">
            <text:p>['Disney Skate Adventure', '2016-7-30', '0:11', 'Matt', 'Be5EPFVu-Js', ''],</text:p>
          </table:table-cell>
        </table:table-row>
        <table:table-row table:style-name="ro1">
          <table:table-cell office:value-type="string" calcext:value-type="string">
            <text:p>Dmc - Devil May Cry</text:p>
          </table:table-cell>
          <table:table-cell office:value-type="date" office:date-value="2019-06-12" calcext:value-type="date">
            <text:p>2019-06-12</text:p>
          </table:table-cell>
          <table:table-cell office:value-type="string" calcext:value-type="string">
            <text:p>4:4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AMEojsn_fY</text:p>
          </table:table-cell>
          <table:table-cell/>
          <table:table-cell table:formula="of:=&quot;['&quot; &amp; [.A114] &amp; &quot;', '&quot; &amp; YEAR([.B114]) &amp; &quot;-&quot; &amp; MONTH([.B114]) &amp; &quot;-&quot; &amp; DAY([.B114]) &amp; &quot;', '&quot; &amp; [.C114] &amp; &quot;', '&quot; &amp; [.D114] &amp; &quot;', '&quot; &amp; [.E114] &amp; &quot;', '&quot; &amp; [.F114] &amp; &quot;'],&quot;" office:value-type="string" office:string-value="['Dmc - Devil May Cry', '2019-6-12', '4:42', 'Lyle, Tomar', 'XAMEojsn_fY', '']," calcext:value-type="string">
            <text:p>['Dmc - Devil May Cry', '2019-6-12', '4:42', 'Lyle, Tomar', 'XAMEojsn_fY', ''],</text:p>
          </table:table-cell>
        </table:table-row>
        <table:table-row table:style-name="ro1">
          <table:table-cell office:value-type="string" calcext:value-type="string">
            <text:p>Don't Starve</text:p>
          </table:table-cell>
          <table:table-cell office:value-type="date" office:date-value="2016-09-18" calcext:value-type="date">
            <text:p>2016-09-18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Cory, Dingdong</text:p>
          </table:table-cell>
          <table:table-cell office:value-type="string" calcext:value-type="string">
            <text:p>Pyk28M_PZNw</text:p>
          </table:table-cell>
          <table:table-cell office:value-type="string" calcext:value-type="string">
            <text:p>xbzBbZZYL-w</text:p>
          </table:table-cell>
          <table:table-cell table:formula="of:=&quot;['&quot; &amp; [.A115] &amp; &quot;', '&quot; &amp; YEAR([.B115]) &amp; &quot;-&quot; &amp; MONTH([.B115]) &amp; &quot;-&quot; &amp; DAY([.B115]) &amp; &quot;', '&quot; &amp; [.C115] &amp; &quot;', '&quot; &amp; [.D115] &amp; &quot;', '&quot; &amp; [.E115] &amp; &quot;', '&quot; &amp; [.F115] &amp; &quot;'],&quot;" office:value-type="string" office:string-value="['Don't Starve', '2016-9-18', '0:43', 'Cory, Dingdong', 'Pyk28M_PZNw', 'xbzBbZZYL-w']," calcext:value-type="string">
            <text:p>['Don't Starve', '2016-9-18', '0:43', 'Cory, Dingdong', 'Pyk28M_PZNw', 'xbzBbZZYL-w'],</text:p>
          </table:table-cell>
        </table:table-row>
        <table:table-row table:style-name="ro1">
          <table:table-cell office:value-type="string" calcext:value-type="string">
            <text:p>Donkey Kong 5 [Bootleg Game]</text:p>
          </table:table-cell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1CYzkg3SkC0</text:p>
          </table:table-cell>
          <table:table-cell/>
          <table:table-cell table:formula="of:=&quot;['&quot; &amp; [.A116] &amp; &quot;', '&quot; &amp; YEAR([.B116]) &amp; &quot;-&quot; &amp; MONTH([.B116]) &amp; &quot;-&quot; &amp; DAY([.B116]) &amp; &quot;', '&quot; &amp; [.C116] &amp; &quot;', '&quot; &amp; [.D116] &amp; &quot;', '&quot; &amp; [.E116] &amp; &quot;', '&quot; &amp; [.F116] &amp; &quot;'],&quot;" office:value-type="string" office:string-value="['Donkey Kong 5 [Bootleg Game]', '2017-9-29', '0:25', 'Dingdong, Julian', '1CYzkg3SkC0', '']," calcext:value-type="string">
            <text:p>['Donkey Kong 5 [Bootleg Game]', '2017-9-29', '0:25', 'Dingdong, Julian', '1CYzkg3SkC0', ''],</text:p>
          </table:table-cell>
        </table:table-row>
        <table:table-row table:style-name="ro1">
          <table:table-cell office:value-type="string" calcext:value-type="string">
            <text:p>Donkey Kong 64</text:p>
          </table:table-cell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0:29</text:p>
          </table:table-cell>
          <table:table-cell office:value-type="string" calcext:value-type="string">
            <text:p>Zach, Adam P, Tomar</text:p>
          </table:table-cell>
          <table:table-cell office:value-type="string" calcext:value-type="string">
            <text:p>lOHmutS9vlY</text:p>
          </table:table-cell>
          <table:table-cell/>
          <table:table-cell table:formula="of:=&quot;['&quot; &amp; [.A117] &amp; &quot;', '&quot; &amp; YEAR([.B117]) &amp; &quot;-&quot; &amp; MONTH([.B117]) &amp; &quot;-&quot; &amp; DAY([.B117]) &amp; &quot;', '&quot; &amp; [.C117] &amp; &quot;', '&quot; &amp; [.D117] &amp; &quot;', '&quot; &amp; [.E117] &amp; &quot;', '&quot; &amp; [.F117] &amp; &quot;'],&quot;" office:value-type="string" office:string-value="['Donkey Kong 64', '2022-12-9', '0:29', 'Zach, Adam P, Tomar', 'lOHmutS9vlY', '']," calcext:value-type="string">
            <text:p>['Donkey Kong 64', '2022-12-9', '0:29', 'Zach, Adam P, Tomar', 'lOHmutS9vlY', ''],</text:p>
          </table:table-cell>
        </table:table-row>
        <table:table-row table:style-name="ro1">
          <table:table-cell office:value-type="string" calcext:value-type="string">
            <text:p>Donkey Kong Bananza</text:p>
          </table:table-cell>
          <table:table-cell office:value-type="date" office:date-value="2025-07-28" calcext:value-type="date">
            <text:p>2025-07-28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Lyle, Niall</text:p>
          </table:table-cell>
          <table:table-cell office:value-type="string" calcext:value-type="string">
            <text:p>KW5IiH-zu14</text:p>
          </table:table-cell>
          <table:table-cell/>
          <table:table-cell table:formula="of:=&quot;['&quot; &amp; [.A118] &amp; &quot;', '&quot; &amp; YEAR([.B118]) &amp; &quot;-&quot; &amp; MONTH([.B118]) &amp; &quot;-&quot; &amp; DAY([.B118]) &amp; &quot;', '&quot; &amp; [.C118] &amp; &quot;', '&quot; &amp; [.D118] &amp; &quot;', '&quot; &amp; [.E118] &amp; &quot;', '&quot; &amp; [.F118] &amp; &quot;'],&quot;" office:value-type="string" office:string-value="['Donkey Kong Bananza', '2025-7-28', '2:32', 'Lyle, Niall', 'KW5IiH-zu14', '']," calcext:value-type="string">
            <text:p>['Donkey Kong Bananza', '2025-7-28', '2:32', 'Lyle, Niall', 'KW5IiH-zu14', ''],</text:p>
          </table:table-cell>
        </table:table-row>
        <table:table-row table:style-name="ro1">
          <table:table-cell office:value-type="string" calcext:value-type="string">
            <text:p>Donkey Kong Country</text:p>
          </table:table-cell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1:03</text:p>
          </table:table-cell>
          <table:table-cell office:value-type="string" calcext:value-type="string">
            <text:p>Zach, Dave</text:p>
          </table:table-cell>
          <table:table-cell office:value-type="string" calcext:value-type="string">
            <text:p>EsR0qHCZ6ps</text:p>
          </table:table-cell>
          <table:table-cell/>
          <table:table-cell table:formula="of:=&quot;['&quot; &amp; [.A119] &amp; &quot;', '&quot; &amp; YEAR([.B119]) &amp; &quot;-&quot; &amp; MONTH([.B119]) &amp; &quot;-&quot; &amp; DAY([.B119]) &amp; &quot;', '&quot; &amp; [.C119] &amp; &quot;', '&quot; &amp; [.D119] &amp; &quot;', '&quot; &amp; [.E119] &amp; &quot;', '&quot; &amp; [.F119] &amp; &quot;'],&quot;" office:value-type="string" office:string-value="['Donkey Kong Country', '2022-9-2', '1:03', 'Zach, Dave', 'EsR0qHCZ6ps', '']," calcext:value-type="string">
            <text:p>['Donkey Kong Country', '2022-9-2', '1:03', 'Zach, Dave', 'EsR0qHCZ6ps', ''],</text:p>
          </table:table-cell>
        </table:table-row>
        <table:table-row table:style-name="ro1">
          <table:table-cell office:value-type="string" calcext:value-type="string">
            <text:p>Donkey Kong Country 2 (2017)</text:p>
          </table:table-cell>
          <table:table-cell office:value-type="date" office:date-value="2017-03-16" calcext:value-type="date">
            <text:p>2017-03-16</text:p>
          </table:table-cell>
          <table:table-cell office:value-type="string" calcext:value-type="string">
            <text:p>0:3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l_tv--2shw</text:p>
          </table:table-cell>
          <table:table-cell/>
          <table:table-cell table:formula="of:=&quot;['&quot; &amp; [.A120] &amp; &quot;', '&quot; &amp; YEAR([.B120]) &amp; &quot;-&quot; &amp; MONTH([.B120]) &amp; &quot;-&quot; &amp; DAY([.B120]) &amp; &quot;', '&quot; &amp; [.C120] &amp; &quot;', '&quot; &amp; [.D120] &amp; &quot;', '&quot; &amp; [.E120] &amp; &quot;', '&quot; &amp; [.F120] &amp; &quot;'],&quot;" office:value-type="string" office:string-value="['Donkey Kong Country 2 (2017)', '2017-3-16', '0:32', 'Dingdong, Julian', 'Dl_tv--2shw', '']," calcext:value-type="string">
            <text:p>['Donkey Kong Country 2 (2017)', '2017-3-16', '0:32', 'Dingdong, Julian', 'Dl_tv--2shw', ''],</text:p>
          </table:table-cell>
        </table:table-row>
        <table:table-row table:style-name="ro1">
          <table:table-cell office:value-type="string" calcext:value-type="string">
            <text:p>Donkey Kong Country 2 (2018)</text:p>
          </table:table-cell>
          <table:table-cell office:value-type="date" office:date-value="2018-09-17" calcext:value-type="date">
            <text:p>2018-09-17</text:p>
          </table:table-cell>
          <table:table-cell office:value-type="string" calcext:value-type="string">
            <text:p>1:46</text:p>
          </table:table-cell>
          <table:table-cell office:value-type="string" calcext:value-type="string">
            <text:p>Zach, Tomar, Veronica</text:p>
          </table:table-cell>
          <table:table-cell office:value-type="string" calcext:value-type="string">
            <text:p>3HnJoobC0j4</text:p>
          </table:table-cell>
          <table:table-cell/>
          <table:table-cell table:formula="of:=&quot;['&quot; &amp; [.A121] &amp; &quot;', '&quot; &amp; YEAR([.B121]) &amp; &quot;-&quot; &amp; MONTH([.B121]) &amp; &quot;-&quot; &amp; DAY([.B121]) &amp; &quot;', '&quot; &amp; [.C121] &amp; &quot;', '&quot; &amp; [.D121] &amp; &quot;', '&quot; &amp; [.E121] &amp; &quot;', '&quot; &amp; [.F121] &amp; &quot;'],&quot;" office:value-type="string" office:string-value="['Donkey Kong Country 2 (2018)', '2018-9-17', '1:46', 'Zach, Tomar, Veronica', '3HnJoobC0j4', '']," calcext:value-type="string">
            <text:p>['Donkey Kong Country 2 (2018)', '2018-9-17', '1:46', 'Zach, Tomar, Veronica', '3HnJoobC0j4', ''],</text:p>
          </table:table-cell>
        </table:table-row>
        <table:table-row table:style-name="ro1">
          <table:table-cell office:value-type="string" calcext:value-type="string">
            <text:p>Donkey Kong Country 3</text:p>
          </table:table-cell>
          <table:table-cell office:value-type="date" office:date-value="2021-11-23" calcext:value-type="date">
            <text:p>2021-11-23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Kirbopher, Tomar</text:p>
          </table:table-cell>
          <table:table-cell office:value-type="string" calcext:value-type="string">
            <text:p>3I8ARVJRd7Y</text:p>
          </table:table-cell>
          <table:table-cell/>
          <table:table-cell table:formula="of:=&quot;['&quot; &amp; [.A122] &amp; &quot;', '&quot; &amp; YEAR([.B122]) &amp; &quot;-&quot; &amp; MONTH([.B122]) &amp; &quot;-&quot; &amp; DAY([.B122]) &amp; &quot;', '&quot; &amp; [.C122] &amp; &quot;', '&quot; &amp; [.D122] &amp; &quot;', '&quot; &amp; [.E122] &amp; &quot;', '&quot; &amp; [.F122] &amp; &quot;'],&quot;" office:value-type="string" office:string-value="['Donkey Kong Country 3', '2021-11-23', '0:23', 'Kirbopher, Tomar', '3I8ARVJRd7Y', '']," calcext:value-type="string">
            <text:p>['Donkey Kong Country 3', '2021-11-23', '0:23', 'Kirbopher, Tomar', '3I8ARVJRd7Y', ''],</text:p>
          </table:table-cell>
        </table:table-row>
        <table:table-row table:style-name="ro1">
          <table:table-cell office:value-type="string" calcext:value-type="string">
            <text:p>DOS Games (2018)</text:p>
          </table:table-cell>
          <table:table-cell office:value-type="date" office:date-value="2018-05-09" calcext:value-type="date">
            <text:p>2018-05-09</text:p>
          </table:table-cell>
          <table:table-cell office:value-type="string" calcext:value-type="string">
            <text:p>0:18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ny8ep8zFEm0</text:p>
          </table:table-cell>
          <table:table-cell/>
          <table:table-cell table:formula="of:=&quot;['&quot; &amp; [.A123] &amp; &quot;', '&quot; &amp; YEAR([.B123]) &amp; &quot;-&quot; &amp; MONTH([.B123]) &amp; &quot;-&quot; &amp; DAY([.B123]) &amp; &quot;', '&quot; &amp; [.C123] &amp; &quot;', '&quot; &amp; [.D123] &amp; &quot;', '&quot; &amp; [.E123] &amp; &quot;', '&quot; &amp; [.F123] &amp; &quot;'],&quot;" office:value-type="string" office:string-value="['DOS Games (2018)', '2018-5-9', '0:18', 'Dingdong, Julian', 'ny8ep8zFEm0', '']," calcext:value-type="string">
            <text:p>['DOS Games (2018)', '2018-5-9', '0:18', 'Dingdong, Julian', 'ny8ep8zFEm0', ''],</text:p>
          </table:table-cell>
        </table:table-row>
        <table:table-row table:style-name="ro1">
          <table:table-cell office:value-type="string" calcext:value-type="string">
            <text:p>DOS Games (2021)</text:p>
          </table:table-cell>
          <table:table-cell office:value-type="date" office:date-value="2021-11-09" calcext:value-type="date">
            <text:p>2021-11-09</text:p>
          </table:table-cell>
          <table:table-cell office:value-type="string" calcext:value-type="string">
            <text:p>0:27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Ss3KI_7RXf0</text:p>
          </table:table-cell>
          <table:table-cell/>
          <table:table-cell table:formula="of:=&quot;['&quot; &amp; [.A124] &amp; &quot;', '&quot; &amp; YEAR([.B124]) &amp; &quot;-&quot; &amp; MONTH([.B124]) &amp; &quot;-&quot; &amp; DAY([.B124]) &amp; &quot;', '&quot; &amp; [.C124] &amp; &quot;', '&quot; &amp; [.D124] &amp; &quot;', '&quot; &amp; [.E124] &amp; &quot;', '&quot; &amp; [.F124] &amp; &quot;'],&quot;" office:value-type="string" office:string-value="['DOS Games (2021)', '2021-11-9', '0:27', 'Adam, Tomar', 'Ss3KI_7RXf0', '']," calcext:value-type="string">
            <text:p>['DOS Games (2021)', '2021-11-9', '0:27', 'Adam, Tomar', 'Ss3KI_7RXf0', ''],</text:p>
          </table:table-cell>
        </table:table-row>
        <table:table-row table:style-name="ro1">
          <table:table-cell office:value-type="string" calcext:value-type="string">
            <text:p>DOS Games (2022)</text:p>
          </table:table-cell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1:25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ROH4bw4aOgM</text:p>
          </table:table-cell>
          <table:table-cell/>
          <table:table-cell table:formula="of:=&quot;['&quot; &amp; [.A125] &amp; &quot;', '&quot; &amp; YEAR([.B125]) &amp; &quot;-&quot; &amp; MONTH([.B125]) &amp; &quot;-&quot; &amp; DAY([.B125]) &amp; &quot;', '&quot; &amp; [.C125] &amp; &quot;', '&quot; &amp; [.D125] &amp; &quot;', '&quot; &amp; [.E125] &amp; &quot;', '&quot; &amp; [.F125] &amp; &quot;'],&quot;" office:value-type="string" office:string-value="['DOS Games (2022)', '2022-6-8', '1:25', 'Zach, Cory, Tomar', 'ROH4bw4aOgM', '']," calcext:value-type="string">
            <text:p>['DOS Games (2022)', '2022-6-8', '1:25', 'Zach, Cory, Tomar', 'ROH4bw4aOgM', ''],</text:p>
          </table:table-cell>
        </table:table-row>
        <table:table-row table:style-name="ro1">
          <table:table-cell office:value-type="string" calcext:value-type="string">
            <text:p>Downwell</text:p>
          </table:table-cell>
          <table:table-cell office:value-type="date" office:date-value="2024-06-11" calcext:value-type="date">
            <text:p>2024-06-11</text:p>
          </table:table-cell>
          <table:table-cell office:value-type="string" calcext:value-type="string">
            <text:p>1:11</text:p>
          </table:table-cell>
          <table:table-cell office:value-type="string" calcext:value-type="string">
            <text:p>Niall, Adam, Tomar</text:p>
          </table:table-cell>
          <table:table-cell office:value-type="string" calcext:value-type="string">
            <text:p>AHej1_dk01A</text:p>
          </table:table-cell>
          <table:table-cell/>
          <table:table-cell table:formula="of:=&quot;['&quot; &amp; [.A126] &amp; &quot;', '&quot; &amp; YEAR([.B126]) &amp; &quot;-&quot; &amp; MONTH([.B126]) &amp; &quot;-&quot; &amp; DAY([.B126]) &amp; &quot;', '&quot; &amp; [.C126] &amp; &quot;', '&quot; &amp; [.D126] &amp; &quot;', '&quot; &amp; [.E126] &amp; &quot;', '&quot; &amp; [.F126] &amp; &quot;'],&quot;" office:value-type="string" office:string-value="['Downwell', '2024-6-11', '1:11', 'Niall, Adam, Tomar', 'AHej1_dk01A', '']," calcext:value-type="string">
            <text:p>['Downwell', '2024-6-11', '1:11', 'Niall, Adam, Tomar', 'AHej1_dk01A', ''],</text:p>
          </table:table-cell>
        </table:table-row>
        <table:table-row table:style-name="ro1">
          <table:table-cell office:value-type="string" calcext:value-type="string">
            <text:p>Dragons Dogma - Dark Arisen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2:03</text:p>
          </table:table-cell>
          <table:table-cell office:value-type="string" calcext:value-type="string">
            <text:p>Cory, Jeff, Dave</text:p>
          </table:table-cell>
          <table:table-cell office:value-type="string" calcext:value-type="string">
            <text:p>kpWhUbENWEY</text:p>
          </table:table-cell>
          <table:table-cell/>
          <table:table-cell table:formula="of:=&quot;['&quot; &amp; [.A127] &amp; &quot;', '&quot; &amp; YEAR([.B127]) &amp; &quot;-&quot; &amp; MONTH([.B127]) &amp; &quot;-&quot; &amp; DAY([.B127]) &amp; &quot;', '&quot; &amp; [.C127] &amp; &quot;', '&quot; &amp; [.D127] &amp; &quot;', '&quot; &amp; [.E127] &amp; &quot;', '&quot; &amp; [.F127] &amp; &quot;'],&quot;" office:value-type="string" office:string-value="['Dragons Dogma - Dark Arisen', '2019-8-16', '2:03', 'Cory, Jeff, Dave', 'kpWhUbENWEY', '']," calcext:value-type="string">
            <text:p>['Dragons Dogma - Dark Arisen', '2019-8-16', '2:03', 'Cory, Jeff, Dave', 'kpWhUbENWEY', ''],</text:p>
          </table:table-cell>
        </table:table-row>
        <table:table-row table:style-name="ro1">
          <table:table-cell office:value-type="string" calcext:value-type="string">
            <text:p>Dream Emulator</text:p>
          </table:table-cell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0:5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cP8V9yAsyNk</text:p>
          </table:table-cell>
          <table:table-cell/>
          <table:table-cell table:formula="of:=&quot;['&quot; &amp; [.A128] &amp; &quot;', '&quot; &amp; YEAR([.B128]) &amp; &quot;-&quot; &amp; MONTH([.B128]) &amp; &quot;-&quot; &amp; DAY([.B128]) &amp; &quot;', '&quot; &amp; [.C128] &amp; &quot;', '&quot; &amp; [.D128] &amp; &quot;', '&quot; &amp; [.E128] &amp; &quot;', '&quot; &amp; [.F128] &amp; &quot;'],&quot;" office:value-type="string" office:string-value="['Dream Emulator', '2019-10-24', '0:59', 'Cory, Dave', 'cP8V9yAsyNk', '']," calcext:value-type="string">
            <text:p>['Dream Emulator', '2019-10-24', '0:59', 'Cory, Dave', 'cP8V9yAsyNk', ''],</text:p>
          </table:table-cell>
        </table:table-row>
        <table:table-row table:style-name="ro1">
          <table:table-cell office:value-type="string" calcext:value-type="string">
            <text:p>Dredge</text:p>
          </table:table-cell>
          <table:table-cell office:value-type="date" office:date-value="2023-05-11" calcext:value-type="date">
            <text:p>2023-05-11</text:p>
          </table:table-cell>
          <table:table-cell office:value-type="string" calcext:value-type="string">
            <text:p>0:3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e-lA0ge4DHk</text:p>
          </table:table-cell>
          <table:table-cell/>
          <table:table-cell table:formula="of:=&quot;['&quot; &amp; [.A129] &amp; &quot;', '&quot; &amp; YEAR([.B129]) &amp; &quot;-&quot; &amp; MONTH([.B129]) &amp; &quot;-&quot; &amp; DAY([.B129]) &amp; &quot;', '&quot; &amp; [.C129] &amp; &quot;', '&quot; &amp; [.D129] &amp; &quot;', '&quot; &amp; [.E129] &amp; &quot;', '&quot; &amp; [.F129] &amp; &quot;'],&quot;" office:value-type="string" office:string-value="['Dredge', '2023-5-11', '0:35', 'Lyle, Tomar', 'e-lA0ge4DHk', '']," calcext:value-type="string">
            <text:p>['Dredge', '2023-5-11', '0:35', 'Lyle, Tomar', 'e-lA0ge4DHk', ''],</text:p>
          </table:table-cell>
        </table:table-row>
        <table:table-row table:style-name="ro1">
          <table:table-cell office:value-type="string" calcext:value-type="string">
            <text:p>Dying Light</text:p>
          </table:table-cell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0:42</text:p>
          </table:table-cell>
          <table:table-cell office:value-type="string" calcext:value-type="string">
            <text:p>Adam, Ben?</text:p>
          </table:table-cell>
          <table:table-cell office:value-type="string" calcext:value-type="string">
            <text:p>Yj0fa3-RwlE</text:p>
          </table:table-cell>
          <table:table-cell/>
          <table:table-cell table:formula="of:=&quot;['&quot; &amp; [.A130] &amp; &quot;', '&quot; &amp; YEAR([.B130]) &amp; &quot;-&quot; &amp; MONTH([.B130]) &amp; &quot;-&quot; &amp; DAY([.B130]) &amp; &quot;', '&quot; &amp; [.C130] &amp; &quot;', '&quot; &amp; [.D130] &amp; &quot;', '&quot; &amp; [.E130] &amp; &quot;', '&quot; &amp; [.F130] &amp; &quot;'],&quot;" office:value-type="string" office:string-value="['Dying Light', '2021-10-31', '0:42', 'Adam, Ben?', 'Yj0fa3-RwlE', '']," calcext:value-type="string">
            <text:p>['Dying Light', '2021-10-31', '0:42', 'Adam, Ben?', 'Yj0fa3-RwlE', ''],</text:p>
          </table:table-cell>
        </table:table-row>
        <table:table-row table:style-name="ro1">
          <table:table-cell office:value-type="string" calcext:value-type="string">
            <text:p>Earthworm Jim 2</text:p>
          </table:table-cell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1:07</text:p>
          </table:table-cell>
          <table:table-cell office:value-type="string" calcext:value-type="string">
            <text:p>Dingdong, Julian, Amin, Cousin Bunkus</text:p>
          </table:table-cell>
          <table:table-cell office:value-type="string" calcext:value-type="string">
            <text:p>4VvPs9kEHRE</text:p>
          </table:table-cell>
          <table:table-cell/>
          <table:table-cell table:formula="of:=&quot;['&quot; &amp; [.A131] &amp; &quot;', '&quot; &amp; YEAR([.B131]) &amp; &quot;-&quot; &amp; MONTH([.B131]) &amp; &quot;-&quot; &amp; DAY([.B131]) &amp; &quot;', '&quot; &amp; [.C131] &amp; &quot;', '&quot; &amp; [.D131] &amp; &quot;', '&quot; &amp; [.E131] &amp; &quot;', '&quot; &amp; [.F131] &amp; &quot;'],&quot;" office:value-type="string" office:string-value="['Earthworm Jim 2', '2017-10-5', '1:07', 'Dingdong, Julian, Amin, Cousin Bunkus', '4VvPs9kEHRE', '']," calcext:value-type="string">
            <text:p>['Earthworm Jim 2', '2017-10-5', '1:07', 'Dingdong, Julian, Amin, Cousin Bunkus', '4VvPs9kEHRE', ''],</text:p>
          </table:table-cell>
        </table:table-row>
        <table:table-row table:style-name="ro1">
          <table:table-cell office:value-type="string" calcext:value-type="string">
            <text:p>Ebola Game</text:p>
          </table:table-cell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Dw2C9Wwh-sU</text:p>
          </table:table-cell>
          <table:table-cell/>
          <table:table-cell table:formula="of:=&quot;['&quot; &amp; [.A132] &amp; &quot;', '&quot; &amp; YEAR([.B132]) &amp; &quot;-&quot; &amp; MONTH([.B132]) &amp; &quot;-&quot; &amp; DAY([.B132]) &amp; &quot;', '&quot; &amp; [.C132] &amp; &quot;', '&quot; &amp; [.D132] &amp; &quot;', '&quot; &amp; [.E132] &amp; &quot;', '&quot; &amp; [.F132] &amp; &quot;'],&quot;" office:value-type="string" office:string-value="['Ebola Game', '2019-7-19', '0:21', 'Lyle, Tomar', 'Dw2C9Wwh-sU', '']," calcext:value-type="string">
            <text:p>['Ebola Game', '2019-7-19', '0:21', 'Lyle, Tomar', 'Dw2C9Wwh-sU', ''],</text:p>
          </table:table-cell>
        </table:table-row>
        <table:table-row table:style-name="ro1">
          <table:table-cell office:value-type="string" calcext:value-type="string">
            <text:p>Ecstatic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0:47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suF90IzF0uU</text:p>
          </table:table-cell>
          <table:table-cell/>
          <table:table-cell table:formula="of:=&quot;['&quot; &amp; [.A133] &amp; &quot;', '&quot; &amp; YEAR([.B133]) &amp; &quot;-&quot; &amp; MONTH([.B133]) &amp; &quot;-&quot; &amp; DAY([.B133]) &amp; &quot;', '&quot; &amp; [.C133] &amp; &quot;', '&quot; &amp; [.D133] &amp; &quot;', '&quot; &amp; [.E133] &amp; &quot;', '&quot; &amp; [.F133] &amp; &quot;'],&quot;" office:value-type="string" office:string-value="['Ecstatica', '2023-10-31', '0:47', 'Cory, Tomar', 'suF90IzF0uU', '']," calcext:value-type="string">
            <text:p>['Ecstatica', '2023-10-31', '0:47', 'Cory, Tomar', 'suF90IzF0uU', ''],</text:p>
          </table:table-cell>
        </table:table-row>
        <table:table-row table:style-name="ro1">
          <table:table-cell office:value-type="string" calcext:value-type="string">
            <text:p>Elden Ring (2022)</text:p>
          </table:table-cell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1:3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egfOKxBC4qU</text:p>
          </table:table-cell>
          <table:table-cell/>
          <table:table-cell table:formula="of:=&quot;['&quot; &amp; [.A134] &amp; &quot;', '&quot; &amp; YEAR([.B134]) &amp; &quot;-&quot; &amp; MONTH([.B134]) &amp; &quot;-&quot; &amp; DAY([.B134]) &amp; &quot;', '&quot; &amp; [.C134] &amp; &quot;', '&quot; &amp; [.D134] &amp; &quot;', '&quot; &amp; [.E134] &amp; &quot;', '&quot; &amp; [.F134] &amp; &quot;'],&quot;" office:value-type="string" office:string-value="['Elden Ring (2022)', '2022-4-7', '1:36', 'Lyle, Tomar', 'egfOKxBC4qU', '']," calcext:value-type="string">
            <text:p>['Elden Ring (2022)', '2022-4-7', '1:36', 'Lyle, Tomar', 'egfOKxBC4qU', ''],</text:p>
          </table:table-cell>
        </table:table-row>
        <table:table-row table:style-name="ro1">
          <table:table-cell office:value-type="string" calcext:value-type="string">
            <text:p>Elden Ring (2023)</text:p>
          </table:table-cell>
          <table:table-cell office:value-type="date" office:date-value="2023-06-27" calcext:value-type="date">
            <text:p>2023-06-27</text:p>
          </table:table-cell>
          <table:table-cell office:value-type="string" calcext:value-type="string">
            <text:p>1:4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UKWCDYnMu9Y</text:p>
          </table:table-cell>
          <table:table-cell/>
          <table:table-cell table:formula="of:=&quot;['&quot; &amp; [.A135] &amp; &quot;', '&quot; &amp; YEAR([.B135]) &amp; &quot;-&quot; &amp; MONTH([.B135]) &amp; &quot;-&quot; &amp; DAY([.B135]) &amp; &quot;', '&quot; &amp; [.C135] &amp; &quot;', '&quot; &amp; [.D135] &amp; &quot;', '&quot; &amp; [.E135] &amp; &quot;', '&quot; &amp; [.F135] &amp; &quot;'],&quot;" office:value-type="string" office:string-value="['Elden Ring (2023)', '2023-6-27', '1:45', 'Lyle, Tomar', 'UKWCDYnMu9Y', '']," calcext:value-type="string">
            <text:p>['Elden Ring (2023)', '2023-6-27', '1:45', 'Lyle, Tomar', 'UKWCDYnMu9Y', ''],</text:p>
          </table:table-cell>
        </table:table-row>
        <table:table-row table:style-name="ro1">
          <table:table-cell office:value-type="string" calcext:value-type="string">
            <text:p>Elden Ring (Stream)</text:p>
          </table:table-cell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3:05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D4VUqsAOY48</text:p>
          </table:table-cell>
          <table:table-cell/>
          <table:table-cell table:formula="of:=&quot;['&quot; &amp; [.A136] &amp; &quot;', '&quot; &amp; YEAR([.B136]) &amp; &quot;-&quot; &amp; MONTH([.B136]) &amp; &quot;-&quot; &amp; DAY([.B136]) &amp; &quot;', '&quot; &amp; [.C136] &amp; &quot;', '&quot; &amp; [.D136] &amp; &quot;', '&quot; &amp; [.E136] &amp; &quot;', '&quot; &amp; [.F136] &amp; &quot;'],&quot;" office:value-type="string" office:string-value="['Elden Ring (Stream)', '2022-9-18', '3:05', 'Cory', 'D4VUqsAOY48', '']," calcext:value-type="string">
            <text:p>['Elden Ring (Stream)', '2022-9-18', '3:05', 'Cory', 'D4VUqsAOY48', ''],</text:p>
          </table:table-cell>
        </table:table-row>
        <table:table-row table:style-name="ro1">
          <table:table-cell office:value-type="string" calcext:value-type="string">
            <text:p>Enchanted Portals</text:p>
          </table:table-cell>
          <table:table-cell office:value-type="date" office:date-value="2024-09-03" calcext:value-type="date">
            <text:p>2024-09-03</text:p>
          </table:table-cell>
          <table:table-cell office:value-type="string" calcext:value-type="string">
            <text:p>0:22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SFXdL5jl3tY</text:p>
          </table:table-cell>
          <table:table-cell/>
          <table:table-cell table:formula="of:=&quot;['&quot; &amp; [.A137] &amp; &quot;', '&quot; &amp; YEAR([.B137]) &amp; &quot;-&quot; &amp; MONTH([.B137]) &amp; &quot;-&quot; &amp; DAY([.B137]) &amp; &quot;', '&quot; &amp; [.C137] &amp; &quot;', '&quot; &amp; [.D137] &amp; &quot;', '&quot; &amp; [.E137] &amp; &quot;', '&quot; &amp; [.F137] &amp; &quot;'],&quot;" office:value-type="string" office:string-value="['Enchanted Portals', '2024-9-3', '0:22', 'Cory, Tomar', 'SFXdL5jl3tY', '']," calcext:value-type="string">
            <text:p>['Enchanted Portals', '2024-9-3', '0:22', 'Cory, Tomar', 'SFXdL5jl3tY', ''],</text:p>
          </table:table-cell>
        </table:table-row>
        <table:table-row table:style-name="ro1">
          <table:table-cell office:value-type="string" calcext:value-type="string">
            <text:p>Every Dragon Ball Z (Dbz) Game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2:25</text:p>
          </table:table-cell>
          <table:table-cell office:value-type="string" calcext:value-type="string">
            <text:p>Cory, Dave, Zach, Lyle</text:p>
          </table:table-cell>
          <table:table-cell office:value-type="string" calcext:value-type="string">
            <text:p>9gXBUMziHR4</text:p>
          </table:table-cell>
          <table:table-cell/>
          <table:table-cell table:formula="of:=&quot;['&quot; &amp; [.A138] &amp; &quot;', '&quot; &amp; YEAR([.B138]) &amp; &quot;-&quot; &amp; MONTH([.B138]) &amp; &quot;-&quot; &amp; DAY([.B138]) &amp; &quot;', '&quot; &amp; [.C138] &amp; &quot;', '&quot; &amp; [.D138] &amp; &quot;', '&quot; &amp; [.E138] &amp; &quot;', '&quot; &amp; [.F138] &amp; &quot;'],&quot;" office:value-type="string" office:string-value="['Every Dragon Ball Z (Dbz) Game', '2019-9-30', '2:25', 'Cory, Dave, Zach, Lyle', '9gXBUMziHR4', '']," calcext:value-type="string">
            <text:p>['Every Dragon Ball Z (Dbz) Game', '2019-9-30', '2:25', 'Cory, Dave, Zach, Lyle', '9gXBUMziHR4', ''],</text:p>
          </table:table-cell>
        </table:table-row>
        <table:table-row table:style-name="ro1">
          <table:table-cell office:value-type="string" calcext:value-type="string">
            <text:p>Exo One</text:p>
          </table:table-cell>
          <table:table-cell office:value-type="date" office:date-value="2020-09-10" calcext:value-type="date">
            <text:p>2020-09-10</text:p>
          </table:table-cell>
          <table:table-cell office:value-type="string" calcext:value-type="string">
            <text:p>0:37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CiBteXAWbDg</text:p>
          </table:table-cell>
          <table:table-cell/>
          <table:table-cell table:formula="of:=&quot;['&quot; &amp; [.A139] &amp; &quot;', '&quot; &amp; YEAR([.B139]) &amp; &quot;-&quot; &amp; MONTH([.B139]) &amp; &quot;-&quot; &amp; DAY([.B139]) &amp; &quot;', '&quot; &amp; [.C139] &amp; &quot;', '&quot; &amp; [.D139] &amp; &quot;', '&quot; &amp; [.E139] &amp; &quot;', '&quot; &amp; [.F139] &amp; &quot;'],&quot;" office:value-type="string" office:string-value="['Exo One', '2020-9-10', '0:37', 'Zach, Lyle', 'CiBteXAWbDg', '']," calcext:value-type="string">
            <text:p>['Exo One', '2020-9-10', '0:37', 'Zach, Lyle', 'CiBteXAWbDg', ''],</text:p>
          </table:table-cell>
        </table:table-row>
        <table:table-row table:style-name="ro1">
          <table:table-cell office:value-type="string" calcext:value-type="string">
            <text:p>F-Zero X Expansion</text:p>
          </table:table-cell>
          <table:table-cell office:value-type="date" office:date-value="2017-06-12" calcext:value-type="date">
            <text:p>2017-06-12</text:p>
          </table:table-cell>
          <table:table-cell office:value-type="string" calcext:value-type="string">
            <text:p>0:5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OvTsW_W0cUU</text:p>
          </table:table-cell>
          <table:table-cell office:value-type="string" calcext:value-type="string">
            <text:p>cme4jqVwduw</text:p>
          </table:table-cell>
          <table:table-cell table:formula="of:=&quot;['&quot; &amp; [.A140] &amp; &quot;', '&quot; &amp; YEAR([.B140]) &amp; &quot;-&quot; &amp; MONTH([.B140]) &amp; &quot;-&quot; &amp; DAY([.B140]) &amp; &quot;', '&quot; &amp; [.C140] &amp; &quot;', '&quot; &amp; [.D140] &amp; &quot;', '&quot; &amp; [.E140] &amp; &quot;', '&quot; &amp; [.F140] &amp; &quot;'],&quot;" office:value-type="string" office:string-value="['F-Zero X Expansion', '2017-6-12', '0:56', 'Dingdong, Julian', 'OvTsW_W0cUU', 'cme4jqVwduw']," calcext:value-type="string">
            <text:p>['F-Zero X Expansion', '2017-6-12', '0:56', 'Dingdong, Julian', 'OvTsW_W0cUU', 'cme4jqVwduw'],</text:p>
          </table:table-cell>
        </table:table-row>
        <table:table-row table:style-name="ro1">
          <table:table-cell office:value-type="string" calcext:value-type="string">
            <text:p>F.E.A.R.</text:p>
          </table:table-cell>
          <table:table-cell office:value-type="date" office:date-value="2018-10-12" calcext:value-type="date">
            <text:p>2018-10-12</text:p>
          </table:table-cell>
          <table:table-cell office:value-type="string" calcext:value-type="string">
            <text:p>1:07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ST5kmmun4f4</text:p>
          </table:table-cell>
          <table:table-cell/>
          <table:table-cell table:formula="of:=&quot;['&quot; &amp; [.A141] &amp; &quot;', '&quot; &amp; YEAR([.B141]) &amp; &quot;-&quot; &amp; MONTH([.B141]) &amp; &quot;-&quot; &amp; DAY([.B141]) &amp; &quot;', '&quot; &amp; [.C141] &amp; &quot;', '&quot; &amp; [.D141] &amp; &quot;', '&quot; &amp; [.E141] &amp; &quot;', '&quot; &amp; [.F141] &amp; &quot;'],&quot;" office:value-type="string" office:string-value="['F.E.A.R.', '2018-10-12', '1:07', 'Zach, Tomar', 'ST5kmmun4f4', '']," calcext:value-type="string">
            <text:p>['F.E.A.R.', '2018-10-12', '1:07', 'Zach, Tomar', 'ST5kmmun4f4', ''],</text:p>
          </table:table-cell>
        </table:table-row>
        <table:table-row table:style-name="ro1">
          <table:table-cell office:value-type="string" calcext:value-type="string">
            <text:p>Fall Guys</text:p>
          </table:table-cell>
          <table:table-cell office:value-type="date" office:date-value="2020-08-23" calcext:value-type="date">
            <text:p>2020-08-23</text:p>
          </table:table-cell>
          <table:table-cell office:value-type="string" calcext:value-type="string">
            <text:p>0:31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itqbxwn67lU</text:p>
          </table:table-cell>
          <table:table-cell/>
          <table:table-cell table:formula="of:=&quot;['&quot; &amp; [.A142] &amp; &quot;', '&quot; &amp; YEAR([.B142]) &amp; &quot;-&quot; &amp; MONTH([.B142]) &amp; &quot;-&quot; &amp; DAY([.B142]) &amp; &quot;', '&quot; &amp; [.C142] &amp; &quot;', '&quot; &amp; [.D142] &amp; &quot;', '&quot; &amp; [.E142] &amp; &quot;', '&quot; &amp; [.F142] &amp; &quot;'],&quot;" office:value-type="string" office:string-value="['Fall Guys', '2020-8-23', '0:31', 'Zach, Lyle, Tomar', 'itqbxwn67lU', '']," calcext:value-type="string">
            <text:p>['Fall Guys', '2020-8-23', '0:31', 'Zach, Lyle, Tomar', 'itqbxwn67lU', ''],</text:p>
          </table:table-cell>
        </table:table-row>
        <table:table-row table:style-name="ro1">
          <table:table-cell office:value-type="string" calcext:value-type="string">
            <text:p>Fallout - New Vegas</text:p>
          </table:table-cell>
          <table:table-cell office:value-type="date" office:date-value="2019-02-10" calcext:value-type="date">
            <text:p>2019-02-10</text:p>
          </table:table-cell>
          <table:table-cell office:value-type="string" calcext:value-type="string">
            <text:p>4:11</text:p>
          </table:table-cell>
          <table:table-cell office:value-type="string" calcext:value-type="string">
            <text:p>Tomar, Mick</text:p>
          </table:table-cell>
          <table:table-cell office:value-type="string" calcext:value-type="string">
            <text:p>ttZTd5pp0n4</text:p>
          </table:table-cell>
          <table:table-cell/>
          <table:table-cell table:formula="of:=&quot;['&quot; &amp; [.A143] &amp; &quot;', '&quot; &amp; YEAR([.B143]) &amp; &quot;-&quot; &amp; MONTH([.B143]) &amp; &quot;-&quot; &amp; DAY([.B143]) &amp; &quot;', '&quot; &amp; [.C143] &amp; &quot;', '&quot; &amp; [.D143] &amp; &quot;', '&quot; &amp; [.E143] &amp; &quot;', '&quot; &amp; [.F143] &amp; &quot;'],&quot;" office:value-type="string" office:string-value="['Fallout - New Vegas', '2019-2-10', '4:11', 'Tomar, Mick', 'ttZTd5pp0n4', '']," calcext:value-type="string">
            <text:p>['Fallout - New Vegas', '2019-2-10', '4:11', 'Tomar, Mick', 'ttZTd5pp0n4', ''],</text:p>
          </table:table-cell>
        </table:table-row>
        <table:table-row table:style-name="ro1">
          <table:table-cell office:value-type="string" calcext:value-type="string">
            <text:p>Family Guy - Video Game!</text:p>
          </table:table-cell>
          <table:table-cell office:value-type="date" office:date-value="2017-03-12" calcext:value-type="date">
            <text:p>2017-03-12</text:p>
          </table:table-cell>
          <table:table-cell office:value-type="string" calcext:value-type="string">
            <text:p>0:1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25CZ7Qkp40E</text:p>
          </table:table-cell>
          <table:table-cell/>
          <table:table-cell table:formula="of:=&quot;['&quot; &amp; [.A144] &amp; &quot;', '&quot; &amp; YEAR([.B144]) &amp; &quot;-&quot; &amp; MONTH([.B144]) &amp; &quot;-&quot; &amp; DAY([.B144]) &amp; &quot;', '&quot; &amp; [.C144] &amp; &quot;', '&quot; &amp; [.D144] &amp; &quot;', '&quot; &amp; [.E144] &amp; &quot;', '&quot; &amp; [.F144] &amp; &quot;'],&quot;" office:value-type="string" office:string-value="['Family Guy - Video Game!', '2017-3-12', '0:16', 'Dingdong, Julian', '25CZ7Qkp40E', '']," calcext:value-type="string">
            <text:p>['Family Guy - Video Game!', '2017-3-12', '0:16', 'Dingdong, Julian', '25CZ7Qkp40E', ''],</text:p>
          </table:table-cell>
        </table:table-row>
        <table:table-row table:style-name="ro1">
          <table:table-cell office:value-type="string" calcext:value-type="string">
            <text:p>Fan Game</text:p>
          </table:table-cell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0:28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NCMgy8nPi2M</text:p>
          </table:table-cell>
          <table:table-cell/>
          <table:table-cell table:formula="of:=&quot;['&quot; &amp; [.A145] &amp; &quot;', '&quot; &amp; YEAR([.B145]) &amp; &quot;-&quot; &amp; MONTH([.B145]) &amp; &quot;-&quot; &amp; DAY([.B145]) &amp; &quot;', '&quot; &amp; [.C145] &amp; &quot;', '&quot; &amp; [.D145] &amp; &quot;', '&quot; &amp; [.E145] &amp; &quot;', '&quot; &amp; [.F145] &amp; &quot;'],&quot;" office:value-type="string" office:string-value="['Fan Game', '2020-6-28', '0:28', 'Zach, Tomar', 'NCMgy8nPi2M', '']," calcext:value-type="string">
            <text:p>['Fan Game', '2020-6-28', '0:28', 'Zach, Tomar', 'NCMgy8nPi2M', ''],</text:p>
          </table:table-cell>
        </table:table-row>
        <table:table-row table:style-name="ro1">
          <table:table-cell office:value-type="string" calcext:value-type="string">
            <text:p>Fancy Pants Adventure</text:p>
          </table:table-cell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ZH2ttyJ03lo</text:p>
          </table:table-cell>
          <table:table-cell/>
          <table:table-cell table:formula="of:=&quot;['&quot; &amp; [.A146] &amp; &quot;', '&quot; &amp; YEAR([.B146]) &amp; &quot;-&quot; &amp; MONTH([.B146]) &amp; &quot;-&quot; &amp; DAY([.B146]) &amp; &quot;', '&quot; &amp; [.C146] &amp; &quot;', '&quot; &amp; [.D146] &amp; &quot;', '&quot; &amp; [.E146] &amp; &quot;', '&quot; &amp; [.F146] &amp; &quot;'],&quot;" office:value-type="string" office:string-value="['Fancy Pants Adventure', '2022-12-15', '0:43', 'Cory, Lyle', 'ZH2ttyJ03lo', '']," calcext:value-type="string">
            <text:p>['Fancy Pants Adventure', '2022-12-15', '0:43', 'Cory, Lyle', 'ZH2ttyJ03lo', ''],</text:p>
          </table:table-cell>
        </table:table-row>
        <table:table-row table:style-name="ro1">
          <table:table-cell office:value-type="string" calcext:value-type="string">
            <text:p>Far Cry 5</text:p>
          </table:table-cell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0:36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06WXeI1l9AA</text:p>
          </table:table-cell>
          <table:table-cell/>
          <table:table-cell table:formula="of:=&quot;['&quot; &amp; [.A147] &amp; &quot;', '&quot; &amp; YEAR([.B147]) &amp; &quot;-&quot; &amp; MONTH([.B147]) &amp; &quot;-&quot; &amp; DAY([.B147]) &amp; &quot;', '&quot; &amp; [.C147] &amp; &quot;', '&quot; &amp; [.D147] &amp; &quot;', '&quot; &amp; [.E147] &amp; &quot;', '&quot; &amp; [.F147] &amp; &quot;'],&quot;" office:value-type="string" office:string-value="['Far Cry 5', '2018-4-17', '0:36', 'Waffle', '06WXeI1l9AA', '']," calcext:value-type="string">
            <text:p>['Far Cry 5', '2018-4-17', '0:36', 'Waffle', '06WXeI1l9AA', ''],</text:p>
          </table:table-cell>
        </table:table-row>
        <table:table-row table:style-name="ro1">
          <table:table-cell office:value-type="string" calcext:value-type="string">
            <text:p>Fat Dude Simulator</text:p>
          </table:table-cell>
          <table:table-cell office:value-type="date" office:date-value="2019-05-26" calcext:value-type="date">
            <text:p>2019-05-26</text:p>
          </table:table-cell>
          <table:table-cell office:value-type="string" calcext:value-type="string">
            <text:p>0:14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OuNbabZhC4Y</text:p>
          </table:table-cell>
          <table:table-cell/>
          <table:table-cell table:formula="of:=&quot;['&quot; &amp; [.A148] &amp; &quot;', '&quot; &amp; YEAR([.B148]) &amp; &quot;-&quot; &amp; MONTH([.B148]) &amp; &quot;-&quot; &amp; DAY([.B148]) &amp; &quot;', '&quot; &amp; [.C148] &amp; &quot;', '&quot; &amp; [.D148] &amp; &quot;', '&quot; &amp; [.E148] &amp; &quot;', '&quot; &amp; [.F148] &amp; &quot;'],&quot;" office:value-type="string" office:string-value="['Fat Dude Simulator', '2019-5-26', '0:14', 'Zach, Tomar', 'OuNbabZhC4Y', '']," calcext:value-type="string">
            <text:p>['Fat Dude Simulator', '2019-5-26', '0:14', 'Zach, Tomar', 'OuNbabZhC4Y', ''],</text:p>
          </table:table-cell>
        </table:table-row>
        <table:table-row table:style-name="ro1">
          <table:table-cell office:value-type="string" calcext:value-type="string">
            <text:p>Fat Prisoner Simulator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XpKuxZperw</text:p>
          </table:table-cell>
          <table:table-cell/>
          <table:table-cell table:formula="of:=&quot;['&quot; &amp; [.A149] &amp; &quot;', '&quot; &amp; YEAR([.B149]) &amp; &quot;-&quot; &amp; MONTH([.B149]) &amp; &quot;-&quot; &amp; DAY([.B149]) &amp; &quot;', '&quot; &amp; [.C149] &amp; &quot;', '&quot; &amp; [.D149] &amp; &quot;', '&quot; &amp; [.E149] &amp; &quot;', '&quot; &amp; [.F149] &amp; &quot;'],&quot;" office:value-type="string" office:string-value="['Fat Prisoner Simulator', '2019-6-19', '0:11', 'Lyle, Tomar', 'tXpKuxZperw', '']," calcext:value-type="string">
            <text:p>['Fat Prisoner Simulator', '2019-6-19', '0:11', 'Lyle, Tomar', 'tXpKuxZperw', ''],</text:p>
          </table:table-cell>
        </table:table-row>
        <table:table-row table:style-name="ro1">
          <table:table-cell office:value-type="string" calcext:value-type="string">
            <text:p>Fatal Frame - Ep 1</text:p>
          </table:table-cell>
          <table:table-cell office:value-type="date" office:date-value="2016-10-25" calcext:value-type="date">
            <text:p>2016-10-25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XgDC1W08lRA</text:p>
          </table:table-cell>
          <table:table-cell/>
          <table:table-cell table:formula="of:=&quot;['&quot; &amp; [.A150] &amp; &quot;', '&quot; &amp; YEAR([.B150]) &amp; &quot;-&quot; &amp; MONTH([.B150]) &amp; &quot;-&quot; &amp; DAY([.B150]) &amp; &quot;', '&quot; &amp; [.C150] &amp; &quot;', '&quot; &amp; [.D150] &amp; &quot;', '&quot; &amp; [.E150] &amp; &quot;', '&quot; &amp; [.F150] &amp; &quot;'],&quot;" office:value-type="string" office:string-value="['Fatal Frame - Ep 1', '2016-10-25', '0:10', 'Dingdong, Julian', 'XgDC1W08lRA', '']," calcext:value-type="string">
            <text:p>['Fatal Frame - Ep 1', '2016-10-25', '0:10', 'Dingdong, Julian', 'XgDC1W08lRA', ''],</text:p>
          </table:table-cell>
        </table:table-row>
        <table:table-row table:style-name="ro1">
          <table:table-cell office:value-type="string" calcext:value-type="string">
            <text:p>Fatal Frame - Ep 2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15oruouR_Bs</text:p>
          </table:table-cell>
          <table:table-cell/>
          <table:table-cell table:formula="of:=&quot;['&quot; &amp; [.A151] &amp; &quot;', '&quot; &amp; YEAR([.B151]) &amp; &quot;-&quot; &amp; MONTH([.B151]) &amp; &quot;-&quot; &amp; DAY([.B151]) &amp; &quot;', '&quot; &amp; [.C151] &amp; &quot;', '&quot; &amp; [.D151] &amp; &quot;', '&quot; &amp; [.E151] &amp; &quot;', '&quot; &amp; [.F151] &amp; &quot;'],&quot;" office:value-type="string" office:string-value="['Fatal Frame - Ep 2', '2016-10-26', '0:10', 'Dingdong, Julian', '15oruouR_Bs', '']," calcext:value-type="string">
            <text:p>['Fatal Frame - Ep 2', '2016-10-26', '0:10', 'Dingdong, Julian', '15oruouR_Bs', ''],</text:p>
          </table:table-cell>
        </table:table-row>
        <table:table-row table:style-name="ro1">
          <table:table-cell office:value-type="string" calcext:value-type="string">
            <text:p>Fear And Hunger</text:p>
          </table:table-cell>
          <table:table-cell office:value-type="date" office:date-value="2023-10-20" calcext:value-type="date">
            <text:p>2023-10-20</text:p>
          </table:table-cell>
          <table:table-cell office:value-type="string" calcext:value-type="string">
            <text:p>1:4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cuquA3EApr8</text:p>
          </table:table-cell>
          <table:table-cell/>
          <table:table-cell table:formula="of:=&quot;['&quot; &amp; [.A152] &amp; &quot;', '&quot; &amp; YEAR([.B152]) &amp; &quot;-&quot; &amp; MONTH([.B152]) &amp; &quot;-&quot; &amp; DAY([.B152]) &amp; &quot;', '&quot; &amp; [.C152] &amp; &quot;', '&quot; &amp; [.D152] &amp; &quot;', '&quot; &amp; [.E152] &amp; &quot;', '&quot; &amp; [.F152] &amp; &quot;'],&quot;" office:value-type="string" office:string-value="['Fear And Hunger', '2023-10-20', '1:42', 'Lyle, Tomar', 'cuquA3EApr8', '']," calcext:value-type="string">
            <text:p>['Fear And Hunger', '2023-10-20', '1:42', 'Lyle, Tomar', 'cuquA3EApr8', ''],</text:p>
          </table:table-cell>
        </table:table-row>
        <table:table-row table:style-name="ro1">
          <table:table-cell office:value-type="string" calcext:value-type="string">
            <text:p>Fifa 22</text:p>
          </table:table-cell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0:47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XFMHoTUHLVc</text:p>
          </table:table-cell>
          <table:table-cell/>
          <table:table-cell table:formula="of:=&quot;['&quot; &amp; [.A153] &amp; &quot;', '&quot; &amp; YEAR([.B153]) &amp; &quot;-&quot; &amp; MONTH([.B153]) &amp; &quot;-&quot; &amp; DAY([.B153]) &amp; &quot;', '&quot; &amp; [.C153] &amp; &quot;', '&quot; &amp; [.D153] &amp; &quot;', '&quot; &amp; [.E153] &amp; &quot;', '&quot; &amp; [.F153] &amp; &quot;'],&quot;" office:value-type="string" office:string-value="['Fifa 22', '2022-3-4', '0:47', 'Adam, Tomar', 'XFMHoTUHLVc', '']," calcext:value-type="string">
            <text:p>['Fifa 22', '2022-3-4', '0:47', 'Adam, Tomar', 'XFMHoTUHLVc', ''],</text:p>
          </table:table-cell>
        </table:table-row>
        <table:table-row table:style-name="ro1">
          <table:table-cell office:value-type="string" calcext:value-type="string">
            <text:p>Fight Crab</text:p>
          </table:table-cell>
          <table:table-cell office:value-type="date" office:date-value="2020-12-26" calcext:value-type="date">
            <text:p>2020-12-26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n2JwvShk3Cw</text:p>
          </table:table-cell>
          <table:table-cell/>
          <table:table-cell table:formula="of:=&quot;['&quot; &amp; [.A154] &amp; &quot;', '&quot; &amp; YEAR([.B154]) &amp; &quot;-&quot; &amp; MONTH([.B154]) &amp; &quot;-&quot; &amp; DAY([.B154]) &amp; &quot;', '&quot; &amp; [.C154] &amp; &quot;', '&quot; &amp; [.D154] &amp; &quot;', '&quot; &amp; [.E154] &amp; &quot;', '&quot; &amp; [.F154] &amp; &quot;'],&quot;" office:value-type="string" office:string-value="['Fight Crab', '2020-12-26', '0:24', 'Lyle, Tomar', 'n2JwvShk3Cw', '']," calcext:value-type="string">
            <text:p>['Fight Crab', '2020-12-26', '0:24', 'Lyle, Tomar', 'n2JwvShk3Cw', ''],</text:p>
          </table:table-cell>
        </table:table-row>
        <table:table-row table:style-name="ro1">
          <table:table-cell office:value-type="string" calcext:value-type="string">
            <text:p>Final Fantasy 15</text:p>
          </table:table-cell>
          <table:table-cell office:value-type="date" office:date-value="2016-12-05" calcext:value-type="date">
            <text:p>2016-12-05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iSPTBLqTLk</text:p>
          </table:table-cell>
          <table:table-cell/>
          <table:table-cell table:formula="of:=&quot;['&quot; &amp; [.A155] &amp; &quot;', '&quot; &amp; YEAR([.B155]) &amp; &quot;-&quot; &amp; MONTH([.B155]) &amp; &quot;-&quot; &amp; DAY([.B155]) &amp; &quot;', '&quot; &amp; [.C155] &amp; &quot;', '&quot; &amp; [.D155] &amp; &quot;', '&quot; &amp; [.E155] &amp; &quot;', '&quot; &amp; [.F155] &amp; &quot;'],&quot;" office:value-type="string" office:string-value="['Final Fantasy 15', '2016-12-5', '0:10', 'Dingdong, Julian', 'diSPTBLqTLk', '']," calcext:value-type="string">
            <text:p>['Final Fantasy 15', '2016-12-5', '0:10', 'Dingdong, Julian', 'diSPTBLqTLk', ''],</text:p>
          </table:table-cell>
        </table:table-row>
        <table:table-row table:style-name="ro1">
          <table:table-cell office:value-type="string" calcext:value-type="string">
            <text:p>Final Fantasy VII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2:2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uKrU9g6JmVg</text:p>
          </table:table-cell>
          <table:table-cell/>
          <table:table-cell table:formula="of:=&quot;['&quot; &amp; [.A156] &amp; &quot;', '&quot; &amp; YEAR([.B156]) &amp; &quot;-&quot; &amp; MONTH([.B156]) &amp; &quot;-&quot; &amp; DAY([.B156]) &amp; &quot;', '&quot; &amp; [.C156] &amp; &quot;', '&quot; &amp; [.D156] &amp; &quot;', '&quot; &amp; [.E156] &amp; &quot;', '&quot; &amp; [.F156] &amp; &quot;'],&quot;" office:value-type="string" office:string-value="['Final Fantasy VII', '2016-4-16', '2:24', 'Dingdong, Julian', 'uKrU9g6JmVg', '']," calcext:value-type="string">
            <text:p>['Final Fantasy VII', '2016-4-16', '2:24', 'Dingdong, Julian', 'uKrU9g6JmVg', ''],</text:p>
          </table:table-cell>
        </table:table-row>
        <table:table-row table:style-name="ro1">
          <table:table-cell office:value-type="string" calcext:value-type="string">
            <text:p>Final Fantasy VII Remake (Stream)</text:p>
          </table:table-cell>
          <table:table-cell office:value-type="date" office:date-value="2020-09-13" calcext:value-type="date">
            <text:p>2020-09-13</text:p>
          </table:table-cell>
          <table:table-cell office:value-type="string" calcext:value-type="string">
            <text:p>2:39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k_LqNiQmfKE</text:p>
          </table:table-cell>
          <table:table-cell/>
          <table:table-cell table:formula="of:=&quot;['&quot; &amp; [.A157] &amp; &quot;', '&quot; &amp; YEAR([.B157]) &amp; &quot;-&quot; &amp; MONTH([.B157]) &amp; &quot;-&quot; &amp; DAY([.B157]) &amp; &quot;', '&quot; &amp; [.C157] &amp; &quot;', '&quot; &amp; [.D157] &amp; &quot;', '&quot; &amp; [.E157] &amp; &quot;', '&quot; &amp; [.F157] &amp; &quot;'],&quot;" office:value-type="string" office:string-value="['Final Fantasy VII Remake (Stream)', '2020-9-13', '2:39', 'Veronica', 'k_LqNiQmfKE', '']," calcext:value-type="string">
            <text:p>['Final Fantasy VII Remake (Stream)', '2020-9-13', '2:39', 'Veronica', 'k_LqNiQmfKE', ''],</text:p>
          </table:table-cell>
        </table:table-row>
        <table:table-row table:style-name="ro1">
          <table:table-cell office:value-type="string" calcext:value-type="string">
            <text:p>Final Fantasy VII Remake 1</text:p>
          </table:table-cell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H22_A1bFNCg</text:p>
          </table:table-cell>
          <table:table-cell/>
          <table:table-cell table:formula="of:=&quot;['&quot; &amp; [.A158] &amp; &quot;', '&quot; &amp; YEAR([.B158]) &amp; &quot;-&quot; &amp; MONTH([.B158]) &amp; &quot;-&quot; &amp; DAY([.B158]) &amp; &quot;', '&quot; &amp; [.C158] &amp; &quot;', '&quot; &amp; [.D158] &amp; &quot;', '&quot; &amp; [.E158] &amp; &quot;', '&quot; &amp; [.F158] &amp; &quot;'],&quot;" office:value-type="string" office:string-value="['Final Fantasy VII Remake 1', '2020-4-17', '0:21', 'Lyle, Tomar', 'H22_A1bFNCg', '']," calcext:value-type="string">
            <text:p>['Final Fantasy VII Remake 1', '2020-4-17', '0:21', 'Lyle, Tomar', 'H22_A1bFNCg', ''],</text:p>
          </table:table-cell>
        </table:table-row>
        <table:table-row table:style-name="ro1">
          <table:table-cell office:value-type="string" calcext:value-type="string">
            <text:p>Final Fantasy VII Remake 2</text:p>
          </table:table-cell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jQt-9hHFEa4</text:p>
          </table:table-cell>
          <table:table-cell/>
          <table:table-cell table:formula="of:=&quot;['&quot; &amp; [.A159] &amp; &quot;', '&quot; &amp; YEAR([.B159]) &amp; &quot;-&quot; &amp; MONTH([.B159]) &amp; &quot;-&quot; &amp; DAY([.B159]) &amp; &quot;', '&quot; &amp; [.C159] &amp; &quot;', '&quot; &amp; [.D159] &amp; &quot;', '&quot; &amp; [.E159] &amp; &quot;', '&quot; &amp; [.F159] &amp; &quot;'],&quot;" office:value-type="string" office:string-value="['Final Fantasy VII Remake 2', '2020-4-25', '0:21', 'Lyle, Tomar', 'jQt-9hHFEa4', '']," calcext:value-type="string">
            <text:p>['Final Fantasy VII Remake 2', '2020-4-25', '0:21', 'Lyle, Tomar', 'jQt-9hHFEa4', ''],</text:p>
          </table:table-cell>
        </table:table-row>
        <table:table-row table:style-name="ro1">
          <table:table-cell office:value-type="string" calcext:value-type="string">
            <text:p>Final Fantasy X</text:p>
          </table:table-cell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1:4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7Zhu0UHXo4Q</text:p>
          </table:table-cell>
          <table:table-cell/>
          <table:table-cell table:formula="of:=&quot;['&quot; &amp; [.A160] &amp; &quot;', '&quot; &amp; YEAR([.B160]) &amp; &quot;-&quot; &amp; MONTH([.B160]) &amp; &quot;-&quot; &amp; DAY([.B160]) &amp; &quot;', '&quot; &amp; [.C160] &amp; &quot;', '&quot; &amp; [.D160] &amp; &quot;', '&quot; &amp; [.E160] &amp; &quot;', '&quot; &amp; [.F160] &amp; &quot;'],&quot;" office:value-type="string" office:string-value="['Final Fantasy X', '2020-3-19', '1:47', 'Lyle, Tomar', '7Zhu0UHXo4Q', '']," calcext:value-type="string">
            <text:p>['Final Fantasy X', '2020-3-19', '1:47', 'Lyle, Tomar', '7Zhu0UHXo4Q', ''],</text:p>
          </table:table-cell>
        </table:table-row>
        <table:table-row table:style-name="ro1">
          <table:table-cell office:value-type="string" calcext:value-type="string">
            <text:p>Five Nights At Freddy's</text:p>
          </table:table-cell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1:04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QrgfgHf4Hok</text:p>
          </table:table-cell>
          <table:table-cell office:value-type="string" calcext:value-type="string">
            <text:p>GAJBPe6XuEM</text:p>
          </table:table-cell>
          <table:table-cell table:formula="of:=&quot;['&quot; &amp; [.A161] &amp; &quot;', '&quot; &amp; YEAR([.B161]) &amp; &quot;-&quot; &amp; MONTH([.B161]) &amp; &quot;-&quot; &amp; DAY([.B161]) &amp; &quot;', '&quot; &amp; [.C161] &amp; &quot;', '&quot; &amp; [.D161] &amp; &quot;', '&quot; &amp; [.E161] &amp; &quot;', '&quot; &amp; [.F161] &amp; &quot;'],&quot;" office:value-type="string" office:string-value="['Five Nights At Freddy's', '2019-10-28', '1:04', 'Dave, Cory', 'QrgfgHf4Hok', 'GAJBPe6XuEM']," calcext:value-type="string">
            <text:p>['Five Nights At Freddy's', '2019-10-28', '1:04', 'Dave, Cory', 'QrgfgHf4Hok', 'GAJBPe6XuEM'],</text:p>
          </table:table-cell>
        </table:table-row>
        <table:table-row table:style-name="ro1">
          <table:table-cell office:value-type="string" calcext:value-type="string">
            <text:p>Five Nights At Freddy's - Help Wanted</text:p>
          </table:table-cell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uTcRo7l6dRQ</text:p>
          </table:table-cell>
          <table:table-cell/>
          <table:table-cell table:formula="of:=&quot;['&quot; &amp; [.A162] &amp; &quot;', '&quot; &amp; YEAR([.B162]) &amp; &quot;-&quot; &amp; MONTH([.B162]) &amp; &quot;-&quot; &amp; DAY([.B162]) &amp; &quot;', '&quot; &amp; [.C162] &amp; &quot;', '&quot; &amp; [.D162] &amp; &quot;', '&quot; &amp; [.E162] &amp; &quot;', '&quot; &amp; [.F162] &amp; &quot;'],&quot;" office:value-type="string" office:string-value="['Five Nights At Freddy's - Help Wanted', '2022-10-31', '1:09', 'Zach, Cory, Tomar', 'uTcRo7l6dRQ', '']," calcext:value-type="string">
            <text:p>['Five Nights At Freddy's - Help Wanted', '2022-10-31', '1:09', 'Zach, Cory, Tomar', 'uTcRo7l6dRQ', ''],</text:p>
          </table:table-cell>
        </table:table-row>
        <table:table-row table:style-name="ro1">
          <table:table-cell office:value-type="string" calcext:value-type="string">
            <text:p>Five Nights At Freddy's - Into the Pit</text:p>
          </table:table-cell>
          <table:table-cell office:value-type="date" office:date-value="2024-10-26" calcext:value-type="date">
            <text:p>2024-10-26</text:p>
          </table:table-cell>
          <table:table-cell office:value-type="string" calcext:value-type="string">
            <text:p>2:48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fSI9V3pCKmI</text:p>
          </table:table-cell>
          <table:table-cell/>
          <table:table-cell table:formula="of:=&quot;['&quot; &amp; [.A163] &amp; &quot;', '&quot; &amp; YEAR([.B163]) &amp; &quot;-&quot; &amp; MONTH([.B163]) &amp; &quot;-&quot; &amp; DAY([.B163]) &amp; &quot;', '&quot; &amp; [.C163] &amp; &quot;', '&quot; &amp; [.D163] &amp; &quot;', '&quot; &amp; [.E163] &amp; &quot;', '&quot; &amp; [.F163] &amp; &quot;'],&quot;" office:value-type="string" office:string-value="['Five Nights At Freddy's - Into the Pit', '2024-10-26', '2:48', 'Cory, Tomar', 'fSI9V3pCKmI', '']," calcext:value-type="string">
            <text:p>['Five Nights At Freddy's - Into the Pit', '2024-10-26', '2:48', 'Cory, Tomar', 'fSI9V3pCKmI', ''],</text:p>
          </table:table-cell>
        </table:table-row>
        <table:table-row table:style-name="ro1">
          <table:table-cell office:value-type="string" calcext:value-type="string">
            <text:p>Five Nights At Freddy's - Sister Location</text:p>
          </table:table-cell>
          <table:table-cell office:value-type="date" office:date-value="2023-10-27" calcext:value-type="date">
            <text:p>2023-10-27</text:p>
          </table:table-cell>
          <table:table-cell office:value-type="string" calcext:value-type="string">
            <text:p>0:52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mbHhAPDSiOY</text:p>
          </table:table-cell>
          <table:table-cell/>
          <table:table-cell table:formula="of:=&quot;['&quot; &amp; [.A164] &amp; &quot;', '&quot; &amp; YEAR([.B164]) &amp; &quot;-&quot; &amp; MONTH([.B164]) &amp; &quot;-&quot; &amp; DAY([.B164]) &amp; &quot;', '&quot; &amp; [.C164] &amp; &quot;', '&quot; &amp; [.D164] &amp; &quot;', '&quot; &amp; [.E164] &amp; &quot;', '&quot; &amp; [.F164] &amp; &quot;'],&quot;" office:value-type="string" office:string-value="['Five Nights At Freddy's - Sister Location', '2023-10-27', '0:52', 'Cory, Dave', 'mbHhAPDSiOY', '']," calcext:value-type="string">
            <text:p>['Five Nights At Freddy's - Sister Location', '2023-10-27', '0:52', 'Cory, Dave', 'mbHhAPDSiOY', ''],</text:p>
          </table:table-cell>
        </table:table-row>
        <table:table-row table:style-name="ro1">
          <table:table-cell office:value-type="string" calcext:value-type="string">
            <text:p>Five Nights At Freddy's 2</text:p>
          </table:table-cell>
          <table:table-cell office:value-type="date" office:date-value="2023-10-27" calcext:value-type="date">
            <text:p>2023-10-27</text:p>
          </table:table-cell>
          <table:table-cell office:value-type="string" calcext:value-type="string">
            <text:p>0:35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s-Njobit39s</text:p>
          </table:table-cell>
          <table:table-cell/>
          <table:table-cell table:formula="of:=&quot;['&quot; &amp; [.A165] &amp; &quot;', '&quot; &amp; YEAR([.B165]) &amp; &quot;-&quot; &amp; MONTH([.B165]) &amp; &quot;-&quot; &amp; DAY([.B165]) &amp; &quot;', '&quot; &amp; [.C165] &amp; &quot;', '&quot; &amp; [.D165] &amp; &quot;', '&quot; &amp; [.E165] &amp; &quot;', '&quot; &amp; [.F165] &amp; &quot;'],&quot;" office:value-type="string" office:string-value="['Five Nights At Freddy's 2', '2023-10-27', '0:35', 'Dave, Cory', 's-Njobit39s', '']," calcext:value-type="string">
            <text:p>['Five Nights At Freddy's 2', '2023-10-27', '0:35', 'Dave, Cory', 's-Njobit39s', ''],</text:p>
          </table:table-cell>
        </table:table-row>
        <table:table-row table:style-name="ro1">
          <table:table-cell office:value-type="string" calcext:value-type="string">
            <text:p>Flanders Killer 7</text:p>
          </table:table-cell>
          <table:table-cell office:value-type="date" office:date-value="2017-04-06" calcext:value-type="date">
            <text:p>2017-04-06</text:p>
          </table:table-cell>
          <table:table-cell office:value-type="string" calcext:value-type="string">
            <text:p>0:1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j1lblZ2krZU</text:p>
          </table:table-cell>
          <table:table-cell/>
          <table:table-cell table:formula="of:=&quot;['&quot; &amp; [.A166] &amp; &quot;', '&quot; &amp; YEAR([.B166]) &amp; &quot;-&quot; &amp; MONTH([.B166]) &amp; &quot;-&quot; &amp; DAY([.B166]) &amp; &quot;', '&quot; &amp; [.C166] &amp; &quot;', '&quot; &amp; [.D166] &amp; &quot;', '&quot; &amp; [.E166] &amp; &quot;', '&quot; &amp; [.F166] &amp; &quot;'],&quot;" office:value-type="string" office:string-value="['Flanders Killer 7', '2017-4-6', '0:15', 'Dingdong, Julian', 'j1lblZ2krZU', '']," calcext:value-type="string">
            <text:p>['Flanders Killer 7', '2017-4-6', '0:15', 'Dingdong, Julian', 'j1lblZ2krZU', ''],</text:p>
          </table:table-cell>
        </table:table-row>
        <table:table-row table:style-name="ro1">
          <table:table-cell office:value-type="string" calcext:value-type="string">
            <text:p>Flicky The Bird</text:p>
          </table:table-cell>
          <table:table-cell office:value-type="date" office:date-value="2020-09-03" calcext:value-type="date">
            <text:p>2020-09-03</text:p>
          </table:table-cell>
          <table:table-cell office:value-type="string" calcext:value-type="string">
            <text:p>0:2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lTwMGqyQUKo</text:p>
          </table:table-cell>
          <table:table-cell/>
          <table:table-cell table:formula="of:=&quot;['&quot; &amp; [.A167] &amp; &quot;', '&quot; &amp; YEAR([.B167]) &amp; &quot;-&quot; &amp; MONTH([.B167]) &amp; &quot;-&quot; &amp; DAY([.B167]) &amp; &quot;', '&quot; &amp; [.C167] &amp; &quot;', '&quot; &amp; [.D167] &amp; &quot;', '&quot; &amp; [.E167] &amp; &quot;', '&quot; &amp; [.F167] &amp; &quot;'],&quot;" office:value-type="string" office:string-value="['Flicky The Bird', '2020-9-3', '0:22', 'Lyle, Tomar', 'lTwMGqyQUKo', '']," calcext:value-type="string">
            <text:p>['Flicky The Bird', '2020-9-3', '0:22', 'Lyle, Tomar', 'lTwMGqyQUKo', ''],</text:p>
          </table:table-cell>
        </table:table-row>
        <table:table-row table:style-name="ro1">
          <table:table-cell office:value-type="string" calcext:value-type="string">
            <text:p>Flintstones</text:p>
          </table:table-cell>
          <table:table-cell office:value-type="date" office:date-value="2018-06-09" calcext:value-type="date">
            <text:p>2018-06-09</text:p>
          </table:table-cell>
          <table:table-cell office:value-type="string" calcext:value-type="string">
            <text:p>0:18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uTFi-lk5BFM</text:p>
          </table:table-cell>
          <table:table-cell/>
          <table:table-cell table:formula="of:=&quot;['&quot; &amp; [.A168] &amp; &quot;', '&quot; &amp; YEAR([.B168]) &amp; &quot;-&quot; &amp; MONTH([.B168]) &amp; &quot;-&quot; &amp; DAY([.B168]) &amp; &quot;', '&quot; &amp; [.C168] &amp; &quot;', '&quot; &amp; [.D168] &amp; &quot;', '&quot; &amp; [.E168] &amp; &quot;', '&quot; &amp; [.F168] &amp; &quot;'],&quot;" office:value-type="string" office:string-value="['Flintstones', '2018-6-9', '0:18', 'Zach, Lyle', 'uTFi-lk5BFM', '']," calcext:value-type="string">
            <text:p>['Flintstones', '2018-6-9', '0:18', 'Zach, Lyle', 'uTFi-lk5BFM', ''],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date" office:date-value="2021-02-08" calcext:value-type="date">
            <text:p>2021-02-08</text:p>
          </table:table-cell>
          <table:table-cell office:value-type="string" calcext:value-type="string">
            <text:p>0:1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uiauMOyRZl0</text:p>
          </table:table-cell>
          <table:table-cell/>
          <table:table-cell table:formula="of:=&quot;['&quot; &amp; [.A169] &amp; &quot;', '&quot; &amp; YEAR([.B169]) &amp; &quot;-&quot; &amp; MONTH([.B169]) &amp; &quot;-&quot; &amp; DAY([.B169]) &amp; &quot;', '&quot; &amp; [.C169] &amp; &quot;', '&quot; &amp; [.D169] &amp; &quot;', '&quot; &amp; [.E169] &amp; &quot;', '&quot; &amp; [.F169] &amp; &quot;'],&quot;" office:value-type="string" office:string-value="['Fly', '2021-2-8', '0:14', 'Lyle, Tomar', 'uiauMOyRZl0', '']," calcext:value-type="string">
            <text:p>['Fly', '2021-2-8', '0:14', 'Lyle, Tomar', 'uiauMOyRZl0', ''],</text:p>
          </table:table-cell>
        </table:table-row>
        <table:table-row table:style-name="ro1">
          <table:table-cell office:value-type="string" calcext:value-type="string">
            <text:p>Forspoken</text:p>
          </table:table-cell>
          <table:table-cell office:value-type="date" office:date-value="2023-05-24" calcext:value-type="date">
            <text:p>2023-05-24</text:p>
          </table:table-cell>
          <table:table-cell office:value-type="string" calcext:value-type="string">
            <text:p>4:14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aSzGRmgdJvQ</text:p>
          </table:table-cell>
          <table:table-cell/>
          <table:table-cell table:formula="of:=&quot;['&quot; &amp; [.A170] &amp; &quot;', '&quot; &amp; YEAR([.B170]) &amp; &quot;-&quot; &amp; MONTH([.B170]) &amp; &quot;-&quot; &amp; DAY([.B170]) &amp; &quot;', '&quot; &amp; [.C170] &amp; &quot;', '&quot; &amp; [.D170] &amp; &quot;', '&quot; &amp; [.E170] &amp; &quot;', '&quot; &amp; [.F170] &amp; &quot;'],&quot;" office:value-type="string" office:string-value="['Forspoken', '2023-5-24', '4:14', 'Zach, Lyle', 'aSzGRmgdJvQ', '']," calcext:value-type="string">
            <text:p>['Forspoken', '2023-5-24', '4:14', 'Zach, Lyle', 'aSzGRmgdJvQ', ''],</text:p>
          </table:table-cell>
        </table:table-row>
        <table:table-row table:style-name="ro1">
          <table:table-cell office:value-type="string" calcext:value-type="string">
            <text:p>Friday The 13Th</text:p>
          </table:table-cell>
          <table:table-cell office:value-type="date" office:date-value="2017-09-30" calcext:value-type="date">
            <text:p>2017-09-30</text:p>
          </table:table-cell>
          <table:table-cell office:value-type="string" calcext:value-type="string">
            <text:p>0:5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NnhIbMejxa4</text:p>
          </table:table-cell>
          <table:table-cell/>
          <table:table-cell table:formula="of:=&quot;['&quot; &amp; [.A171] &amp; &quot;', '&quot; &amp; YEAR([.B171]) &amp; &quot;-&quot; &amp; MONTH([.B171]) &amp; &quot;-&quot; &amp; DAY([.B171]) &amp; &quot;', '&quot; &amp; [.C171] &amp; &quot;', '&quot; &amp; [.D171] &amp; &quot;', '&quot; &amp; [.E171] &amp; &quot;', '&quot; &amp; [.F171] &amp; &quot;'],&quot;" office:value-type="string" office:string-value="['Friday The 13Th', '2017-9-30', '0:54', 'Dingdong, Julian', 'NnhIbMejxa4', '']," calcext:value-type="string">
            <text:p>['Friday The 13Th', '2017-9-30', '0:54', 'Dingdong, Julian', 'NnhIbMejxa4', ''],</text:p>
          </table:table-cell>
        </table:table-row>
        <table:table-row table:style-name="ro1">
          <table:table-cell office:value-type="string" calcext:value-type="string">
            <text:p>Frogger - The Great Quest - Ep 1</text:p>
          </table:table-cell>
          <table:table-cell office:value-type="date" office:date-value="2021-09-10" calcext:value-type="date">
            <text:p>2021-09-10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YbvniK7Bok4</text:p>
          </table:table-cell>
          <table:table-cell/>
          <table:table-cell table:formula="of:=&quot;['&quot; &amp; [.A172] &amp; &quot;', '&quot; &amp; YEAR([.B172]) &amp; &quot;-&quot; &amp; MONTH([.B172]) &amp; &quot;-&quot; &amp; DAY([.B172]) &amp; &quot;', '&quot; &amp; [.C172] &amp; &quot;', '&quot; &amp; [.D172] &amp; &quot;', '&quot; &amp; [.E172] &amp; &quot;', '&quot; &amp; [.F172] &amp; &quot;'],&quot;" office:value-type="string" office:string-value="['Frogger - The Great Quest - Ep 1', '2021-9-10', '0:21', 'Adam, Tomar', 'YbvniK7Bok4', '']," calcext:value-type="string">
            <text:p>['Frogger - The Great Quest - Ep 1', '2021-9-10', '0:21', 'Adam, Tomar', 'YbvniK7Bok4', ''],</text:p>
          </table:table-cell>
        </table:table-row>
        <table:table-row table:style-name="ro1">
          <table:table-cell office:value-type="string" calcext:value-type="string">
            <text:p>Frogger - The Great Quest - Ep 2</text:p>
          </table:table-cell>
          <table:table-cell office:value-type="date" office:date-value="2021-09-15" calcext:value-type="date">
            <text:p>2021-09-15</text:p>
          </table:table-cell>
          <table:table-cell office:value-type="string" calcext:value-type="string">
            <text:p>0:28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m8ScdWcaV1U</text:p>
          </table:table-cell>
          <table:table-cell/>
          <table:table-cell table:formula="of:=&quot;['&quot; &amp; [.A173] &amp; &quot;', '&quot; &amp; YEAR([.B173]) &amp; &quot;-&quot; &amp; MONTH([.B173]) &amp; &quot;-&quot; &amp; DAY([.B173]) &amp; &quot;', '&quot; &amp; [.C173] &amp; &quot;', '&quot; &amp; [.D173] &amp; &quot;', '&quot; &amp; [.E173] &amp; &quot;', '&quot; &amp; [.F173] &amp; &quot;'],&quot;" office:value-type="string" office:string-value="['Frogger - The Great Quest - Ep 2', '2021-9-15', '0:28', 'Adam, Tomar', 'm8ScdWcaV1U', '']," calcext:value-type="string">
            <text:p>['Frogger - The Great Quest - Ep 2', '2021-9-15', '0:28', 'Adam, Tomar', 'm8ScdWcaV1U', ''],</text:p>
          </table:table-cell>
        </table:table-row>
        <table:table-row table:style-name="ro1">
          <table:table-cell office:value-type="string" calcext:value-type="string">
            <text:p>Funny Dinosaur Game</text:p>
          </table:table-cell>
          <table:table-cell office:value-type="date" office:date-value="2018-04-08" calcext:value-type="date">
            <text:p>2018-04-08</text:p>
          </table:table-cell>
          <table:table-cell office:value-type="string" calcext:value-type="string">
            <text:p>0:14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0Y-Evv5zusQ</text:p>
          </table:table-cell>
          <table:table-cell/>
          <table:table-cell table:formula="of:=&quot;['&quot; &amp; [.A174] &amp; &quot;', '&quot; &amp; YEAR([.B174]) &amp; &quot;-&quot; &amp; MONTH([.B174]) &amp; &quot;-&quot; &amp; DAY([.B174]) &amp; &quot;', '&quot; &amp; [.C174] &amp; &quot;', '&quot; &amp; [.D174] &amp; &quot;', '&quot; &amp; [.E174] &amp; &quot;', '&quot; &amp; [.F174] &amp; &quot;'],&quot;" office:value-type="string" office:string-value="['Funny Dinosaur Game', '2018-4-8', '0:14', 'Zach, Lyle', '0Y-Evv5zusQ', '']," calcext:value-type="string">
            <text:p>['Funny Dinosaur Game', '2018-4-8', '0:14', 'Zach, Lyle', '0Y-Evv5zusQ', ''],</text:p>
          </table:table-cell>
        </table:table-row>
        <table:table-row table:style-name="ro1">
          <table:table-cell office:value-type="string" calcext:value-type="string">
            <text:p>G-Force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0:46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JO2txXJVxBQ</text:p>
          </table:table-cell>
          <table:table-cell/>
          <table:table-cell table:formula="of:=&quot;['&quot; &amp; [.A175] &amp; &quot;', '&quot; &amp; YEAR([.B175]) &amp; &quot;-&quot; &amp; MONTH([.B175]) &amp; &quot;-&quot; &amp; DAY([.B175]) &amp; &quot;', '&quot; &amp; [.C175] &amp; &quot;', '&quot; &amp; [.D175] &amp; &quot;', '&quot; &amp; [.E175] &amp; &quot;', '&quot; &amp; [.F175] &amp; &quot;'],&quot;" office:value-type="string" office:string-value="['G-Force', '2022-6-5', '0:46', 'Lyle, Cory', 'JO2txXJVxBQ', '']," calcext:value-type="string">
            <text:p>['G-Force', '2022-6-5', '0:46', 'Lyle, Cory', 'JO2txXJVxBQ', ''],</text:p>
          </table:table-cell>
        </table:table-row>
        <table:table-row table:style-name="ro1">
          <table:table-cell office:value-type="string" calcext:value-type="string">
            <text:p>Gameboy Advance Sp Blue Edition Creepypasta</text:p>
          </table:table-cell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7tPRAhZHAmA</text:p>
          </table:table-cell>
          <table:table-cell/>
          <table:table-cell table:formula="of:=&quot;['&quot; &amp; [.A176] &amp; &quot;', '&quot; &amp; YEAR([.B176]) &amp; &quot;-&quot; &amp; MONTH([.B176]) &amp; &quot;-&quot; &amp; DAY([.B176]) &amp; &quot;', '&quot; &amp; [.C176] &amp; &quot;', '&quot; &amp; [.D176] &amp; &quot;', '&quot; &amp; [.E176] &amp; &quot;', '&quot; &amp; [.F176] &amp; &quot;'],&quot;" office:value-type="string" office:string-value="['Gameboy Advance Sp Blue Edition Creepypasta', '2017-11-2', '0:11', 'Solo', '7tPRAhZHAmA', '']," calcext:value-type="string">
            <text:p>['Gameboy Advance Sp Blue Edition Creepypasta', '2017-11-2', '0:11', 'Solo', '7tPRAhZHAmA', ''],</text:p>
          </table:table-cell>
        </table:table-row>
        <table:table-row table:style-name="ro1">
          <table:table-cell office:value-type="string" calcext:value-type="string">
            <text:p>Gang Beasts (2018)</text:p>
          </table:table-cell>
          <table:table-cell office:value-type="date" office:date-value="2018-01-13" calcext:value-type="date">
            <text:p>2018-01-13</text:p>
          </table:table-cell>
          <table:table-cell office:value-type="string" calcext:value-type="string">
            <text:p>0:38</text:p>
          </table:table-cell>
          <table:table-cell office:value-type="string" calcext:value-type="string">
            <text:p>Dingdong, Julian, Lyle</text:p>
          </table:table-cell>
          <table:table-cell office:value-type="string" calcext:value-type="string">
            <text:p>W6mFibZZECw</text:p>
          </table:table-cell>
          <table:table-cell/>
          <table:table-cell table:formula="of:=&quot;['&quot; &amp; [.A177] &amp; &quot;', '&quot; &amp; YEAR([.B177]) &amp; &quot;-&quot; &amp; MONTH([.B177]) &amp; &quot;-&quot; &amp; DAY([.B177]) &amp; &quot;', '&quot; &amp; [.C177] &amp; &quot;', '&quot; &amp; [.D177] &amp; &quot;', '&quot; &amp; [.E177] &amp; &quot;', '&quot; &amp; [.F177] &amp; &quot;'],&quot;" office:value-type="string" office:string-value="['Gang Beasts (2018)', '2018-1-13', '0:38', 'Dingdong, Julian, Lyle', 'W6mFibZZECw', '']," calcext:value-type="string">
            <text:p>['Gang Beasts (2018)', '2018-1-13', '0:38', 'Dingdong, Julian, Lyle', 'W6mFibZZECw', ''],</text:p>
          </table:table-cell>
        </table:table-row>
        <table:table-row table:style-name="ro1">
          <table:table-cell office:value-type="string" calcext:value-type="string">
            <text:p>Gang Beasts (2020)</text:p>
          </table:table-cell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0:47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jdTeAy6Cnqo</text:p>
          </table:table-cell>
          <table:table-cell/>
          <table:table-cell table:formula="of:=&quot;['&quot; &amp; [.A178] &amp; &quot;', '&quot; &amp; YEAR([.B178]) &amp; &quot;-&quot; &amp; MONTH([.B178]) &amp; &quot;-&quot; &amp; DAY([.B178]) &amp; &quot;', '&quot; &amp; [.C178] &amp; &quot;', '&quot; &amp; [.D178] &amp; &quot;', '&quot; &amp; [.E178] &amp; &quot;', '&quot; &amp; [.F178] &amp; &quot;'],&quot;" office:value-type="string" office:string-value="['Gang Beasts (2020)', '2020-5-18', '0:47', 'Zach, Lyle, Tomar', 'jdTeAy6Cnqo', '']," calcext:value-type="string">
            <text:p>['Gang Beasts (2020)', '2020-5-18', '0:47', 'Zach, Lyle, Tomar', 'jdTeAy6Cnqo', ''],</text:p>
          </table:table-cell>
        </table:table-row>
        <table:table-row table:style-name="ro1">
          <table:table-cell office:value-type="string" calcext:value-type="string">
            <text:p>Garten Of Banban</text:p>
          </table:table-cell>
          <table:table-cell office:value-type="date" office:date-value="2023-10-30" calcext:value-type="date">
            <text:p>2023-10-30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Cory, Dave, Lyle</text:p>
          </table:table-cell>
          <table:table-cell office:value-type="string" calcext:value-type="string">
            <text:p>nT7zDVUq8ig</text:p>
          </table:table-cell>
          <table:table-cell/>
          <table:table-cell table:formula="of:=&quot;['&quot; &amp; [.A179] &amp; &quot;', '&quot; &amp; YEAR([.B179]) &amp; &quot;-&quot; &amp; MONTH([.B179]) &amp; &quot;-&quot; &amp; DAY([.B179]) &amp; &quot;', '&quot; &amp; [.C179] &amp; &quot;', '&quot; &amp; [.D179] &amp; &quot;', '&quot; &amp; [.E179] &amp; &quot;', '&quot; &amp; [.F179] &amp; &quot;'],&quot;" office:value-type="string" office:string-value="['Garten Of Banban', '2023-10-30', '0:24', 'Cory, Dave, Lyle', 'nT7zDVUq8ig', '']," calcext:value-type="string">
            <text:p>['Garten Of Banban', '2023-10-30', '0:24', 'Cory, Dave, Lyle', 'nT7zDVUq8ig', ''],</text:p>
          </table:table-cell>
        </table:table-row>
        <table:table-row table:style-name="ro1">
          <table:table-cell office:value-type="string" calcext:value-type="string">
            <text:p>Gex</text:p>
          </table:table-cell>
          <table:table-cell office:value-type="date" office:date-value="2017-03-22" calcext:value-type="date">
            <text:p>2017-03-22</text:p>
          </table:table-cell>
          <table:table-cell office:value-type="string" calcext:value-type="string">
            <text:p>0:4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mMzBnStSAV4</text:p>
          </table:table-cell>
          <table:table-cell/>
          <table:table-cell table:formula="of:=&quot;['&quot; &amp; [.A180] &amp; &quot;', '&quot; &amp; YEAR([.B180]) &amp; &quot;-&quot; &amp; MONTH([.B180]) &amp; &quot;-&quot; &amp; DAY([.B180]) &amp; &quot;', '&quot; &amp; [.C180] &amp; &quot;', '&quot; &amp; [.D180] &amp; &quot;', '&quot; &amp; [.E180] &amp; &quot;', '&quot; &amp; [.F180] &amp; &quot;'],&quot;" office:value-type="string" office:string-value="['Gex', '2017-3-22', '0:46', 'Dingdong, Julian', 'mMzBnStSAV4', '']," calcext:value-type="string">
            <text:p>['Gex', '2017-3-22', '0:46', 'Dingdong, Julian', 'mMzBnStSAV4', ''],</text:p>
          </table:table-cell>
        </table:table-row>
        <table:table-row table:style-name="ro1">
          <table:table-cell office:value-type="string" calcext:value-type="string">
            <text:p>Ghostrunner</text:p>
          </table:table-cell>
          <table:table-cell office:value-type="date" office:date-value="2020-11-13" calcext:value-type="date">
            <text:p>2020-11-13</text:p>
          </table:table-cell>
          <table:table-cell office:value-type="string" calcext:value-type="string">
            <text:p>1:0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-yMwJoJdlk</text:p>
          </table:table-cell>
          <table:table-cell/>
          <table:table-cell table:formula="of:=&quot;['&quot; &amp; [.A181] &amp; &quot;', '&quot; &amp; YEAR([.B181]) &amp; &quot;-&quot; &amp; MONTH([.B181]) &amp; &quot;-&quot; &amp; DAY([.B181]) &amp; &quot;', '&quot; &amp; [.C181] &amp; &quot;', '&quot; &amp; [.D181] &amp; &quot;', '&quot; &amp; [.E181] &amp; &quot;', '&quot; &amp; [.F181] &amp; &quot;'],&quot;" office:value-type="string" office:string-value="['Ghostrunner', '2020-11-13', '1:04', 'Lyle, Tomar', 'T-yMwJoJdlk', '']," calcext:value-type="string">
            <text:p>['Ghostrunner', '2020-11-13', '1:04', 'Lyle, Tomar', 'T-yMwJoJdlk', ''],</text:p>
          </table:table-cell>
        </table:table-row>
        <table:table-row table:style-name="ro1">
          <table:table-cell office:value-type="string" calcext:value-type="string">
            <text:p>Ghostwire - Tokyo</text:p>
          </table:table-cell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B1GcyMiMims</text:p>
          </table:table-cell>
          <table:table-cell/>
          <table:table-cell table:formula="of:=&quot;['&quot; &amp; [.A182] &amp; &quot;', '&quot; &amp; YEAR([.B182]) &amp; &quot;-&quot; &amp; MONTH([.B182]) &amp; &quot;-&quot; &amp; DAY([.B182]) &amp; &quot;', '&quot; &amp; [.C182] &amp; &quot;', '&quot; &amp; [.D182] &amp; &quot;', '&quot; &amp; [.E182] &amp; &quot;', '&quot; &amp; [.F182] &amp; &quot;'],&quot;" office:value-type="string" office:string-value="['Ghostwire - Tokyo', '2022-4-5', '0:45', 'Lyle, Tomar', 'B1GcyMiMims', '']," calcext:value-type="string">
            <text:p>['Ghostwire - Tokyo', '2022-4-5', '0:45', 'Lyle, Tomar', 'B1GcyMiMims', ''],</text:p>
          </table:table-cell>
        </table:table-row>
        <table:table-row table:style-name="ro1">
          <table:table-cell office:value-type="string" calcext:value-type="string">
            <text:p>Giants Uprising</text:p>
          </table:table-cell>
          <table:table-cell office:value-type="date" office:date-value="2023-01-13" calcext:value-type="date">
            <text:p>2023-01-13</text:p>
          </table:table-cell>
          <table:table-cell office:value-type="string" calcext:value-type="string">
            <text:p>0:28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TvFavbamMXE</text:p>
          </table:table-cell>
          <table:table-cell/>
          <table:table-cell table:formula="of:=&quot;['&quot; &amp; [.A183] &amp; &quot;', '&quot; &amp; YEAR([.B183]) &amp; &quot;-&quot; &amp; MONTH([.B183]) &amp; &quot;-&quot; &amp; DAY([.B183]) &amp; &quot;', '&quot; &amp; [.C183] &amp; &quot;', '&quot; &amp; [.D183] &amp; &quot;', '&quot; &amp; [.E183] &amp; &quot;', '&quot; &amp; [.F183] &amp; &quot;'],&quot;" office:value-type="string" office:string-value="['Giants Uprising', '2023-1-13', '0:28', 'Zach, Lyle, Tomar', 'TvFavbamMXE', '']," calcext:value-type="string">
            <text:p>['Giants Uprising', '2023-1-13', '0:28', 'Zach, Lyle, Tomar', 'TvFavbamMXE', ''],</text:p>
          </table:table-cell>
        </table:table-row>
        <table:table-row table:style-name="ro1">
          <table:table-cell office:value-type="string" calcext:value-type="string">
            <text:p>God Of War</text:p>
          </table:table-cell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1:2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zI_TAHu0GDY</text:p>
          </table:table-cell>
          <table:table-cell/>
          <table:table-cell table:formula="of:=&quot;['&quot; &amp; [.A184] &amp; &quot;', '&quot; &amp; YEAR([.B184]) &amp; &quot;-&quot; &amp; MONTH([.B184]) &amp; &quot;-&quot; &amp; DAY([.B184]) &amp; &quot;', '&quot; &amp; [.C184] &amp; &quot;', '&quot; &amp; [.D184] &amp; &quot;', '&quot; &amp; [.E184] &amp; &quot;', '&quot; &amp; [.F184] &amp; &quot;'],&quot;" office:value-type="string" office:string-value="['God Of War', '2017-10-13', '1:25', 'Lyle, Tomar', 'zI_TAHu0GDY', '']," calcext:value-type="string">
            <text:p>['God Of War', '2017-10-13', '1:25', 'Lyle, Tomar', 'zI_TAHu0GDY', ''],</text:p>
          </table:table-cell>
        </table:table-row>
        <table:table-row table:style-name="ro1">
          <table:table-cell office:value-type="string" calcext:value-type="string">
            <text:p>God Of War Remake</text:p>
          </table:table-cell>
          <table:table-cell office:value-type="date" office:date-value="2018-04-28" calcext:value-type="date">
            <text:p>2018-04-28</text:p>
          </table:table-cell>
          <table:table-cell office:value-type="string" calcext:value-type="string">
            <text:p>1:0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uzkG9ePbC84</text:p>
          </table:table-cell>
          <table:table-cell/>
          <table:table-cell table:formula="of:=&quot;['&quot; &amp; [.A185] &amp; &quot;', '&quot; &amp; YEAR([.B185]) &amp; &quot;-&quot; &amp; MONTH([.B185]) &amp; &quot;-&quot; &amp; DAY([.B185]) &amp; &quot;', '&quot; &amp; [.C185] &amp; &quot;', '&quot; &amp; [.D185] &amp; &quot;', '&quot; &amp; [.E185] &amp; &quot;', '&quot; &amp; [.F185] &amp; &quot;'],&quot;" office:value-type="string" office:string-value="['God Of War Remake', '2018-4-28', '1:03', 'Zach, Tomar', 'uzkG9ePbC84', '']," calcext:value-type="string">
            <text:p>['God Of War Remake', '2018-4-28', '1:03', 'Zach, Tomar', 'uzkG9ePbC84', ''],</text:p>
          </table:table-cell>
        </table:table-row>
        <table:table-row table:style-name="ro1">
          <table:table-cell office:value-type="string" calcext:value-type="string">
            <text:p>Golden Axe</text:p>
          </table:table-cell>
          <table:table-cell office:value-type="date" office:date-value="2020-03-05" calcext:value-type="date">
            <text:p>2020-03-05</text:p>
          </table:table-cell>
          <table:table-cell office:value-type="string" calcext:value-type="string">
            <text:p>1:0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_aVQBSWJTuY</text:p>
          </table:table-cell>
          <table:table-cell/>
          <table:table-cell table:formula="of:=&quot;['&quot; &amp; [.A186] &amp; &quot;', '&quot; &amp; YEAR([.B186]) &amp; &quot;-&quot; &amp; MONTH([.B186]) &amp; &quot;-&quot; &amp; DAY([.B186]) &amp; &quot;', '&quot; &amp; [.C186] &amp; &quot;', '&quot; &amp; [.D186] &amp; &quot;', '&quot; &amp; [.E186] &amp; &quot;', '&quot; &amp; [.F186] &amp; &quot;'],&quot;" office:value-type="string" office:string-value="['Golden Axe', '2020-3-5', '1:04', 'Lyle, Tomar', '_aVQBSWJTuY', '']," calcext:value-type="string">
            <text:p>['Golden Axe', '2020-3-5', '1:04', 'Lyle, Tomar', '_aVQBSWJTuY', ''],</text:p>
          </table:table-cell>
        </table:table-row>
        <table:table-row table:style-name="ro1">
          <table:table-cell office:value-type="string" calcext:value-type="string">
            <text:p>Golden Light</text:p>
          </table:table-cell>
          <table:table-cell office:value-type="date" office:date-value="2021-10-24" calcext:value-type="date">
            <text:p>2021-10-24</text:p>
          </table:table-cell>
          <table:table-cell office:value-type="string" calcext:value-type="string">
            <text:p>0:3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qcHDFZflt3c</text:p>
          </table:table-cell>
          <table:table-cell/>
          <table:table-cell table:formula="of:=&quot;['&quot; &amp; [.A187] &amp; &quot;', '&quot; &amp; YEAR([.B187]) &amp; &quot;-&quot; &amp; MONTH([.B187]) &amp; &quot;-&quot; &amp; DAY([.B187]) &amp; &quot;', '&quot; &amp; [.C187] &amp; &quot;', '&quot; &amp; [.D187] &amp; &quot;', '&quot; &amp; [.E187] &amp; &quot;', '&quot; &amp; [.F187] &amp; &quot;'],&quot;" office:value-type="string" office:string-value="['Golden Light', '2021-10-24', '0:38', 'Lyle, Tomar', 'qcHDFZflt3c', '']," calcext:value-type="string">
            <text:p>['Golden Light', '2021-10-24', '0:38', 'Lyle, Tomar', 'qcHDFZflt3c', ''],</text:p>
          </table:table-cell>
        </table:table-row>
        <table:table-row table:style-name="ro1">
          <table:table-cell office:value-type="string" calcext:value-type="string">
            <text:p>Gollum</text:p>
          </table:table-cell>
          <table:table-cell office:value-type="date" office:date-value="2023-05-31" calcext:value-type="date">
            <text:p>2023-05-31</text:p>
          </table:table-cell>
          <table:table-cell office:value-type="string" calcext:value-type="string">
            <text:p>1:15</text:p>
          </table:table-cell>
          <table:table-cell office:value-type="string" calcext:value-type="string">
            <text:p>Cory, Tomar, Adam P</text:p>
          </table:table-cell>
          <table:table-cell office:value-type="string" calcext:value-type="string">
            <text:p>SZ7gR3dC-Ic</text:p>
          </table:table-cell>
          <table:table-cell/>
          <table:table-cell table:formula="of:=&quot;['&quot; &amp; [.A188] &amp; &quot;', '&quot; &amp; YEAR([.B188]) &amp; &quot;-&quot; &amp; MONTH([.B188]) &amp; &quot;-&quot; &amp; DAY([.B188]) &amp; &quot;', '&quot; &amp; [.C188] &amp; &quot;', '&quot; &amp; [.D188] &amp; &quot;', '&quot; &amp; [.E188] &amp; &quot;', '&quot; &amp; [.F188] &amp; &quot;'],&quot;" office:value-type="string" office:string-value="['Gollum', '2023-5-31', '1:15', 'Cory, Tomar, Adam P', 'SZ7gR3dC-Ic', '']," calcext:value-type="string">
            <text:p>['Gollum', '2023-5-31', '1:15', 'Cory, Tomar, Adam P', 'SZ7gR3dC-Ic', ''],</text:p>
          </table:table-cell>
        </table:table-row>
        <table:table-row table:style-name="ro1">
          <table:table-cell office:value-type="string" calcext:value-type="string">
            <text:p>Graffiti Kingdom</text:p>
          </table:table-cell>
          <table:table-cell office:value-type="date" office:date-value="2025-02-17" calcext:value-type="date">
            <text:p>2025-02-17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xJHJFEnYn8A</text:p>
          </table:table-cell>
          <table:table-cell/>
          <table:table-cell table:formula="of:=&quot;['&quot; &amp; [.A189] &amp; &quot;', '&quot; &amp; YEAR([.B189]) &amp; &quot;-&quot; &amp; MONTH([.B189]) &amp; &quot;-&quot; &amp; DAY([.B189]) &amp; &quot;', '&quot; &amp; [.C189] &amp; &quot;', '&quot; &amp; [.D189] &amp; &quot;', '&quot; &amp; [.E189] &amp; &quot;', '&quot; &amp; [.F189] &amp; &quot;'],&quot;" office:value-type="string" office:string-value="['Graffiti Kingdom', '2025-2-17', '5:24', 'Cory, Dave', 'xJHJFEnYn8A', '']," calcext:value-type="string">
            <text:p>['Graffiti Kingdom', '2025-2-17', '5:24', 'Cory, Dave', 'xJHJFEnYn8A', ''],</text:p>
          </table:table-cell>
        </table:table-row>
        <table:table-row table:style-name="ro1">
          <table:table-cell office:value-type="string" calcext:value-type="string">
            <text:p>Grime</text:p>
          </table:table-cell>
          <table:table-cell office:value-type="date" office:date-value="2021-08-31" calcext:value-type="date">
            <text:p>2021-08-31</text:p>
          </table:table-cell>
          <table:table-cell office:value-type="string" calcext:value-type="string">
            <text:p>0:4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uZGmRtGHnM</text:p>
          </table:table-cell>
          <table:table-cell/>
          <table:table-cell table:formula="of:=&quot;['&quot; &amp; [.A190] &amp; &quot;', '&quot; &amp; YEAR([.B190]) &amp; &quot;-&quot; &amp; MONTH([.B190]) &amp; &quot;-&quot; &amp; DAY([.B190]) &amp; &quot;', '&quot; &amp; [.C190] &amp; &quot;', '&quot; &amp; [.D190] &amp; &quot;', '&quot; &amp; [.E190] &amp; &quot;', '&quot; &amp; [.F190] &amp; &quot;'],&quot;" office:value-type="string" office:string-value="['Grime', '2021-8-31', '0:46', 'Lyle, Tomar', 'xuZGmRtGHnM', '']," calcext:value-type="string">
            <text:p>['Grime', '2021-8-31', '0:46', 'Lyle, Tomar', 'xuZGmRtGHnM', ''],</text:p>
          </table:table-cell>
        </table:table-row>
        <table:table-row table:style-name="ro1">
          <table:table-cell office:value-type="string" calcext:value-type="string">
            <text:p>Grinch, The</text:p>
          </table:table-cell>
          <table:table-cell office:value-type="date" office:date-value="2016-12-21" calcext:value-type="date">
            <text:p>2016-12-21</text:p>
          </table:table-cell>
          <table:table-cell office:value-type="string" calcext:value-type="string">
            <text:p>0:19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gHLjp4EbV4I</text:p>
          </table:table-cell>
          <table:table-cell/>
          <table:table-cell table:formula="of:=&quot;['&quot; &amp; [.A191] &amp; &quot;', '&quot; &amp; YEAR([.B191]) &amp; &quot;-&quot; &amp; MONTH([.B191]) &amp; &quot;-&quot; &amp; DAY([.B191]) &amp; &quot;', '&quot; &amp; [.C191] &amp; &quot;', '&quot; &amp; [.D191] &amp; &quot;', '&quot; &amp; [.E191] &amp; &quot;', '&quot; &amp; [.F191] &amp; &quot;'],&quot;" office:value-type="string" office:string-value="['Grinch, The', '2016-12-21', '0:19', 'Dingdong, Julian', 'gHLjp4EbV4I', '']," calcext:value-type="string">
            <text:p>['Grinch, The', '2016-12-21', '0:19', 'Dingdong, Julian', 'gHLjp4EbV4I', ''],</text:p>
          </table:table-cell>
        </table:table-row>
        <table:table-row table:style-name="ro1">
          <table:table-cell office:value-type="string" calcext:value-type="string">
            <text:p>GTA - San Andreas (Definitive)</text:p>
          </table:table-cell>
          <table:table-cell office:value-type="date" office:date-value="2021-11-26" calcext:value-type="date">
            <text:p>2021-11-26</text:p>
          </table:table-cell>
          <table:table-cell office:value-type="string" calcext:value-type="string">
            <text:p>0:4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0UCOq_W_z1w</text:p>
          </table:table-cell>
          <table:table-cell/>
          <table:table-cell table:formula="of:=&quot;['&quot; &amp; [.A192] &amp; &quot;', '&quot; &amp; YEAR([.B192]) &amp; &quot;-&quot; &amp; MONTH([.B192]) &amp; &quot;-&quot; &amp; DAY([.B192]) &amp; &quot;', '&quot; &amp; [.C192] &amp; &quot;', '&quot; &amp; [.D192] &amp; &quot;', '&quot; &amp; [.E192] &amp; &quot;', '&quot; &amp; [.F192] &amp; &quot;'],&quot;" office:value-type="string" office:string-value="['GTA - San Andreas (Definitive)', '2021-11-26', '0:49', 'Lyle, Tomar', '0UCOq_W_z1w', '']," calcext:value-type="string">
            <text:p>['GTA - San Andreas (Definitive)', '2021-11-26', '0:49', 'Lyle, Tomar', '0UCOq_W_z1w', ''],</text:p>
          </table:table-cell>
        </table:table-row>
        <table:table-row table:style-name="ro1">
          <table:table-cell office:value-type="string" calcext:value-type="string">
            <text:p>GTA - Vice City</text:p>
          </table:table-cell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IZpTZqVX6A</text:p>
          </table:table-cell>
          <table:table-cell/>
          <table:table-cell table:formula="of:=&quot;['&quot; &amp; [.A193] &amp; &quot;', '&quot; &amp; YEAR([.B193]) &amp; &quot;-&quot; &amp; MONTH([.B193]) &amp; &quot;-&quot; &amp; DAY([.B193]) &amp; &quot;', '&quot; &amp; [.C193] &amp; &quot;', '&quot; &amp; [.D193] &amp; &quot;', '&quot; &amp; [.E193] &amp; &quot;', '&quot; &amp; [.F193] &amp; &quot;'],&quot;" office:value-type="string" office:string-value="['GTA - Vice City', '2017-12-13', '0:45', 'Dingdong, Julian', 'CIZpTZqVX6A', '']," calcext:value-type="string">
            <text:p>['GTA - Vice City', '2017-12-13', '0:45', 'Dingdong, Julian', 'CIZpTZqVX6A', ''],</text:p>
          </table:table-cell>
        </table:table-row>
        <table:table-row table:style-name="ro1">
          <table:table-cell office:value-type="string" calcext:value-type="string">
            <text:p>GTA - Vice City (Definitive)</text:p>
          </table:table-cell>
          <table:table-cell office:value-type="date" office:date-value="2021-12-16" calcext:value-type="date">
            <text:p>2021-12-16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bHy0gcRaaeA</text:p>
          </table:table-cell>
          <table:table-cell/>
          <table:table-cell table:formula="of:=&quot;['&quot; &amp; [.A194] &amp; &quot;', '&quot; &amp; YEAR([.B194]) &amp; &quot;-&quot; &amp; MONTH([.B194]) &amp; &quot;-&quot; &amp; DAY([.B194]) &amp; &quot;', '&quot; &amp; [.C194] &amp; &quot;', '&quot; &amp; [.D194] &amp; &quot;', '&quot; &amp; [.E194] &amp; &quot;', '&quot; &amp; [.F194] &amp; &quot;'],&quot;" office:value-type="string" office:string-value="['GTA - Vice City (Definitive)', '2021-12-16', '1:09', 'Zach, Tomar', 'bHy0gcRaaeA', '']," calcext:value-type="string">
            <text:p>['GTA - Vice City (Definitive)', '2021-12-16', '1:09', 'Zach, Tomar', 'bHy0gcRaaeA', ''],</text:p>
          </table:table-cell>
        </table:table-row>
        <table:table-row table:style-name="ro1">
          <table:table-cell office:value-type="string" calcext:value-type="string">
            <text:p>GTA 5 Online</text:p>
          </table:table-cell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2:23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rPo3iRe38ww</text:p>
          </table:table-cell>
          <table:table-cell/>
          <table:table-cell table:formula="of:=&quot;['&quot; &amp; [.A195] &amp; &quot;', '&quot; &amp; YEAR([.B195]) &amp; &quot;-&quot; &amp; MONTH([.B195]) &amp; &quot;-&quot; &amp; DAY([.B195]) &amp; &quot;', '&quot; &amp; [.C195] &amp; &quot;', '&quot; &amp; [.D195] &amp; &quot;', '&quot; &amp; [.E195] &amp; &quot;', '&quot; &amp; [.F195] &amp; &quot;'],&quot;" office:value-type="string" office:string-value="['GTA 5 Online', '2020-6-15', '2:23', 'Zach, Lyle, Tomar', 'rPo3iRe38ww', '']," calcext:value-type="string">
            <text:p>['GTA 5 Online', '2020-6-15', '2:23', 'Zach, Lyle, Tomar', 'rPo3iRe38ww', ''],</text:p>
          </table:table-cell>
        </table:table-row>
        <table:table-row table:style-name="ro1">
          <table:table-cell office:value-type="string" calcext:value-type="string">
            <text:p>GTA 5 With Mods</text:p>
          </table:table-cell>
          <table:table-cell office:value-type="date" office:date-value="2015-05-06" calcext:value-type="date">
            <text:p>2015-05-06</text:p>
          </table:table-cell>
          <table:table-cell office:value-type="string" calcext:value-type="string">
            <text:p>2:4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R1wQGmiWK4U</text:p>
          </table:table-cell>
          <table:table-cell/>
          <table:table-cell table:formula="of:=&quot;['&quot; &amp; [.A196] &amp; &quot;', '&quot; &amp; YEAR([.B196]) &amp; &quot;-&quot; &amp; MONTH([.B196]) &amp; &quot;-&quot; &amp; DAY([.B196]) &amp; &quot;', '&quot; &amp; [.C196] &amp; &quot;', '&quot; &amp; [.D196] &amp; &quot;', '&quot; &amp; [.E196] &amp; &quot;', '&quot; &amp; [.F196] &amp; &quot;'],&quot;" office:value-type="string" office:string-value="['GTA 5 With Mods', '2015-5-6', '2:40', 'Dingdong, Julian', 'R1wQGmiWK4U', '']," calcext:value-type="string">
            <text:p>['GTA 5 With Mods', '2015-5-6', '2:40', 'Dingdong, Julian', 'R1wQGmiWK4U', ''],</text:p>
          </table:table-cell>
        </table:table-row>
        <table:table-row table:style-name="ro1">
          <table:table-cell office:value-type="string" calcext:value-type="string">
            <text:p>Guts And Glory</text:p>
          </table:table-cell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0:36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8s6Apr06LPE</text:p>
          </table:table-cell>
          <table:table-cell/>
          <table:table-cell table:formula="of:=&quot;['&quot; &amp; [.A197] &amp; &quot;', '&quot; &amp; YEAR([.B197]) &amp; &quot;-&quot; &amp; MONTH([.B197]) &amp; &quot;-&quot; &amp; DAY([.B197]) &amp; &quot;', '&quot; &amp; [.C197] &amp; &quot;', '&quot; &amp; [.D197] &amp; &quot;', '&quot; &amp; [.E197] &amp; &quot;', '&quot; &amp; [.F197] &amp; &quot;'],&quot;" office:value-type="string" office:string-value="['Guts And Glory', '2020-2-8', '0:36', 'Zach, Tomar', '8s6Apr06LPE', '']," calcext:value-type="string">
            <text:p>['Guts And Glory', '2020-2-8', '0:36', 'Zach, Tomar', '8s6Apr06LPE', ''],</text:p>
          </table:table-cell>
        </table:table-row>
        <table:table-row table:style-name="ro1">
          <table:table-cell office:value-type="string" calcext:value-type="string">
            <text:p>H1Z1</text:p>
          </table:table-cell>
          <table:table-cell office:value-type="date" office:date-value="2015-09-11" calcext:value-type="date">
            <text:p>2015-09-11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jlLmRYtYwMs</text:p>
          </table:table-cell>
          <table:table-cell/>
          <table:table-cell table:formula="of:=&quot;['&quot; &amp; [.A198] &amp; &quot;', '&quot; &amp; YEAR([.B198]) &amp; &quot;-&quot; &amp; MONTH([.B198]) &amp; &quot;-&quot; &amp; DAY([.B198]) &amp; &quot;', '&quot; &amp; [.C198] &amp; &quot;', '&quot; &amp; [.D198] &amp; &quot;', '&quot; &amp; [.E198] &amp; &quot;', '&quot; &amp; [.F198] &amp; &quot;'],&quot;" office:value-type="string" office:string-value="['H1Z1', '2015-9-11', '0:10', 'Solo', 'jlLmRYtYwMs', '']," calcext:value-type="string">
            <text:p>['H1Z1', '2015-9-11', '0:10', 'Solo', 'jlLmRYtYwMs', ''],</text:p>
          </table:table-cell>
        </table:table-row>
        <table:table-row table:style-name="ro1">
          <table:table-cell office:value-type="string" calcext:value-type="string">
            <text:p>Hades</text:p>
          </table:table-cell>
          <table:table-cell office:value-type="date" office:date-value="2020-11-14" calcext:value-type="date">
            <text:p>2020-11-14</text:p>
          </table:table-cell>
          <table:table-cell office:value-type="string" calcext:value-type="string">
            <text:p>1:3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Csl9PkdOW7c</text:p>
          </table:table-cell>
          <table:table-cell/>
          <table:table-cell table:formula="of:=&quot;['&quot; &amp; [.A199] &amp; &quot;', '&quot; &amp; YEAR([.B199]) &amp; &quot;-&quot; &amp; MONTH([.B199]) &amp; &quot;-&quot; &amp; DAY([.B199]) &amp; &quot;', '&quot; &amp; [.C199] &amp; &quot;', '&quot; &amp; [.D199] &amp; &quot;', '&quot; &amp; [.E199] &amp; &quot;', '&quot; &amp; [.F199] &amp; &quot;'],&quot;" office:value-type="string" office:string-value="['Hades', '2020-11-14', '1:36', 'Lyle, Tomar', 'Csl9PkdOW7c', '']," calcext:value-type="string">
            <text:p>['Hades', '2020-11-14', '1:36', 'Lyle, Tomar', 'Csl9PkdOW7c', ''],</text:p>
          </table:table-cell>
        </table:table-row>
        <table:table-row table:style-name="ro1">
          <table:table-cell office:value-type="string" calcext:value-type="string">
            <text:p>Half Sword</text:p>
          </table:table-cell>
          <table:table-cell office:value-type="date" office:date-value="2026-01-21" calcext:value-type="date">
            <text:p>2026-01-21</text:p>
          </table:table-cell>
          <table:table-cell office:value-type="string" calcext:value-type="string">
            <text:p>0:51</text:p>
          </table:table-cell>
          <table:table-cell office:value-type="string" calcext:value-type="string">
            <text:p>Lyle, Tomar, Zach</text:p>
          </table:table-cell>
          <table:table-cell office:value-type="string" calcext:value-type="string">
            <text:p>EfwFslFXpWk</text:p>
          </table:table-cell>
          <table:table-cell/>
          <table:table-cell table:formula="of:=&quot;['&quot; &amp; [.A200] &amp; &quot;', '&quot; &amp; YEAR([.B200]) &amp; &quot;-&quot; &amp; MONTH([.B200]) &amp; &quot;-&quot; &amp; DAY([.B200]) &amp; &quot;', '&quot; &amp; [.C200] &amp; &quot;', '&quot; &amp; [.D200] &amp; &quot;', '&quot; &amp; [.E200] &amp; &quot;', '&quot; &amp; [.F200] &amp; &quot;'],&quot;" office:value-type="string" office:string-value="['Half Sword', '2026-1-21', '0:51', 'Lyle, Tomar, Zach', 'EfwFslFXpWk', '']," calcext:value-type="string">
            <text:p>['Half Sword', '2026-1-21', '0:51', 'Lyle, Tomar, Zach', 'EfwFslFXpWk', ''],</text:p>
          </table:table-cell>
        </table:table-row>
        <table:table-row table:style-name="ro1">
          <table:table-cell office:value-type="string" calcext:value-type="string">
            <text:p>Half-Life 2 (2015) - Ep 1</text:p>
          </table:table-cell>
          <table:table-cell office:value-type="date" office:date-value="2015-02-18" calcext:value-type="date">
            <text:p>2015-02-18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CNACPLAe6XE</text:p>
          </table:table-cell>
          <table:table-cell/>
          <table:table-cell table:formula="of:=&quot;['&quot; &amp; [.A201] &amp; &quot;', '&quot; &amp; YEAR([.B201]) &amp; &quot;-&quot; &amp; MONTH([.B201]) &amp; &quot;-&quot; &amp; DAY([.B201]) &amp; &quot;', '&quot; &amp; [.C201] &amp; &quot;', '&quot; &amp; [.D201] &amp; &quot;', '&quot; &amp; [.E201] &amp; &quot;', '&quot; &amp; [.F201] &amp; &quot;'],&quot;" office:value-type="string" office:string-value="['Half-Life 2 (2015) - Ep 1', '2015-2-18', '0:11', 'Solo', 'CNACPLAe6XE', '']," calcext:value-type="string">
            <text:p>['Half-Life 2 (2015) - Ep 1', '2015-2-18', '0:11', 'Solo', 'CNACPLAe6XE', ''],</text:p>
          </table:table-cell>
        </table:table-row>
        <table:table-row table:style-name="ro1">
          <table:table-cell office:value-type="string" calcext:value-type="string">
            <text:p>Half-Life 2 (2015) - Ep 2</text:p>
          </table:table-cell>
          <table:table-cell office:value-type="date" office:date-value="2015-02-19" calcext:value-type="date">
            <text:p>2015-02-19</text:p>
          </table:table-cell>
          <table:table-cell office:value-type="string" calcext:value-type="string">
            <text:p>0:1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bZJ7xQVN4sI</text:p>
          </table:table-cell>
          <table:table-cell/>
          <table:table-cell table:formula="of:=&quot;['&quot; &amp; [.A202] &amp; &quot;', '&quot; &amp; YEAR([.B202]) &amp; &quot;-&quot; &amp; MONTH([.B202]) &amp; &quot;-&quot; &amp; DAY([.B202]) &amp; &quot;', '&quot; &amp; [.C202] &amp; &quot;', '&quot; &amp; [.D202] &amp; &quot;', '&quot; &amp; [.E202] &amp; &quot;', '&quot; &amp; [.F202] &amp; &quot;'],&quot;" office:value-type="string" office:string-value="['Half-Life 2 (2015) - Ep 2', '2015-2-19', '0:12', 'Solo', 'bZJ7xQVN4sI', '']," calcext:value-type="string">
            <text:p>['Half-Life 2 (2015) - Ep 2', '2015-2-19', '0:12', 'Solo', 'bZJ7xQVN4sI', ''],</text:p>
          </table:table-cell>
        </table:table-row>
        <table:table-row table:style-name="ro1">
          <table:table-cell office:value-type="string" calcext:value-type="string">
            <text:p>Half-Life 2 (2019)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1:1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NLasCk67Wcc</text:p>
          </table:table-cell>
          <table:table-cell/>
          <table:table-cell table:formula="of:=&quot;['&quot; &amp; [.A203] &amp; &quot;', '&quot; &amp; YEAR([.B203]) &amp; &quot;-&quot; &amp; MONTH([.B203]) &amp; &quot;-&quot; &amp; DAY([.B203]) &amp; &quot;', '&quot; &amp; [.C203] &amp; &quot;', '&quot; &amp; [.D203] &amp; &quot;', '&quot; &amp; [.E203] &amp; &quot;', '&quot; &amp; [.F203] &amp; &quot;'],&quot;" office:value-type="string" office:string-value="['Half-Life 2 (2019)', '2019-7-26', '1:15', 'Lyle, Tomar', 'NLasCk67Wcc', '']," calcext:value-type="string">
            <text:p>['Half-Life 2 (2019)', '2019-7-26', '1:15', 'Lyle, Tomar', 'NLasCk67Wcc', ''],</text:p>
          </table:table-cell>
        </table:table-row>
        <table:table-row table:style-name="ro1">
          <table:table-cell office:value-type="string" calcext:value-type="string">
            <text:p>Half-Life Alyx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1:15</text:p>
          </table:table-cell>
          <table:table-cell office:value-type="string" calcext:value-type="string">
            <text:p>Niall, Cory, Dave</text:p>
          </table:table-cell>
          <table:table-cell office:value-type="string" calcext:value-type="string">
            <text:p>D0czfqrj2WQ</text:p>
          </table:table-cell>
          <table:table-cell/>
          <table:table-cell table:formula="of:=&quot;['&quot; &amp; [.A204] &amp; &quot;', '&quot; &amp; YEAR([.B204]) &amp; &quot;-&quot; &amp; MONTH([.B204]) &amp; &quot;-&quot; &amp; DAY([.B204]) &amp; &quot;', '&quot; &amp; [.C204] &amp; &quot;', '&quot; &amp; [.D204] &amp; &quot;', '&quot; &amp; [.E204] &amp; &quot;', '&quot; &amp; [.F204] &amp; &quot;'],&quot;" office:value-type="string" office:string-value="['Half-Life Alyx', '2024-12-5', '1:15', 'Niall, Cory, Dave', 'D0czfqrj2WQ', '']," calcext:value-type="string">
            <text:p>['Half-Life Alyx', '2024-12-5', '1:15', 'Niall, Cory, Dave', 'D0czfqrj2WQ', ''],</text:p>
          </table:table-cell>
        </table:table-row>
        <table:table-row table:style-name="ro1">
          <table:table-cell office:value-type="string" calcext:value-type="string">
            <text:p>Half-Life Co-Op</text:p>
          </table:table-cell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Waffle, Steve</text:p>
          </table:table-cell>
          <table:table-cell office:value-type="string" calcext:value-type="string">
            <text:p>r87bWYkOP5w</text:p>
          </table:table-cell>
          <table:table-cell/>
          <table:table-cell table:formula="of:=&quot;['&quot; &amp; [.A205] &amp; &quot;', '&quot; &amp; YEAR([.B205]) &amp; &quot;-&quot; &amp; MONTH([.B205]) &amp; &quot;-&quot; &amp; DAY([.B205]) &amp; &quot;', '&quot; &amp; [.C205] &amp; &quot;', '&quot; &amp; [.D205] &amp; &quot;', '&quot; &amp; [.E205] &amp; &quot;', '&quot; &amp; [.F205] &amp; &quot;'],&quot;" office:value-type="string" office:string-value="['Half-Life Co-Op', '2018-6-1', '0:23', 'Waffle, Steve', 'r87bWYkOP5w', '']," calcext:value-type="string">
            <text:p>['Half-Life Co-Op', '2018-6-1', '0:23', 'Waffle, Steve', 'r87bWYkOP5w', ''],</text:p>
          </table:table-cell>
        </table:table-row>
        <table:table-row table:style-name="ro1">
          <table:table-cell office:value-type="string" calcext:value-type="string">
            <text:p>Halo 3</text:p>
          </table:table-cell>
          <table:table-cell office:value-type="date" office:date-value="2018-05-19" calcext:value-type="date">
            <text:p>2018-05-19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Z7K71hudSh8</text:p>
          </table:table-cell>
          <table:table-cell/>
          <table:table-cell table:formula="of:=&quot;['&quot; &amp; [.A206] &amp; &quot;', '&quot; &amp; YEAR([.B206]) &amp; &quot;-&quot; &amp; MONTH([.B206]) &amp; &quot;-&quot; &amp; DAY([.B206]) &amp; &quot;', '&quot; &amp; [.C206] &amp; &quot;', '&quot; &amp; [.D206] &amp; &quot;', '&quot; &amp; [.E206] &amp; &quot;', '&quot; &amp; [.F206] &amp; &quot;'],&quot;" office:value-type="string" office:string-value="['Halo 3', '2018-5-19', '0:10', 'Dingdong, Julian', 'Z7K71hudSh8', '']," calcext:value-type="string">
            <text:p>['Halo 3', '2018-5-19', '0:10', 'Dingdong, Julian', 'Z7K71hudSh8', ''],</text:p>
          </table:table-cell>
        </table:table-row>
        <table:table-row table:style-name="ro1">
          <table:table-cell office:value-type="string" calcext:value-type="string">
            <text:p>Halo Infinite</text:p>
          </table:table-cell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dnmh1Q43Rk</text:p>
          </table:table-cell>
          <table:table-cell/>
          <table:table-cell table:formula="of:=&quot;['&quot; &amp; [.A207] &amp; &quot;', '&quot; &amp; YEAR([.B207]) &amp; &quot;-&quot; &amp; MONTH([.B207]) &amp; &quot;-&quot; &amp; DAY([.B207]) &amp; &quot;', '&quot; &amp; [.C207] &amp; &quot;', '&quot; &amp; [.D207] &amp; &quot;', '&quot; &amp; [.E207] &amp; &quot;', '&quot; &amp; [.F207] &amp; &quot;'],&quot;" office:value-type="string" office:string-value="['Halo Infinite', '2022-2-4', '1:09', 'Lyle, Tomar', 'Tdnmh1Q43Rk', '']," calcext:value-type="string">
            <text:p>['Halo Infinite', '2022-2-4', '1:09', 'Lyle, Tomar', 'Tdnmh1Q43Rk', ''],</text:p>
          </table:table-cell>
        </table:table-row>
        <table:table-row table:style-name="ro1">
          <table:table-cell office:value-type="string" calcext:value-type="string">
            <text:p>Haneko's Late Homework</text:p>
          </table:table-cell>
          <table:table-cell office:value-type="date" office:date-value="2024-10-21" calcext:value-type="date">
            <text:p>2024-10-21</text:p>
          </table:table-cell>
          <table:table-cell office:value-type="string" calcext:value-type="string">
            <text:p>0:38</text:p>
          </table:table-cell>
          <table:table-cell office:value-type="string" calcext:value-type="string">
            <text:p>Niall, Adam, Tomar</text:p>
          </table:table-cell>
          <table:table-cell office:value-type="string" calcext:value-type="string">
            <text:p>_jNzaPDi2pU</text:p>
          </table:table-cell>
          <table:table-cell/>
          <table:table-cell table:formula="of:=&quot;['&quot; &amp; [.A208] &amp; &quot;', '&quot; &amp; YEAR([.B208]) &amp; &quot;-&quot; &amp; MONTH([.B208]) &amp; &quot;-&quot; &amp; DAY([.B208]) &amp; &quot;', '&quot; &amp; [.C208] &amp; &quot;', '&quot; &amp; [.D208] &amp; &quot;', '&quot; &amp; [.E208] &amp; &quot;', '&quot; &amp; [.F208] &amp; &quot;'],&quot;" office:value-type="string" office:string-value="['Haneko's Late Homework', '2024-10-21', '0:38', 'Niall, Adam, Tomar', '_jNzaPDi2pU', '']," calcext:value-type="string">
            <text:p>['Haneko's Late Homework', '2024-10-21', '0:38', 'Niall, Adam, Tomar', '_jNzaPDi2pU', ''],</text:p>
          </table:table-cell>
        </table:table-row>
        <table:table-row table:style-name="ro1">
          <table:table-cell office:value-type="string" calcext:value-type="string">
            <text:p>Harley's Humongous Adventure</text:p>
          </table:table-cell>
          <table:table-cell office:value-type="date" office:date-value="2024-05-04" calcext:value-type="date">
            <text:p>2024-05-04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Adam, Cory</text:p>
          </table:table-cell>
          <table:table-cell office:value-type="string" calcext:value-type="string">
            <text:p>OLcPoZqfgfA</text:p>
          </table:table-cell>
          <table:table-cell/>
          <table:table-cell table:formula="of:=&quot;['&quot; &amp; [.A209] &amp; &quot;', '&quot; &amp; YEAR([.B209]) &amp; &quot;-&quot; &amp; MONTH([.B209]) &amp; &quot;-&quot; &amp; DAY([.B209]) &amp; &quot;', '&quot; &amp; [.C209] &amp; &quot;', '&quot; &amp; [.D209] &amp; &quot;', '&quot; &amp; [.E209] &amp; &quot;', '&quot; &amp; [.F209] &amp; &quot;'],&quot;" office:value-type="string" office:string-value="['Harley's Humongous Adventure', '2024-5-4', '0:43', 'Adam, Cory', 'OLcPoZqfgfA', '']," calcext:value-type="string">
            <text:p>['Harley's Humongous Adventure', '2024-5-4', '0:43', 'Adam, Cory', 'OLcPoZqfgfA', ''],</text:p>
          </table:table-cell>
        </table:table-row>
        <table:table-row table:style-name="ro1">
          <table:table-cell office:value-type="string" calcext:value-type="string">
            <text:p>Harry Potter and the Chamber of Secrets (2014) - Ep 1</text:p>
          </table:table-cell>
          <table:table-cell office:value-type="date" office:date-value="2014-11-06" calcext:value-type="date">
            <text:p>2014-11-06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pmvlrFP7kBc</text:p>
          </table:table-cell>
          <table:table-cell/>
          <table:table-cell table:formula="of:=&quot;['&quot; &amp; [.A210] &amp; &quot;', '&quot; &amp; YEAR([.B210]) &amp; &quot;-&quot; &amp; MONTH([.B210]) &amp; &quot;-&quot; &amp; DAY([.B210]) &amp; &quot;', '&quot; &amp; [.C210] &amp; &quot;', '&quot; &amp; [.D210] &amp; &quot;', '&quot; &amp; [.E210] &amp; &quot;', '&quot; &amp; [.F210] &amp; &quot;'],&quot;" office:value-type="string" office:string-value="['Harry Potter and the Chamber of Secrets (2014) - Ep 1', '2014-11-6', '0:10', 'Solo', 'pmvlrFP7kBc', '']," calcext:value-type="string">
            <text:p>['Harry Potter and the Chamber of Secrets (2014) - Ep 1', '2014-11-6', '0:10', 'Solo', 'pmvlrFP7kBc', ''],</text:p>
          </table:table-cell>
        </table:table-row>
        <table:table-row table:style-name="ro1">
          <table:table-cell office:value-type="string" calcext:value-type="string">
            <text:p>Harry Potter and the Chamber of Secrets (2014) - Ep 2</text:p>
          </table:table-cell>
          <table:table-cell office:value-type="date" office:date-value="2014-11-06" calcext:value-type="date">
            <text:p>2014-11-06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V5e_LseSVGI</text:p>
          </table:table-cell>
          <table:table-cell/>
          <table:table-cell table:formula="of:=&quot;['&quot; &amp; [.A211] &amp; &quot;', '&quot; &amp; YEAR([.B211]) &amp; &quot;-&quot; &amp; MONTH([.B211]) &amp; &quot;-&quot; &amp; DAY([.B211]) &amp; &quot;', '&quot; &amp; [.C211] &amp; &quot;', '&quot; &amp; [.D211] &amp; &quot;', '&quot; &amp; [.E211] &amp; &quot;', '&quot; &amp; [.F211] &amp; &quot;'],&quot;" office:value-type="string" office:string-value="['Harry Potter and the Chamber of Secrets (2014) - Ep 2', '2014-11-6', '0:11', 'Solo', 'V5e_LseSVGI', '']," calcext:value-type="string">
            <text:p>['Harry Potter and the Chamber of Secrets (2014) - Ep 2', '2014-11-6', '0:11', 'Solo', 'V5e_LseSVGI', ''],</text:p>
          </table:table-cell>
        </table:table-row>
        <table:table-row table:style-name="ro1">
          <table:table-cell office:value-type="string" calcext:value-type="string">
            <text:p>Harry Potter and the Chamber of Secrets (2016) - Ep 1</text:p>
          </table:table-cell>
          <table:table-cell office:value-type="date" office:date-value="2016-09-11" calcext:value-type="date">
            <text:p>2016-09-11</text:p>
          </table:table-cell>
          <table:table-cell office:value-type="string" calcext:value-type="string">
            <text:p>0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wllz3DRDmy8</text:p>
          </table:table-cell>
          <table:table-cell/>
          <table:table-cell table:formula="of:=&quot;['&quot; &amp; [.A212] &amp; &quot;', '&quot; &amp; YEAR([.B212]) &amp; &quot;-&quot; &amp; MONTH([.B212]) &amp; &quot;-&quot; &amp; DAY([.B212]) &amp; &quot;', '&quot; &amp; [.C212] &amp; &quot;', '&quot; &amp; [.D212] &amp; &quot;', '&quot; &amp; [.E212] &amp; &quot;', '&quot; &amp; [.F212] &amp; &quot;'],&quot;" office:value-type="string" office:string-value="['Harry Potter and the Chamber of Secrets (2016) - Ep 1', '2016-9-11', '0:12', 'Dingdong, Julian', 'wllz3DRDmy8', '']," calcext:value-type="string">
            <text:p>['Harry Potter and the Chamber of Secrets (2016) - Ep 1', '2016-9-11', '0:12', 'Dingdong, Julian', 'wllz3DRDmy8', ''],</text:p>
          </table:table-cell>
        </table:table-row>
        <table:table-row table:style-name="ro1">
          <table:table-cell office:value-type="string" calcext:value-type="string">
            <text:p>Harry Potter and the Chamber of Secrets (2016) - Ep 2</text:p>
          </table:table-cell>
          <table:table-cell office:value-type="date" office:date-value="2016-09-11" calcext:value-type="date">
            <text:p>2016-09-11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fRmqIbKtMQ</text:p>
          </table:table-cell>
          <table:table-cell/>
          <table:table-cell table:formula="of:=&quot;['&quot; &amp; [.A213] &amp; &quot;', '&quot; &amp; YEAR([.B213]) &amp; &quot;-&quot; &amp; MONTH([.B213]) &amp; &quot;-&quot; &amp; DAY([.B213]) &amp; &quot;', '&quot; &amp; [.C213] &amp; &quot;', '&quot; &amp; [.D213] &amp; &quot;', '&quot; &amp; [.E213] &amp; &quot;', '&quot; &amp; [.F213] &amp; &quot;'],&quot;" office:value-type="string" office:string-value="['Harry Potter and the Chamber of Secrets (2016) - Ep 2', '2016-9-11', '0:11', 'Dingdong, Julian', 'dfRmqIbKtMQ', '']," calcext:value-type="string">
            <text:p>['Harry Potter and the Chamber of Secrets (2016) - Ep 2', '2016-9-11', '0:11', 'Dingdong, Julian', 'dfRmqIbKtMQ', ''],</text:p>
          </table:table-cell>
        </table:table-row>
        <table:table-row table:style-name="ro1">
          <table:table-cell office:value-type="string" calcext:value-type="string">
            <text:p>Harry Potter and the Chamber of Secrets (2016) - Ep 3</text:p>
          </table:table-cell>
          <table:table-cell office:value-type="date" office:date-value="2016-09-12" calcext:value-type="date">
            <text:p>2016-09-12</text:p>
          </table:table-cell>
          <table:table-cell office:value-type="string" calcext:value-type="string">
            <text:p>0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JA3uWd9UsIs</text:p>
          </table:table-cell>
          <table:table-cell/>
          <table:table-cell table:formula="of:=&quot;['&quot; &amp; [.A214] &amp; &quot;', '&quot; &amp; YEAR([.B214]) &amp; &quot;-&quot; &amp; MONTH([.B214]) &amp; &quot;-&quot; &amp; DAY([.B214]) &amp; &quot;', '&quot; &amp; [.C214] &amp; &quot;', '&quot; &amp; [.D214] &amp; &quot;', '&quot; &amp; [.E214] &amp; &quot;', '&quot; &amp; [.F214] &amp; &quot;'],&quot;" office:value-type="string" office:string-value="['Harry Potter and the Chamber of Secrets (2016) - Ep 3', '2016-9-12', '0:12', 'Dingdong, Julian', 'JA3uWd9UsIs', '']," calcext:value-type="string">
            <text:p>['Harry Potter and the Chamber of Secrets (2016) - Ep 3', '2016-9-12', '0:12', 'Dingdong, Julian', 'JA3uWd9UsIs', ''],</text:p>
          </table:table-cell>
        </table:table-row>
        <table:table-row table:style-name="ro1">
          <table:table-cell office:value-type="string" calcext:value-type="string">
            <text:p>Harry Potter And The Chamber Of Secrets (2019)</text:p>
          </table:table-cell>
          <table:table-cell office:value-type="date" office:date-value="2019-05-08" calcext:value-type="date">
            <text:p>2019-05-08</text:p>
          </table:table-cell>
          <table:table-cell office:value-type="string" calcext:value-type="string">
            <text:p>2:16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mae2i1atCWk</text:p>
          </table:table-cell>
          <table:table-cell/>
          <table:table-cell table:formula="of:=&quot;['&quot; &amp; [.A215] &amp; &quot;', '&quot; &amp; YEAR([.B215]) &amp; &quot;-&quot; &amp; MONTH([.B215]) &amp; &quot;-&quot; &amp; DAY([.B215]) &amp; &quot;', '&quot; &amp; [.C215] &amp; &quot;', '&quot; &amp; [.D215] &amp; &quot;', '&quot; &amp; [.E215] &amp; &quot;', '&quot; &amp; [.F215] &amp; &quot;'],&quot;" office:value-type="string" office:string-value="['Harry Potter And The Chamber Of Secrets (2019)', '2019-5-8', '2:16', 'Cory, Tomar', 'mae2i1atCWk', '']," calcext:value-type="string">
            <text:p>['Harry Potter And The Chamber Of Secrets (2019)', '2019-5-8', '2:16', 'Cory, Tomar', 'mae2i1atCWk', ''],</text:p>
          </table:table-cell>
        </table:table-row>
        <table:table-row table:style-name="ro1">
          <table:table-cell office:value-type="string" calcext:value-type="string">
            <text:p>Harry Potter And The Sorcerer's Stone</text:p>
          </table:table-cell>
          <table:table-cell office:value-type="date" office:date-value="2014-09-24" calcext:value-type="date">
            <text:p>2014-09-24</text:p>
          </table:table-cell>
          <table:table-cell office:value-type="string" calcext:value-type="string">
            <text:p>2:5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ld876L0Bv9k</text:p>
          </table:table-cell>
          <table:table-cell/>
          <table:table-cell table:formula="of:=&quot;['&quot; &amp; [.A216] &amp; &quot;', '&quot; &amp; YEAR([.B216]) &amp; &quot;-&quot; &amp; MONTH([.B216]) &amp; &quot;-&quot; &amp; DAY([.B216]) &amp; &quot;', '&quot; &amp; [.C216] &amp; &quot;', '&quot; &amp; [.D216] &amp; &quot;', '&quot; &amp; [.E216] &amp; &quot;', '&quot; &amp; [.F216] &amp; &quot;'],&quot;" office:value-type="string" office:string-value="['Harry Potter And The Sorcerer's Stone', '2014-9-24', '2:54', 'Solo', 'ld876L0Bv9k', '']," calcext:value-type="string">
            <text:p>['Harry Potter And The Sorcerer's Stone', '2014-9-24', '2:54', 'Solo', 'ld876L0Bv9k', ''],</text:p>
          </table:table-cell>
        </table:table-row>
        <table:table-row table:style-name="ro1">
          <table:table-cell office:value-type="string" calcext:value-type="string">
            <text:p>Harry Potter Roleplay - Ep 1</text:p>
          </table:table-cell>
          <table:table-cell office:value-type="date" office:date-value="2018-05-28" calcext:value-type="date">
            <text:p>2018-05-28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Waffle, Steve</text:p>
          </table:table-cell>
          <table:table-cell office:value-type="string" calcext:value-type="string">
            <text:p>89YAaBzrVD8</text:p>
          </table:table-cell>
          <table:table-cell/>
          <table:table-cell table:formula="of:=&quot;['&quot; &amp; [.A217] &amp; &quot;', '&quot; &amp; YEAR([.B217]) &amp; &quot;-&quot; &amp; MONTH([.B217]) &amp; &quot;-&quot; &amp; DAY([.B217]) &amp; &quot;', '&quot; &amp; [.C217] &amp; &quot;', '&quot; &amp; [.D217] &amp; &quot;', '&quot; &amp; [.E217] &amp; &quot;', '&quot; &amp; [.F217] &amp; &quot;'],&quot;" office:value-type="string" office:string-value="['Harry Potter Roleplay - Ep 1', '2018-5-28', '0:21', 'Waffle, Steve', '89YAaBzrVD8', '']," calcext:value-type="string">
            <text:p>['Harry Potter Roleplay - Ep 1', '2018-5-28', '0:21', 'Waffle, Steve', '89YAaBzrVD8', ''],</text:p>
          </table:table-cell>
        </table:table-row>
        <table:table-row table:style-name="ro1">
          <table:table-cell office:value-type="string" calcext:value-type="string">
            <text:p>Harry Potter Roleplay - Ep 2</text:p>
          </table:table-cell>
          <table:table-cell office:value-type="date" office:date-value="2018-05-30" calcext:value-type="date">
            <text:p>2018-05-30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Waffle, Steve</text:p>
          </table:table-cell>
          <table:table-cell office:value-type="string" calcext:value-type="string">
            <text:p>i3NlESX4FDw</text:p>
          </table:table-cell>
          <table:table-cell/>
          <table:table-cell table:formula="of:=&quot;['&quot; &amp; [.A218] &amp; &quot;', '&quot; &amp; YEAR([.B218]) &amp; &quot;-&quot; &amp; MONTH([.B218]) &amp; &quot;-&quot; &amp; DAY([.B218]) &amp; &quot;', '&quot; &amp; [.C218] &amp; &quot;', '&quot; &amp; [.D218] &amp; &quot;', '&quot; &amp; [.E218] &amp; &quot;', '&quot; &amp; [.F218] &amp; &quot;'],&quot;" office:value-type="string" office:string-value="['Harry Potter Roleplay - Ep 2', '2018-5-30', '0:21', 'Waffle, Steve', 'i3NlESX4FDw', '']," calcext:value-type="string">
            <text:p>['Harry Potter Roleplay - Ep 2', '2018-5-30', '0:21', 'Waffle, Steve', 'i3NlESX4FDw', ''],</text:p>
          </table:table-cell>
        </table:table-row>
        <table:table-row table:style-name="ro1">
          <table:table-cell office:value-type="string" calcext:value-type="string">
            <text:p>Harvester</text:p>
          </table:table-cell>
          <table:table-cell office:value-type="date" office:date-value="2021-10-20" calcext:value-type="date">
            <text:p>2021-10-20</text:p>
          </table:table-cell>
          <table:table-cell office:value-type="string" calcext:value-type="string">
            <text:p>1:3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3Q5lD2taqfM</text:p>
          </table:table-cell>
          <table:table-cell/>
          <table:table-cell table:formula="of:=&quot;['&quot; &amp; [.A219] &amp; &quot;', '&quot; &amp; YEAR([.B219]) &amp; &quot;-&quot; &amp; MONTH([.B219]) &amp; &quot;-&quot; &amp; DAY([.B219]) &amp; &quot;', '&quot; &amp; [.C219] &amp; &quot;', '&quot; &amp; [.D219] &amp; &quot;', '&quot; &amp; [.E219] &amp; &quot;', '&quot; &amp; [.F219] &amp; &quot;'],&quot;" office:value-type="string" office:string-value="['Harvester', '2021-10-20', '1:38', 'Lyle, Tomar', '3Q5lD2taqfM', '']," calcext:value-type="string">
            <text:p>['Harvester', '2021-10-20', '1:38', 'Lyle, Tomar', '3Q5lD2taqfM', ''],</text:p>
          </table:table-cell>
        </table:table-row>
        <table:table-row table:style-name="ro1">
          <table:table-cell office:value-type="string" calcext:value-type="string">
            <text:p>Hercules</text:p>
          </table:table-cell>
          <table:table-cell office:value-type="date" office:date-value="2018-08-15" calcext:value-type="date">
            <text:p>2018-08-15</text:p>
          </table:table-cell>
          <table:table-cell office:value-type="string" calcext:value-type="string">
            <text:p>0:5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mEpRfSNZZPk</text:p>
          </table:table-cell>
          <table:table-cell office:value-type="string" calcext:value-type="string">
            <text:p>P9YNKy1aZiQ</text:p>
          </table:table-cell>
          <table:table-cell table:formula="of:=&quot;['&quot; &amp; [.A220] &amp; &quot;', '&quot; &amp; YEAR([.B220]) &amp; &quot;-&quot; &amp; MONTH([.B220]) &amp; &quot;-&quot; &amp; DAY([.B220]) &amp; &quot;', '&quot; &amp; [.C220] &amp; &quot;', '&quot; &amp; [.D220] &amp; &quot;', '&quot; &amp; [.E220] &amp; &quot;', '&quot; &amp; [.F220] &amp; &quot;'],&quot;" office:value-type="string" office:string-value="['Hercules', '2018-8-15', '0:53', 'Zach, Lyle', 'mEpRfSNZZPk', 'P9YNKy1aZiQ']," calcext:value-type="string">
            <text:p>['Hercules', '2018-8-15', '0:53', 'Zach, Lyle', 'mEpRfSNZZPk', 'P9YNKy1aZiQ'],</text:p>
          </table:table-cell>
        </table:table-row>
        <table:table-row table:style-name="ro1">
          <table:table-cell office:value-type="string" calcext:value-type="string">
            <text:p>Hilariously Bad PC Games - Ep 1</text:p>
          </table:table-cell>
          <table:table-cell office:value-type="date" office:date-value="2019-05-11" calcext:value-type="date">
            <text:p>2019-05-11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Waffle, Cory</text:p>
          </table:table-cell>
          <table:table-cell office:value-type="string" calcext:value-type="string">
            <text:p>xCPOjcEt-3s</text:p>
          </table:table-cell>
          <table:table-cell/>
          <table:table-cell table:formula="of:=&quot;['&quot; &amp; [.A221] &amp; &quot;', '&quot; &amp; YEAR([.B221]) &amp; &quot;-&quot; &amp; MONTH([.B221]) &amp; &quot;-&quot; &amp; DAY([.B221]) &amp; &quot;', '&quot; &amp; [.C221] &amp; &quot;', '&quot; &amp; [.D221] &amp; &quot;', '&quot; &amp; [.E221] &amp; &quot;', '&quot; &amp; [.F221] &amp; &quot;'],&quot;" office:value-type="string" office:string-value="['Hilariously Bad PC Games - Ep 1', '2019-5-11', '0:23', 'Waffle, Cory', 'xCPOjcEt-3s', '']," calcext:value-type="string">
            <text:p>['Hilariously Bad PC Games - Ep 1', '2019-5-11', '0:23', 'Waffle, Cory', 'xCPOjcEt-3s', ''],</text:p>
          </table:table-cell>
        </table:table-row>
        <table:table-row table:style-name="ro1">
          <table:table-cell office:value-type="string" calcext:value-type="string">
            <text:p>Hilariously Bad PC Games - Ep 2</text:p>
          </table:table-cell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Waffle, Cory</text:p>
          </table:table-cell>
          <table:table-cell office:value-type="string" calcext:value-type="string">
            <text:p>ocdQB9znQPA</text:p>
          </table:table-cell>
          <table:table-cell/>
          <table:table-cell table:formula="of:=&quot;['&quot; &amp; [.A222] &amp; &quot;', '&quot; &amp; YEAR([.B222]) &amp; &quot;-&quot; &amp; MONTH([.B222]) &amp; &quot;-&quot; &amp; DAY([.B222]) &amp; &quot;', '&quot; &amp; [.C222] &amp; &quot;', '&quot; &amp; [.D222] &amp; &quot;', '&quot; &amp; [.E222] &amp; &quot;', '&quot; &amp; [.F222] &amp; &quot;'],&quot;" office:value-type="string" office:string-value="['Hilariously Bad PC Games - Ep 2', '2019-5-13', '0:21', 'Waffle, Cory', 'ocdQB9znQPA', '']," calcext:value-type="string">
            <text:p>['Hilariously Bad PC Games - Ep 2', '2019-5-13', '0:21', 'Waffle, Cory', 'ocdQB9znQPA', ''],</text:p>
          </table:table-cell>
        </table:table-row>
        <table:table-row table:style-name="ro1">
          <table:table-cell office:value-type="string" calcext:value-type="string">
            <text:p>Hitman 2</text:p>
          </table:table-cell>
          <table:table-cell office:value-type="date" office:date-value="2019-11-22" calcext:value-type="date">
            <text:p>2019-11-22</text:p>
          </table:table-cell>
          <table:table-cell office:value-type="string" calcext:value-type="string">
            <text:p>3:5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YgtKqjS1VB0</text:p>
          </table:table-cell>
          <table:table-cell/>
          <table:table-cell table:formula="of:=&quot;['&quot; &amp; [.A223] &amp; &quot;', '&quot; &amp; YEAR([.B223]) &amp; &quot;-&quot; &amp; MONTH([.B223]) &amp; &quot;-&quot; &amp; DAY([.B223]) &amp; &quot;', '&quot; &amp; [.C223] &amp; &quot;', '&quot; &amp; [.D223] &amp; &quot;', '&quot; &amp; [.E223] &amp; &quot;', '&quot; &amp; [.F223] &amp; &quot;'],&quot;" office:value-type="string" office:string-value="['Hitman 2', '2019-11-22', '3:51', 'Zach, Tomar', 'YgtKqjS1VB0', '']," calcext:value-type="string">
            <text:p>['Hitman 2', '2019-11-22', '3:51', 'Zach, Tomar', 'YgtKqjS1VB0', ''],</text:p>
          </table:table-cell>
        </table:table-row>
        <table:table-row table:style-name="ro1">
          <table:table-cell office:value-type="string" calcext:value-type="string">
            <text:p>Hitman 3</text:p>
          </table:table-cell>
          <table:table-cell office:value-type="date" office:date-value="2021-03-19" calcext:value-type="date">
            <text:p>2021-03-19</text:p>
          </table:table-cell>
          <table:table-cell office:value-type="string" calcext:value-type="string">
            <text:p>1:0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d74Uepi6kog</text:p>
          </table:table-cell>
          <table:table-cell/>
          <table:table-cell table:formula="of:=&quot;['&quot; &amp; [.A224] &amp; &quot;', '&quot; &amp; YEAR([.B224]) &amp; &quot;-&quot; &amp; MONTH([.B224]) &amp; &quot;-&quot; &amp; DAY([.B224]) &amp; &quot;', '&quot; &amp; [.C224] &amp; &quot;', '&quot; &amp; [.D224] &amp; &quot;', '&quot; &amp; [.E224] &amp; &quot;', '&quot; &amp; [.F224] &amp; &quot;'],&quot;" office:value-type="string" office:string-value="['Hitman 3', '2021-3-19', '1:03', 'Zach, Tomar', 'd74Uepi6kog', '']," calcext:value-type="string">
            <text:p>['Hitman 3', '2021-3-19', '1:03', 'Zach, Tomar', 'd74Uepi6kog', ''],</text:p>
          </table:table-cell>
        </table:table-row>
        <table:table-row table:style-name="ro1">
          <table:table-cell office:value-type="string" calcext:value-type="string">
            <text:p>Hogwarts Legacy</text:p>
          </table:table-cell>
          <table:table-cell office:value-type="date" office:date-value="2023-02-12" calcext:value-type="date">
            <text:p>2023-02-12</text:p>
          </table:table-cell>
          <table:table-cell office:value-type="string" calcext:value-type="string">
            <text:p>1:39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V7Yr1Xj7S9E</text:p>
          </table:table-cell>
          <table:table-cell/>
          <table:table-cell table:formula="of:=&quot;['&quot; &amp; [.A225] &amp; &quot;', '&quot; &amp; YEAR([.B225]) &amp; &quot;-&quot; &amp; MONTH([.B225]) &amp; &quot;-&quot; &amp; DAY([.B225]) &amp; &quot;', '&quot; &amp; [.C225] &amp; &quot;', '&quot; &amp; [.D225] &amp; &quot;', '&quot; &amp; [.E225] &amp; &quot;', '&quot; &amp; [.F225] &amp; &quot;'],&quot;" office:value-type="string" office:string-value="['Hogwarts Legacy', '2023-2-12', '1:39', 'Adam, Tomar', 'V7Yr1Xj7S9E', '']," calcext:value-type="string">
            <text:p>['Hogwarts Legacy', '2023-2-12', '1:39', 'Adam, Tomar', 'V7Yr1Xj7S9E', ''],</text:p>
          </table:table-cell>
        </table:table-row>
        <table:table-row table:style-name="ro1">
          <table:table-cell office:value-type="string" calcext:value-type="string">
            <text:p>Hollow Knight</text:p>
          </table:table-cell>
          <table:table-cell office:value-type="date" office:date-value="2018-09-20" calcext:value-type="date">
            <text:p>2018-09-20</text:p>
          </table:table-cell>
          <table:table-cell office:value-type="string" calcext:value-type="string">
            <text:p>0:46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vYtZvFojtFA</text:p>
          </table:table-cell>
          <table:table-cell/>
          <table:table-cell table:formula="of:=&quot;['&quot; &amp; [.A226] &amp; &quot;', '&quot; &amp; YEAR([.B226]) &amp; &quot;-&quot; &amp; MONTH([.B226]) &amp; &quot;-&quot; &amp; DAY([.B226]) &amp; &quot;', '&quot; &amp; [.C226] &amp; &quot;', '&quot; &amp; [.D226] &amp; &quot;', '&quot; &amp; [.E226] &amp; &quot;', '&quot; &amp; [.F226] &amp; &quot;'],&quot;" office:value-type="string" office:string-value="['Hollow Knight', '2018-9-20', '0:46', 'Zach, Tomar', 'vYtZvFojtFA', '']," calcext:value-type="string">
            <text:p>['Hollow Knight', '2018-9-20', '0:46', 'Zach, Tomar', 'vYtZvFojtFA', ''],</text:p>
          </table:table-cell>
        </table:table-row>
        <table:table-row table:style-name="ro1">
          <table:table-cell office:value-type="string" calcext:value-type="string">
            <text:p>Home Alone</text:p>
          </table:table-cell>
          <table:table-cell office:value-type="date" office:date-value="2021-12-25" calcext:value-type="date">
            <text:p>2021-12-25</text:p>
          </table:table-cell>
          <table:table-cell office:value-type="string" calcext:value-type="string">
            <text:p>0:37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oxa9t7ETg1I</text:p>
          </table:table-cell>
          <table:table-cell/>
          <table:table-cell table:formula="of:=&quot;['&quot; &amp; [.A227] &amp; &quot;', '&quot; &amp; YEAR([.B227]) &amp; &quot;-&quot; &amp; MONTH([.B227]) &amp; &quot;-&quot; &amp; DAY([.B227]) &amp; &quot;', '&quot; &amp; [.C227] &amp; &quot;', '&quot; &amp; [.D227] &amp; &quot;', '&quot; &amp; [.E227] &amp; &quot;', '&quot; &amp; [.F227] &amp; &quot;'],&quot;" office:value-type="string" office:string-value="['Home Alone', '2021-12-25', '0:37', 'Zach, Tomar', 'oxa9t7ETg1I', '']," calcext:value-type="string">
            <text:p>['Home Alone', '2021-12-25', '0:37', 'Zach, Tomar', 'oxa9t7ETg1I', ''],</text:p>
          </table:table-cell>
        </table:table-row>
        <table:table-row table:style-name="ro1">
          <table:table-cell office:value-type="string" calcext:value-type="string">
            <text:p>Hot Brass</text:p>
          </table:table-cell>
          <table:table-cell office:value-type="date" office:date-value="2024-05-08" calcext:value-type="date">
            <text:p>2024-05-08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2cKKPArSdcM</text:p>
          </table:table-cell>
          <table:table-cell/>
          <table:table-cell table:formula="of:=&quot;['&quot; &amp; [.A228] &amp; &quot;', '&quot; &amp; YEAR([.B228]) &amp; &quot;-&quot; &amp; MONTH([.B228]) &amp; &quot;-&quot; &amp; DAY([.B228]) &amp; &quot;', '&quot; &amp; [.C228] &amp; &quot;', '&quot; &amp; [.D228] &amp; &quot;', '&quot; &amp; [.E228] &amp; &quot;', '&quot; &amp; [.F228] &amp; &quot;'],&quot;" office:value-type="string" office:string-value="['Hot Brass', '2024-5-8', '0:43', 'Lyle, Tomar', '2cKKPArSdcM', '']," calcext:value-type="string">
            <text:p>['Hot Brass', '2024-5-8', '0:43', 'Lyle, Tomar', '2cKKPArSdcM', ''],</text:p>
          </table:table-cell>
        </table:table-row>
        <table:table-row table:style-name="ro1">
          <table:table-cell office:value-type="string" calcext:value-type="string">
            <text:p>Human Fall Flat</text:p>
          </table:table-cell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1:07</text:p>
          </table:table-cell>
          <table:table-cell office:value-type="string" calcext:value-type="string">
            <text:p>GameGrumps</text:p>
          </table:table-cell>
          <table:table-cell office:value-type="string" calcext:value-type="string">
            <text:p>UVH35M517qY</text:p>
          </table:table-cell>
          <table:table-cell/>
          <table:table-cell table:formula="of:=&quot;['&quot; &amp; [.A229] &amp; &quot;', '&quot; &amp; YEAR([.B229]) &amp; &quot;-&quot; &amp; MONTH([.B229]) &amp; &quot;-&quot; &amp; DAY([.B229]) &amp; &quot;', '&quot; &amp; [.C229] &amp; &quot;', '&quot; &amp; [.D229] &amp; &quot;', '&quot; &amp; [.E229] &amp; &quot;', '&quot; &amp; [.F229] &amp; &quot;'],&quot;" office:value-type="string" office:string-value="['Human Fall Flat', '2020-4-11', '1:07', 'GameGrumps', 'UVH35M517qY', '']," calcext:value-type="string">
            <text:p>['Human Fall Flat', '2020-4-11', '1:07', 'GameGrumps', 'UVH35M517qY', ''],</text:p>
          </table:table-cell>
        </table:table-row>
        <table:table-row table:style-name="ro1">
          <table:table-cell office:value-type="string" calcext:value-type="string">
            <text:p>Ice Climber</text:p>
          </table:table-cell>
          <table:table-cell office:value-type="date" office:date-value="2017-12-23" calcext:value-type="date">
            <text:p>2017-12-23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1qUuLLM5Io</text:p>
          </table:table-cell>
          <table:table-cell/>
          <table:table-cell table:formula="of:=&quot;['&quot; &amp; [.A230] &amp; &quot;', '&quot; &amp; YEAR([.B230]) &amp; &quot;-&quot; &amp; MONTH([.B230]) &amp; &quot;-&quot; &amp; DAY([.B230]) &amp; &quot;', '&quot; &amp; [.C230] &amp; &quot;', '&quot; &amp; [.D230] &amp; &quot;', '&quot; &amp; [.E230] &amp; &quot;', '&quot; &amp; [.F230] &amp; &quot;'],&quot;" office:value-type="string" office:string-value="['Ice Climber', '2017-12-23', '0:21', 'Dingdong, Julian', 'v1qUuLLM5Io', '']," calcext:value-type="string">
            <text:p>['Ice Climber', '2017-12-23', '0:21', 'Dingdong, Julian', 'v1qUuLLM5Io', ''],</text:p>
          </table:table-cell>
        </table:table-row>
        <table:table-row table:style-name="ro1">
          <table:table-cell office:value-type="string" calcext:value-type="string">
            <text:p>Illbleed</text:p>
          </table:table-cell>
          <table:table-cell office:value-type="date" office:date-value="2016-10-30" calcext:value-type="date">
            <text:p>2016-10-30</text:p>
          </table:table-cell>
          <table:table-cell office:value-type="string" calcext:value-type="string">
            <text:p>1:3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MBN3RPHqLBE</text:p>
          </table:table-cell>
          <table:table-cell/>
          <table:table-cell table:formula="of:=&quot;['&quot; &amp; [.A231] &amp; &quot;', '&quot; &amp; YEAR([.B231]) &amp; &quot;-&quot; &amp; MONTH([.B231]) &amp; &quot;-&quot; &amp; DAY([.B231]) &amp; &quot;', '&quot; &amp; [.C231] &amp; &quot;', '&quot; &amp; [.D231] &amp; &quot;', '&quot; &amp; [.E231] &amp; &quot;', '&quot; &amp; [.F231] &amp; &quot;'],&quot;" office:value-type="string" office:string-value="['Illbleed', '2016-10-30', '1:31', 'Dingdong, Julian', 'MBN3RPHqLBE', '']," calcext:value-type="string">
            <text:p>['Illbleed', '2016-10-30', '1:31', 'Dingdong, Julian', 'MBN3RPHqLBE', ''],</text:p>
          </table:table-cell>
        </table:table-row>
        <table:table-row table:style-name="ro1">
          <table:table-cell office:value-type="string" calcext:value-type="string">
            <text:p>Indivisible</text:p>
          </table:table-cell>
          <table:table-cell office:value-type="date" office:date-value="2019-11-09" calcext:value-type="date">
            <text:p>2019-11-09</text:p>
          </table:table-cell>
          <table:table-cell office:value-type="string" calcext:value-type="string">
            <text:p>1:53</text:p>
          </table:table-cell>
          <table:table-cell office:value-type="string" calcext:value-type="string">
            <text:p>Cory, Jeff, Dave</text:p>
          </table:table-cell>
          <table:table-cell office:value-type="string" calcext:value-type="string">
            <text:p>KsmXZrKUkfI</text:p>
          </table:table-cell>
          <table:table-cell/>
          <table:table-cell table:formula="of:=&quot;['&quot; &amp; [.A232] &amp; &quot;', '&quot; &amp; YEAR([.B232]) &amp; &quot;-&quot; &amp; MONTH([.B232]) &amp; &quot;-&quot; &amp; DAY([.B232]) &amp; &quot;', '&quot; &amp; [.C232] &amp; &quot;', '&quot; &amp; [.D232] &amp; &quot;', '&quot; &amp; [.E232] &amp; &quot;', '&quot; &amp; [.F232] &amp; &quot;'],&quot;" office:value-type="string" office:string-value="['Indivisible', '2019-11-9', '1:53', 'Cory, Jeff, Dave', 'KsmXZrKUkfI', '']," calcext:value-type="string">
            <text:p>['Indivisible', '2019-11-9', '1:53', 'Cory, Jeff, Dave', 'KsmXZrKUkfI', ''],</text:p>
          </table:table-cell>
        </table:table-row>
        <table:table-row table:style-name="ro1">
          <table:table-cell office:value-type="string" calcext:value-type="string">
            <text:p>Insaniquarium</text:p>
          </table:table-cell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0:15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_wtTaQnyRYw</text:p>
          </table:table-cell>
          <table:table-cell/>
          <table:table-cell table:formula="of:=&quot;['&quot; &amp; [.A233] &amp; &quot;', '&quot; &amp; YEAR([.B233]) &amp; &quot;-&quot; &amp; MONTH([.B233]) &amp; &quot;-&quot; &amp; DAY([.B233]) &amp; &quot;', '&quot; &amp; [.C233] &amp; &quot;', '&quot; &amp; [.D233] &amp; &quot;', '&quot; &amp; [.E233] &amp; &quot;', '&quot; &amp; [.F233] &amp; &quot;'],&quot;" office:value-type="string" office:string-value="['Insaniquarium', '2020-5-17', '0:15', 'Zach, Lyle', '_wtTaQnyRYw', '']," calcext:value-type="string">
            <text:p>['Insaniquarium', '2020-5-17', '0:15', 'Zach, Lyle', '_wtTaQnyRYw', ''],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date" office:date-value="2018-03-21" calcext:value-type="date">
            <text:p>2018-03-21</text:p>
          </table:table-cell>
          <table:table-cell office:value-type="string" calcext:value-type="string">
            <text:p>1:21</text:p>
          </table:table-cell>
          <table:table-cell office:value-type="string" calcext:value-type="string">
            <text:p>Lyle, Niall</text:p>
          </table:table-cell>
          <table:table-cell office:value-type="string" calcext:value-type="string">
            <text:p>iX45CI97cYU</text:p>
          </table:table-cell>
          <table:table-cell/>
          <table:table-cell table:formula="of:=&quot;['&quot; &amp; [.A234] &amp; &quot;', '&quot; &amp; YEAR([.B234]) &amp; &quot;-&quot; &amp; MONTH([.B234]) &amp; &quot;-&quot; &amp; DAY([.B234]) &amp; &quot;', '&quot; &amp; [.C234] &amp; &quot;', '&quot; &amp; [.D234] &amp; &quot;', '&quot; &amp; [.E234] &amp; &quot;', '&quot; &amp; [.F234] &amp; &quot;'],&quot;" office:value-type="string" office:string-value="['Inside', '2018-3-21', '1:21', 'Lyle, Niall', 'iX45CI97cYU', '']," calcext:value-type="string">
            <text:p>['Inside', '2018-3-21', '1:21', 'Lyle, Niall', 'iX45CI97cYU', ''],</text:p>
          </table:table-cell>
        </table:table-row>
        <table:table-row table:style-name="ro1">
          <table:table-cell office:value-type="string" calcext:value-type="string">
            <text:p>Inspector Gadget</text:p>
          </table:table-cell>
          <table:table-cell office:value-type="date" office:date-value="2017-01-23" calcext:value-type="date">
            <text:p>2017-01-23</text:p>
          </table:table-cell>
          <table:table-cell office:value-type="string" calcext:value-type="string">
            <text:p>0:13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lp0cTsE4Voc</text:p>
          </table:table-cell>
          <table:table-cell/>
          <table:table-cell table:formula="of:=&quot;['&quot; &amp; [.A235] &amp; &quot;', '&quot; &amp; YEAR([.B235]) &amp; &quot;-&quot; &amp; MONTH([.B235]) &amp; &quot;-&quot; &amp; DAY([.B235]) &amp; &quot;', '&quot; &amp; [.C235] &amp; &quot;', '&quot; &amp; [.D235] &amp; &quot;', '&quot; &amp; [.E235] &amp; &quot;', '&quot; &amp; [.F235] &amp; &quot;'],&quot;" office:value-type="string" office:string-value="['Inspector Gadget', '2017-1-23', '0:13', 'Dingdong, Julian, Matt', 'lp0cTsE4Voc', '']," calcext:value-type="string">
            <text:p>['Inspector Gadget', '2017-1-23', '0:13', 'Dingdong, Julian, Matt', 'lp0cTsE4Voc', ''],</text:p>
          </table:table-cell>
        </table:table-row>
        <table:table-row table:style-name="ro1">
          <table:table-cell office:value-type="string" calcext:value-type="string">
            <text:p>It Takes Two</text:p>
          </table:table-cell>
          <table:table-cell office:value-type="date" office:date-value="2021-06-15" calcext:value-type="date">
            <text:p>2021-06-15</text:p>
          </table:table-cell>
          <table:table-cell office:value-type="string" calcext:value-type="string">
            <text:p>1:0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2VUsx4zI7Dw</text:p>
          </table:table-cell>
          <table:table-cell/>
          <table:table-cell table:formula="of:=&quot;['&quot; &amp; [.A236] &amp; &quot;', '&quot; &amp; YEAR([.B236]) &amp; &quot;-&quot; &amp; MONTH([.B236]) &amp; &quot;-&quot; &amp; DAY([.B236]) &amp; &quot;', '&quot; &amp; [.C236] &amp; &quot;', '&quot; &amp; [.D236] &amp; &quot;', '&quot; &amp; [.E236] &amp; &quot;', '&quot; &amp; [.F236] &amp; &quot;'],&quot;" office:value-type="string" office:string-value="['It Takes Two', '2021-6-15', '1:06', 'Lyle, Tomar', '2VUsx4zI7Dw', '']," calcext:value-type="string">
            <text:p>['It Takes Two', '2021-6-15', '1:06', 'Lyle, Tomar', '2VUsx4zI7Dw', ''],</text:p>
          </table:table-cell>
        </table:table-row>
        <table:table-row table:style-name="ro1">
          <table:table-cell office:value-type="string" calcext:value-type="string">
            <text:p>Itch.io Games - Ep 1</text:p>
          </table:table-cell>
          <table:table-cell office:value-type="date" office:date-value="2018-08-31" calcext:value-type="date">
            <text:p>2018-08-31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HxLZK68L8KY</text:p>
          </table:table-cell>
          <table:table-cell/>
          <table:table-cell table:formula="of:=&quot;['&quot; &amp; [.A237] &amp; &quot;', '&quot; &amp; YEAR([.B237]) &amp; &quot;-&quot; &amp; MONTH([.B237]) &amp; &quot;-&quot; &amp; DAY([.B237]) &amp; &quot;', '&quot; &amp; [.C237] &amp; &quot;', '&quot; &amp; [.D237] &amp; &quot;', '&quot; &amp; [.E237] &amp; &quot;', '&quot; &amp; [.F237] &amp; &quot;'],&quot;" office:value-type="string" office:string-value="['Itch.io Games - Ep 1', '2018-8-31', '0:21', 'Zach, Lyle', 'HxLZK68L8KY', '']," calcext:value-type="string">
            <text:p>['Itch.io Games - Ep 1', '2018-8-31', '0:21', 'Zach, Lyle', 'HxLZK68L8KY', ''],</text:p>
          </table:table-cell>
        </table:table-row>
        <table:table-row table:style-name="ro1">
          <table:table-cell office:value-type="string" calcext:value-type="string">
            <text:p>Itch.io Games - Ep 2</text:p>
          </table:table-cell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0:18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WIaYovIVMAc</text:p>
          </table:table-cell>
          <table:table-cell/>
          <table:table-cell table:formula="of:=&quot;['&quot; &amp; [.A238] &amp; &quot;', '&quot; &amp; YEAR([.B238]) &amp; &quot;-&quot; &amp; MONTH([.B238]) &amp; &quot;-&quot; &amp; DAY([.B238]) &amp; &quot;', '&quot; &amp; [.C238] &amp; &quot;', '&quot; &amp; [.D238] &amp; &quot;', '&quot; &amp; [.E238] &amp; &quot;', '&quot; &amp; [.F238] &amp; &quot;'],&quot;" office:value-type="string" office:string-value="['Itch.io Games - Ep 2', '2018-9-4', '0:18', 'Zach, Lyle', 'WIaYovIVMAc', '']," calcext:value-type="string">
            <text:p>['Itch.io Games - Ep 2', '2018-9-4', '0:18', 'Zach, Lyle', 'WIaYovIVMAc', ''],</text:p>
          </table:table-cell>
        </table:table-row>
        <table:table-row table:style-name="ro1">
          <table:table-cell office:value-type="string" calcext:value-type="string">
            <text:p>Jak And Daxter</text:p>
          </table:table-cell>
          <table:table-cell office:value-type="date" office:date-value="2018-03-31" calcext:value-type="date">
            <text:p>2018-03-31</text:p>
          </table:table-cell>
          <table:table-cell office:value-type="string" calcext:value-type="string">
            <text:p>1:3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fbIgFtRoC1Y</text:p>
          </table:table-cell>
          <table:table-cell office:value-type="string" calcext:value-type="string">
            <text:p>SwKhvGbSTqY</text:p>
          </table:table-cell>
          <table:table-cell table:formula="of:=&quot;['&quot; &amp; [.A239] &amp; &quot;', '&quot; &amp; YEAR([.B239]) &amp; &quot;-&quot; &amp; MONTH([.B239]) &amp; &quot;-&quot; &amp; DAY([.B239]) &amp; &quot;', '&quot; &amp; [.C239] &amp; &quot;', '&quot; &amp; [.D239] &amp; &quot;', '&quot; &amp; [.E239] &amp; &quot;', '&quot; &amp; [.F239] &amp; &quot;'],&quot;" office:value-type="string" office:string-value="['Jak And Daxter', '2018-3-31', '1:33', 'Zach, Lyle', 'fbIgFtRoC1Y', 'SwKhvGbSTqY']," calcext:value-type="string">
            <text:p>['Jak And Daxter', '2018-3-31', '1:33', 'Zach, Lyle', 'fbIgFtRoC1Y', 'SwKhvGbSTqY'],</text:p>
          </table:table-cell>
        </table:table-row>
        <table:table-row table:style-name="ro1">
          <table:table-cell office:value-type="string" calcext:value-type="string">
            <text:p>Jef</text:p>
          </table:table-cell>
          <table:table-cell office:value-type="date" office:date-value="2021-01-08" calcext:value-type="date">
            <text:p>2021-01-08</text:p>
          </table:table-cell>
          <table:table-cell office:value-type="string" calcext:value-type="string">
            <text:p>1:08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w9Owv8WG9_M</text:p>
          </table:table-cell>
          <table:table-cell/>
          <table:table-cell table:formula="of:=&quot;['&quot; &amp; [.A240] &amp; &quot;', '&quot; &amp; YEAR([.B240]) &amp; &quot;-&quot; &amp; MONTH([.B240]) &amp; &quot;-&quot; &amp; DAY([.B240]) &amp; &quot;', '&quot; &amp; [.C240] &amp; &quot;', '&quot; &amp; [.D240] &amp; &quot;', '&quot; &amp; [.E240] &amp; &quot;', '&quot; &amp; [.F240] &amp; &quot;'],&quot;" office:value-type="string" office:string-value="['Jef', '2021-1-8', '1:08', 'Zach, Lyle, Tomar', 'w9Owv8WG9_M', '']," calcext:value-type="string">
            <text:p>['Jef', '2021-1-8', '1:08', 'Zach, Lyle, Tomar', 'w9Owv8WG9_M', ''],</text:p>
          </table:table-cell>
        </table:table-row>
        <table:table-row table:style-name="ro1">
          <table:table-cell office:value-type="string" calcext:value-type="string">
            <text:p>Jet Set Radio Future</text:p>
          </table:table-cell>
          <table:table-cell office:value-type="date" office:date-value="2017-02-26" calcext:value-type="date">
            <text:p>2017-02-26</text:p>
          </table:table-cell>
          <table:table-cell office:value-type="string" calcext:value-type="string">
            <text:p>1:2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T1V3Ray6Ms</text:p>
          </table:table-cell>
          <table:table-cell/>
          <table:table-cell table:formula="of:=&quot;['&quot; &amp; [.A241] &amp; &quot;', '&quot; &amp; YEAR([.B241]) &amp; &quot;-&quot; &amp; MONTH([.B241]) &amp; &quot;-&quot; &amp; DAY([.B241]) &amp; &quot;', '&quot; &amp; [.C241] &amp; &quot;', '&quot; &amp; [.D241] &amp; &quot;', '&quot; &amp; [.E241] &amp; &quot;', '&quot; &amp; [.F241] &amp; &quot;'],&quot;" office:value-type="string" office:string-value="['Jet Set Radio Future', '2017-2-26', '1:20', 'Dingdong, Julian', 'hT1V3Ray6Ms', '']," calcext:value-type="string">
            <text:p>['Jet Set Radio Future', '2017-2-26', '1:20', 'Dingdong, Julian', 'hT1V3Ray6Ms', ''],</text:p>
          </table:table-cell>
        </table:table-row>
        <table:table-row table:style-name="ro1">
          <table:table-cell office:value-type="string" calcext:value-type="string">
            <text:p>Juice Galaxy</text:p>
          </table:table-cell>
          <table:table-cell office:value-type="date" office:date-value="2021-09-05" calcext:value-type="date">
            <text:p>2021-09-05</text:p>
          </table:table-cell>
          <table:table-cell office:value-type="string" calcext:value-type="string">
            <text:p>1:0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Fb5dwVJb4E</text:p>
          </table:table-cell>
          <table:table-cell/>
          <table:table-cell table:formula="of:=&quot;['&quot; &amp; [.A242] &amp; &quot;', '&quot; &amp; YEAR([.B242]) &amp; &quot;-&quot; &amp; MONTH([.B242]) &amp; &quot;-&quot; &amp; DAY([.B242]) &amp; &quot;', '&quot; &amp; [.C242] &amp; &quot;', '&quot; &amp; [.D242] &amp; &quot;', '&quot; &amp; [.E242] &amp; &quot;', '&quot; &amp; [.F242] &amp; &quot;'],&quot;" office:value-type="string" office:string-value="['Juice Galaxy', '2021-9-5', '1:02', 'Lyle, Tomar', 'xFb5dwVJb4E', '']," calcext:value-type="string">
            <text:p>['Juice Galaxy', '2021-9-5', '1:02', 'Lyle, Tomar', 'xFb5dwVJb4E', ''],</text:p>
          </table:table-cell>
        </table:table-row>
        <table:table-row table:style-name="ro1">
          <table:table-cell office:value-type="string" calcext:value-type="string">
            <text:p>Jumping Flash!</text:p>
          </table:table-cell>
          <table:table-cell office:value-type="date" office:date-value="2016-11-11" calcext:value-type="date">
            <text:p>2016-11-11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9BnKu5zKz2o</text:p>
          </table:table-cell>
          <table:table-cell office:value-type="string" calcext:value-type="string">
            <text:p>E4vyNb4NxCY</text:p>
          </table:table-cell>
          <table:table-cell table:formula="of:=&quot;['&quot; &amp; [.A243] &amp; &quot;', '&quot; &amp; YEAR([.B243]) &amp; &quot;-&quot; &amp; MONTH([.B243]) &amp; &quot;-&quot; &amp; DAY([.B243]) &amp; &quot;', '&quot; &amp; [.C243] &amp; &quot;', '&quot; &amp; [.D243] &amp; &quot;', '&quot; &amp; [.E243] &amp; &quot;', '&quot; &amp; [.F243] &amp; &quot;'],&quot;" office:value-type="string" office:string-value="['Jumping Flash!', '2016-11-11', '1:00', 'Dingdong, Julian, Matt', '9BnKu5zKz2o', 'E4vyNb4NxCY']," calcext:value-type="string">
            <text:p>['Jumping Flash!', '2016-11-11', '1:00', 'Dingdong, Julian, Matt', '9BnKu5zKz2o', 'E4vyNb4NxCY'],</text:p>
          </table:table-cell>
        </table:table-row>
        <table:table-row table:style-name="ro1">
          <table:table-cell office:value-type="string" calcext:value-type="string">
            <text:p>Jumping Flash! 2 - Ep 1</text:p>
          </table:table-cell>
          <table:table-cell office:value-type="date" office:date-value="2016-10-01" calcext:value-type="date">
            <text:p>2016-10-01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Pyd0T81bcXA</text:p>
          </table:table-cell>
          <table:table-cell/>
          <table:table-cell table:formula="of:=&quot;['&quot; &amp; [.A244] &amp; &quot;', '&quot; &amp; YEAR([.B244]) &amp; &quot;-&quot; &amp; MONTH([.B244]) &amp; &quot;-&quot; &amp; DAY([.B244]) &amp; &quot;', '&quot; &amp; [.C244] &amp; &quot;', '&quot; &amp; [.D244] &amp; &quot;', '&quot; &amp; [.E244] &amp; &quot;', '&quot; &amp; [.F244] &amp; &quot;'],&quot;" office:value-type="string" office:string-value="['Jumping Flash! 2 - Ep 1', '2016-10-1', '0:11', 'Dingdong, Julian', 'Pyd0T81bcXA', '']," calcext:value-type="string">
            <text:p>['Jumping Flash! 2 - Ep 1', '2016-10-1', '0:11', 'Dingdong, Julian', 'Pyd0T81bcXA', ''],</text:p>
          </table:table-cell>
        </table:table-row>
        <table:table-row table:style-name="ro1">
          <table:table-cell office:value-type="string" calcext:value-type="string">
            <text:p>Jumping Flash! 2 - Ep 2</text:p>
          </table:table-cell>
          <table:table-cell office:value-type="date" office:date-value="2016-10-02" calcext:value-type="date">
            <text:p>2016-10-02</text:p>
          </table:table-cell>
          <table:table-cell office:value-type="string" calcext:value-type="string">
            <text:p>0:18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K6qEwtGrhNo</text:p>
          </table:table-cell>
          <table:table-cell/>
          <table:table-cell table:formula="of:=&quot;['&quot; &amp; [.A245] &amp; &quot;', '&quot; &amp; YEAR([.B245]) &amp; &quot;-&quot; &amp; MONTH([.B245]) &amp; &quot;-&quot; &amp; DAY([.B245]) &amp; &quot;', '&quot; &amp; [.C245] &amp; &quot;', '&quot; &amp; [.D245] &amp; &quot;', '&quot; &amp; [.E245] &amp; &quot;', '&quot; &amp; [.F245] &amp; &quot;'],&quot;" office:value-type="string" office:string-value="['Jumping Flash! 2 - Ep 2', '2016-10-2', '0:18', 'Dingdong, Julian', 'K6qEwtGrhNo', '']," calcext:value-type="string">
            <text:p>['Jumping Flash! 2 - Ep 2', '2016-10-2', '0:18', 'Dingdong, Julian', 'K6qEwtGrhNo', ''],</text:p>
          </table:table-cell>
        </table:table-row>
        <table:table-row table:style-name="ro1">
          <table:table-cell office:value-type="string" calcext:value-type="string">
            <text:p>Just Cause 2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0:42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r64f14KunqQ</text:p>
          </table:table-cell>
          <table:table-cell/>
          <table:table-cell table:formula="of:=&quot;['&quot; &amp; [.A246] &amp; &quot;', '&quot; &amp; YEAR([.B246]) &amp; &quot;-&quot; &amp; MONTH([.B246]) &amp; &quot;-&quot; &amp; DAY([.B246]) &amp; &quot;', '&quot; &amp; [.C246] &amp; &quot;', '&quot; &amp; [.D246] &amp; &quot;', '&quot; &amp; [.E246] &amp; &quot;', '&quot; &amp; [.F246] &amp; &quot;'],&quot;" office:value-type="string" office:string-value="['Just Cause 2', '2024-12-22', '0:42', 'Adam, Lyle', 'r64f14KunqQ', '']," calcext:value-type="string">
            <text:p>['Just Cause 2', '2024-12-22', '0:42', 'Adam, Lyle', 'r64f14KunqQ', ''],</text:p>
          </table:table-cell>
        </table:table-row>
        <table:table-row table:style-name="ro1">
          <table:table-cell office:value-type="string" calcext:value-type="string">
            <text:p>Katamari Damacy Reroll</text:p>
          </table:table-cell>
          <table:table-cell office:value-type="date" office:date-value="2019-07-20" calcext:value-type="date">
            <text:p>2019-07-20</text:p>
          </table:table-cell>
          <table:table-cell office:value-type="string" calcext:value-type="string">
            <text:p>1:3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gigMO_D4YtQ</text:p>
          </table:table-cell>
          <table:table-cell/>
          <table:table-cell table:formula="of:=&quot;['&quot; &amp; [.A247] &amp; &quot;', '&quot; &amp; YEAR([.B247]) &amp; &quot;-&quot; &amp; MONTH([.B247]) &amp; &quot;-&quot; &amp; DAY([.B247]) &amp; &quot;', '&quot; &amp; [.C247] &amp; &quot;', '&quot; &amp; [.D247] &amp; &quot;', '&quot; &amp; [.E247] &amp; &quot;', '&quot; &amp; [.F247] &amp; &quot;'],&quot;" office:value-type="string" office:string-value="['Katamari Damacy Reroll', '2019-7-20', '1:38', 'Lyle, Tomar', 'gigMO_D4YtQ', '']," calcext:value-type="string">
            <text:p>['Katamari Damacy Reroll', '2019-7-20', '1:38', 'Lyle, Tomar', 'gigMO_D4YtQ', ''],</text:p>
          </table:table-cell>
        </table:table-row>
        <table:table-row table:style-name="ro1">
          <table:table-cell office:value-type="string" calcext:value-type="string">
            <text:p>Kingdom Hearts</text:p>
          </table:table-cell>
          <table:table-cell office:value-type="date" office:date-value="2015-09-25" calcext:value-type="date">
            <text:p>2015-09-25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EJ6dnC7uj3k</text:p>
          </table:table-cell>
          <table:table-cell/>
          <table:table-cell table:formula="of:=&quot;['&quot; &amp; [.A248] &amp; &quot;', '&quot; &amp; YEAR([.B248]) &amp; &quot;-&quot; &amp; MONTH([.B248]) &amp; &quot;-&quot; &amp; DAY([.B248]) &amp; &quot;', '&quot; &amp; [.C248] &amp; &quot;', '&quot; &amp; [.D248] &amp; &quot;', '&quot; &amp; [.E248] &amp; &quot;', '&quot; &amp; [.F248] &amp; &quot;'],&quot;" office:value-type="string" office:string-value="['Kingdom Hearts', '2015-9-25', '12:32', 'Dingdong, Julian', 'EJ6dnC7uj3k', '']," calcext:value-type="string">
            <text:p>['Kingdom Hearts', '2015-9-25', '12:32', 'Dingdong, Julian', 'EJ6dnC7uj3k', ''],</text:p>
          </table:table-cell>
        </table:table-row>
        <table:table-row table:style-name="ro1">
          <table:table-cell office:value-type="string" calcext:value-type="string">
            <text:p>Kingdom Hearts (2015) - Ep 1</text:p>
          </table:table-cell>
          <table:table-cell office:value-type="date" office:date-value="2015-09-25" calcext:value-type="date">
            <text:p>2015-09-25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Cory, Niall</text:p>
          </table:table-cell>
          <table:table-cell office:value-type="string" calcext:value-type="string">
            <text:p>wWgZSE2XgcM</text:p>
          </table:table-cell>
          <table:table-cell/>
          <table:table-cell table:formula="of:=&quot;['&quot; &amp; [.A249] &amp; &quot;', '&quot; &amp; YEAR([.B249]) &amp; &quot;-&quot; &amp; MONTH([.B249]) &amp; &quot;-&quot; &amp; DAY([.B249]) &amp; &quot;', '&quot; &amp; [.C249] &amp; &quot;', '&quot; &amp; [.D249] &amp; &quot;', '&quot; &amp; [.E249] &amp; &quot;', '&quot; &amp; [.F249] &amp; &quot;'],&quot;" office:value-type="string" office:string-value="['Kingdom Hearts (2015) - Ep 1', '2015-9-25', '0:11', 'Cory, Niall', 'wWgZSE2XgcM', '']," calcext:value-type="string">
            <text:p>['Kingdom Hearts (2015) - Ep 1', '2015-9-25', '0:11', 'Cory, Niall', 'wWgZSE2XgcM', ''],</text:p>
          </table:table-cell>
        </table:table-row>
        <table:table-row table:style-name="ro1">
          <table:table-cell office:value-type="string" calcext:value-type="string">
            <text:p>Kingdom Hearts (2015) - Ep 2</text:p>
          </table:table-cell>
          <table:table-cell office:value-type="date" office:date-value="2015-10-08" calcext:value-type="date">
            <text:p>2015-10-08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Cory, Niall</text:p>
          </table:table-cell>
          <table:table-cell office:value-type="string" calcext:value-type="string">
            <text:p>nRSAcs_ApRE</text:p>
          </table:table-cell>
          <table:table-cell/>
          <table:table-cell table:formula="of:=&quot;['&quot; &amp; [.A250] &amp; &quot;', '&quot; &amp; YEAR([.B250]) &amp; &quot;-&quot; &amp; MONTH([.B250]) &amp; &quot;-&quot; &amp; DAY([.B250]) &amp; &quot;', '&quot; &amp; [.C250] &amp; &quot;', '&quot; &amp; [.D250] &amp; &quot;', '&quot; &amp; [.E250] &amp; &quot;', '&quot; &amp; [.F250] &amp; &quot;'],&quot;" office:value-type="string" office:string-value="['Kingdom Hearts (2015) - Ep 2', '2015-10-8', '0:11', 'Cory, Niall', 'nRSAcs_ApRE', '']," calcext:value-type="string">
            <text:p>['Kingdom Hearts (2015) - Ep 2', '2015-10-8', '0:11', 'Cory, Niall', 'nRSAcs_ApRE', ''],</text:p>
          </table:table-cell>
        </table:table-row>
        <table:table-row table:style-name="ro1">
          <table:table-cell office:value-type="string" calcext:value-type="string">
            <text:p>Kingdom Hearts (2015) - Ep 3</text:p>
          </table:table-cell>
          <table:table-cell office:value-type="date" office:date-value="2015-10-09" calcext:value-type="date">
            <text:p>2015-10-09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Cory, Niall</text:p>
          </table:table-cell>
          <table:table-cell office:value-type="string" calcext:value-type="string">
            <text:p>DY8NhztRFxo</text:p>
          </table:table-cell>
          <table:table-cell/>
          <table:table-cell table:formula="of:=&quot;['&quot; &amp; [.A251] &amp; &quot;', '&quot; &amp; YEAR([.B251]) &amp; &quot;-&quot; &amp; MONTH([.B251]) &amp; &quot;-&quot; &amp; DAY([.B251]) &amp; &quot;', '&quot; &amp; [.C251] &amp; &quot;', '&quot; &amp; [.D251] &amp; &quot;', '&quot; &amp; [.E251] &amp; &quot;', '&quot; &amp; [.F251] &amp; &quot;'],&quot;" office:value-type="string" office:string-value="['Kingdom Hearts (2015) - Ep 3', '2015-10-9', '0:11', 'Cory, Niall', 'DY8NhztRFxo', '']," calcext:value-type="string">
            <text:p>['Kingdom Hearts (2015) - Ep 3', '2015-10-9', '0:11', 'Cory, Niall', 'DY8NhztRFxo', ''],</text:p>
          </table:table-cell>
        </table:table-row>
        <table:table-row table:style-name="ro1">
          <table:table-cell office:value-type="string" calcext:value-type="string">
            <text:p>Kingdom Hearts 2 - Part 1</text:p>
          </table:table-cell>
          <table:table-cell office:value-type="date" office:date-value="2018-05-18" calcext:value-type="date">
            <text:p>2018-05-18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mywZRiaEh24</text:p>
          </table:table-cell>
          <table:table-cell/>
          <table:table-cell table:formula="of:=&quot;['&quot; &amp; [.A252] &amp; &quot;', '&quot; &amp; YEAR([.B252]) &amp; &quot;-&quot; &amp; MONTH([.B252]) &amp; &quot;-&quot; &amp; DAY([.B252]) &amp; &quot;', '&quot; &amp; [.C252] &amp; &quot;', '&quot; &amp; [.D252] &amp; &quot;', '&quot; &amp; [.E252] &amp; &quot;', '&quot; &amp; [.F252] &amp; &quot;'],&quot;" office:value-type="string" office:string-value="['Kingdom Hearts 2 - Part 1', '2018-5-18', '11:26', 'Dingdong, Julian', 'mywZRiaEh24', '']," calcext:value-type="string">
            <text:p>['Kingdom Hearts 2 - Part 1', '2018-5-18', '11:26', 'Dingdong, Julian', 'mywZRiaEh24', ''],</text:p>
          </table:table-cell>
        </table:table-row>
        <table:table-row table:style-name="ro1">
          <table:table-cell office:value-type="string" calcext:value-type="string">
            <text:p>Kingdom Hearts 2 - Part 2</text:p>
          </table:table-cell>
          <table:table-cell office:value-type="date" office:date-value="2018-05-18" calcext:value-type="date">
            <text:p>2018-05-18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0T9pKZ58OM</text:p>
          </table:table-cell>
          <table:table-cell/>
          <table:table-cell table:formula="of:=&quot;['&quot; &amp; [.A253] &amp; &quot;', '&quot; &amp; YEAR([.B253]) &amp; &quot;-&quot; &amp; MONTH([.B253]) &amp; &quot;-&quot; &amp; DAY([.B253]) &amp; &quot;', '&quot; &amp; [.C253] &amp; &quot;', '&quot; &amp; [.D253] &amp; &quot;', '&quot; &amp; [.E253] &amp; &quot;', '&quot; &amp; [.F253] &amp; &quot;'],&quot;" office:value-type="string" office:string-value="['Kingdom Hearts 2 - Part 2', '2018-5-18', '8:37', 'Dingdong, Julian', 'c0T9pKZ58OM', '']," calcext:value-type="string">
            <text:p>['Kingdom Hearts 2 - Part 2', '2018-5-18', '8:37', 'Dingdong, Julian', 'c0T9pKZ58OM', ''],</text:p>
          </table:table-cell>
        </table:table-row>
        <table:table-row table:style-name="ro1">
          <table:table-cell office:value-type="string" calcext:value-type="string">
            <text:p>Kirby 64</text:p>
          </table:table-cell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0:36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Nu5OXweJZX8</text:p>
          </table:table-cell>
          <table:table-cell/>
          <table:table-cell table:formula="of:=&quot;['&quot; &amp; [.A254] &amp; &quot;', '&quot; &amp; YEAR([.B254]) &amp; &quot;-&quot; &amp; MONTH([.B254]) &amp; &quot;-&quot; &amp; DAY([.B254]) &amp; &quot;', '&quot; &amp; [.C254] &amp; &quot;', '&quot; &amp; [.D254] &amp; &quot;', '&quot; &amp; [.E254] &amp; &quot;', '&quot; &amp; [.F254] &amp; &quot;'],&quot;" office:value-type="string" office:string-value="['Kirby 64', '2022-7-14', '0:36', 'Zach, Lyle, Tomar', 'Nu5OXweJZX8', '']," calcext:value-type="string">
            <text:p>['Kirby 64', '2022-7-14', '0:36', 'Zach, Lyle, Tomar', 'Nu5OXweJZX8', ''],</text:p>
          </table:table-cell>
        </table:table-row>
        <table:table-row table:style-name="ro1">
          <table:table-cell office:value-type="string" calcext:value-type="string">
            <text:p>Kirby And The Forgotten Land Demo</text:p>
          </table:table-cell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_duyXc1cycg</text:p>
          </table:table-cell>
          <table:table-cell/>
          <table:table-cell table:formula="of:=&quot;['&quot; &amp; [.A255] &amp; &quot;', '&quot; &amp; YEAR([.B255]) &amp; &quot;-&quot; &amp; MONTH([.B255]) &amp; &quot;-&quot; &amp; DAY([.B255]) &amp; &quot;', '&quot; &amp; [.C255] &amp; &quot;', '&quot; &amp; [.D255] &amp; &quot;', '&quot; &amp; [.E255] &amp; &quot;', '&quot; &amp; [.F255] &amp; &quot;'],&quot;" office:value-type="string" office:string-value="['Kirby And The Forgotten Land Demo', '2022-3-14', '0:23', 'Adam, Lyle', '_duyXc1cycg', '']," calcext:value-type="string">
            <text:p>['Kirby And The Forgotten Land Demo', '2022-3-14', '0:23', 'Adam, Lyle', '_duyXc1cycg', ''],</text:p>
          </table:table-cell>
        </table:table-row>
        <table:table-row table:style-name="ro1">
          <table:table-cell office:value-type="string" calcext:value-type="string">
            <text:p>Kirby Super Star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0:30</text:p>
          </table:table-cell>
          <table:table-cell office:value-type="string" calcext:value-type="string">
            <text:p>Zach, Dave</text:p>
          </table:table-cell>
          <table:table-cell office:value-type="string" calcext:value-type="string">
            <text:p>0ywk2ubIKmA</text:p>
          </table:table-cell>
          <table:table-cell/>
          <table:table-cell table:formula="of:=&quot;['&quot; &amp; [.A256] &amp; &quot;', '&quot; &amp; YEAR([.B256]) &amp; &quot;-&quot; &amp; MONTH([.B256]) &amp; &quot;-&quot; &amp; DAY([.B256]) &amp; &quot;', '&quot; &amp; [.C256] &amp; &quot;', '&quot; &amp; [.D256] &amp; &quot;', '&quot; &amp; [.E256] &amp; &quot;', '&quot; &amp; [.F256] &amp; &quot;'],&quot;" office:value-type="string" office:string-value="['Kirby Super Star', '2022-8-24', '0:30', 'Zach, Dave', '0ywk2ubIKmA', '']," calcext:value-type="string">
            <text:p>['Kirby Super Star', '2022-8-24', '0:30', 'Zach, Dave', '0ywk2ubIKmA', ''],</text:p>
          </table:table-cell>
        </table:table-row>
        <table:table-row table:style-name="ro1">
          <table:table-cell office:value-type="string" calcext:value-type="string">
            <text:p>Klonoa</text:p>
          </table:table-cell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0:53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2uYtdHyeL68</text:p>
          </table:table-cell>
          <table:table-cell/>
          <table:table-cell table:formula="of:=&quot;['&quot; &amp; [.A257] &amp; &quot;', '&quot; &amp; YEAR([.B257]) &amp; &quot;-&quot; &amp; MONTH([.B257]) &amp; &quot;-&quot; &amp; DAY([.B257]) &amp; &quot;', '&quot; &amp; [.C257] &amp; &quot;', '&quot; &amp; [.D257] &amp; &quot;', '&quot; &amp; [.E257] &amp; &quot;', '&quot; &amp; [.F257] &amp; &quot;'],&quot;" office:value-type="string" office:string-value="['Klonoa', '2022-9-16', '0:53', 'Cory, Lyle', '2uYtdHyeL68', '']," calcext:value-type="string">
            <text:p>['Klonoa', '2022-9-16', '0:53', 'Cory, Lyle', '2uYtdHyeL68', ''],</text:p>
          </table:table-cell>
        </table:table-row>
        <table:table-row table:style-name="ro1">
          <table:table-cell office:value-type="string" calcext:value-type="string">
            <text:p>Knightfall</text:p>
          </table:table-cell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0:4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i37rfH-v0U8</text:p>
          </table:table-cell>
          <table:table-cell/>
          <table:table-cell table:formula="of:=&quot;['&quot; &amp; [.A258] &amp; &quot;', '&quot; &amp; YEAR([.B258]) &amp; &quot;-&quot; &amp; MONTH([.B258]) &amp; &quot;-&quot; &amp; DAY([.B258]) &amp; &quot;', '&quot; &amp; [.C258] &amp; &quot;', '&quot; &amp; [.D258] &amp; &quot;', '&quot; &amp; [.E258] &amp; &quot;', '&quot; &amp; [.F258] &amp; &quot;'],&quot;" office:value-type="string" office:string-value="['Knightfall', '2022-4-11', '0:41', 'Lyle, Tomar', 'i37rfH-v0U8', '']," calcext:value-type="string">
            <text:p>['Knightfall', '2022-4-11', '0:41', 'Lyle, Tomar', 'i37rfH-v0U8', ''],</text:p>
          </table:table-cell>
        </table:table-row>
        <table:table-row table:style-name="ro1">
          <table:table-cell office:value-type="string" calcext:value-type="string">
            <text:p>Last Floor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0:30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tZlSmiviY54</text:p>
          </table:table-cell>
          <table:table-cell/>
          <table:table-cell table:formula="of:=&quot;['&quot; &amp; [.A259] &amp; &quot;', '&quot; &amp; YEAR([.B259]) &amp; &quot;-&quot; &amp; MONTH([.B259]) &amp; &quot;-&quot; &amp; DAY([.B259]) &amp; &quot;', '&quot; &amp; [.C259] &amp; &quot;', '&quot; &amp; [.D259] &amp; &quot;', '&quot; &amp; [.E259] &amp; &quot;', '&quot; &amp; [.F259] &amp; &quot;'],&quot;" office:value-type="string" office:string-value="['Last Floor', '2021-2-12', '0:30', 'Lyle, Tomar', 'tZlSmiviY54', '']," calcext:value-type="string">
            <text:p>['Last Floor', '2021-2-12', '0:30', 'Lyle, Tomar', 'tZlSmiviY54', ''],</text:p>
          </table:table-cell>
        </table:table-row>
        <table:table-row table:style-name="ro1">
          <table:table-cell office:value-type="string" calcext:value-type="string">
            <text:p>Left 4 Dead</text:p>
          </table:table-cell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0:33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7h8zmjDpV98</text:p>
          </table:table-cell>
          <table:table-cell/>
          <table:table-cell table:formula="of:=&quot;['&quot; &amp; [.A260] &amp; &quot;', '&quot; &amp; YEAR([.B260]) &amp; &quot;-&quot; &amp; MONTH([.B260]) &amp; &quot;-&quot; &amp; DAY([.B260]) &amp; &quot;', '&quot; &amp; [.C260] &amp; &quot;', '&quot; &amp; [.D260] &amp; &quot;', '&quot; &amp; [.E260] &amp; &quot;', '&quot; &amp; [.F260] &amp; &quot;'],&quot;" office:value-type="string" office:string-value="['Left 4 Dead', '2020-6-3', '0:33', 'Zach, Lyle, Tomar', '7h8zmjDpV98', '']," calcext:value-type="string">
            <text:p>['Left 4 Dead', '2020-6-3', '0:33', 'Zach, Lyle, Tomar', '7h8zmjDpV98', ''],</text:p>
          </table:table-cell>
        </table:table-row>
        <table:table-row table:style-name="ro1">
          <table:table-cell office:value-type="string" calcext:value-type="string">
            <text:p>Left 4 Dead 2 (2014) - Ep 1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Cory, Zach, Niall</text:p>
          </table:table-cell>
          <table:table-cell office:value-type="string" calcext:value-type="string">
            <text:p>_5Arbeoh-70</text:p>
          </table:table-cell>
          <table:table-cell/>
          <table:table-cell table:formula="of:=&quot;['&quot; &amp; [.A261] &amp; &quot;', '&quot; &amp; YEAR([.B261]) &amp; &quot;-&quot; &amp; MONTH([.B261]) &amp; &quot;-&quot; &amp; DAY([.B261]) &amp; &quot;', '&quot; &amp; [.C261] &amp; &quot;', '&quot; &amp; [.D261] &amp; &quot;', '&quot; &amp; [.E261] &amp; &quot;', '&quot; &amp; [.F261] &amp; &quot;'],&quot;" office:value-type="string" office:string-value="['Left 4 Dead 2 (2014) - Ep 1', '2014-6-22', '0:24', 'Cory, Zach, Niall', '_5Arbeoh-70', '']," calcext:value-type="string">
            <text:p>['Left 4 Dead 2 (2014) - Ep 1', '2014-6-22', '0:24', 'Cory, Zach, Niall', '_5Arbeoh-70', ''],</text:p>
          </table:table-cell>
        </table:table-row>
        <table:table-row table:style-name="ro1">
          <table:table-cell office:value-type="string" calcext:value-type="string">
            <text:p>Left 4 Dead 2 (2014) - Ep 2</text:p>
          </table:table-cell>
          <table:table-cell office:value-type="date" office:date-value="2014-06-25" calcext:value-type="date">
            <text:p>2014-06-25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Cory, Zach, Niall</text:p>
          </table:table-cell>
          <table:table-cell office:value-type="string" calcext:value-type="string">
            <text:p>JIZqp2L3xyg</text:p>
          </table:table-cell>
          <table:table-cell/>
          <table:table-cell table:formula="of:=&quot;['&quot; &amp; [.A262] &amp; &quot;', '&quot; &amp; YEAR([.B262]) &amp; &quot;-&quot; &amp; MONTH([.B262]) &amp; &quot;-&quot; &amp; DAY([.B262]) &amp; &quot;', '&quot; &amp; [.C262] &amp; &quot;', '&quot; &amp; [.D262] &amp; &quot;', '&quot; &amp; [.E262] &amp; &quot;', '&quot; &amp; [.F262] &amp; &quot;'],&quot;" office:value-type="string" office:string-value="['Left 4 Dead 2 (2014) - Ep 2', '2014-6-25', '0:24', 'Cory, Zach, Niall', 'JIZqp2L3xyg', '']," calcext:value-type="string">
            <text:p>['Left 4 Dead 2 (2014) - Ep 2', '2014-6-25', '0:24', 'Cory, Zach, Niall', 'JIZqp2L3xyg', ''],</text:p>
          </table:table-cell>
        </table:table-row>
        <table:table-row table:style-name="ro1">
          <table:table-cell office:value-type="string" calcext:value-type="string">
            <text:p>Left 4 Dead 2 (2016) Ep 1</text:p>
          </table:table-cell>
          <table:table-cell office:value-type="date" office:date-value="2016-05-02" calcext:value-type="date">
            <text:p>2016-05-02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Zach, Cory, Niall</text:p>
          </table:table-cell>
          <table:table-cell office:value-type="string" calcext:value-type="string">
            <text:p>DvkIMLrxhYc</text:p>
          </table:table-cell>
          <table:table-cell/>
          <table:table-cell table:formula="of:=&quot;['&quot; &amp; [.A263] &amp; &quot;', '&quot; &amp; YEAR([.B263]) &amp; &quot;-&quot; &amp; MONTH([.B263]) &amp; &quot;-&quot; &amp; DAY([.B263]) &amp; &quot;', '&quot; &amp; [.C263] &amp; &quot;', '&quot; &amp; [.D263] &amp; &quot;', '&quot; &amp; [.E263] &amp; &quot;', '&quot; &amp; [.F263] &amp; &quot;'],&quot;" office:value-type="string" office:string-value="['Left 4 Dead 2 (2016) Ep 1', '2016-5-2', '0:10', 'Zach, Cory, Niall', 'DvkIMLrxhYc', '']," calcext:value-type="string">
            <text:p>['Left 4 Dead 2 (2016) Ep 1', '2016-5-2', '0:10', 'Zach, Cory, Niall', 'DvkIMLrxhYc', ''],</text:p>
          </table:table-cell>
        </table:table-row>
        <table:table-row table:style-name="ro1">
          <table:table-cell office:value-type="string" calcext:value-type="string">
            <text:p>Left 4 Dead 2 (2016) Ep 2</text:p>
          </table:table-cell>
          <table:table-cell office:value-type="date" office:date-value="2016-05-03" calcext:value-type="date">
            <text:p>2016-05-03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Zach, Cory, Niall</text:p>
          </table:table-cell>
          <table:table-cell office:value-type="string" calcext:value-type="string">
            <text:p>H9m6YvmtCY4</text:p>
          </table:table-cell>
          <table:table-cell/>
          <table:table-cell table:formula="of:=&quot;['&quot; &amp; [.A264] &amp; &quot;', '&quot; &amp; YEAR([.B264]) &amp; &quot;-&quot; &amp; MONTH([.B264]) &amp; &quot;-&quot; &amp; DAY([.B264]) &amp; &quot;', '&quot; &amp; [.C264] &amp; &quot;', '&quot; &amp; [.D264] &amp; &quot;', '&quot; &amp; [.E264] &amp; &quot;', '&quot; &amp; [.F264] &amp; &quot;'],&quot;" office:value-type="string" office:string-value="['Left 4 Dead 2 (2016) Ep 2', '2016-5-3', '0:11', 'Zach, Cory, Niall', 'H9m6YvmtCY4', '']," calcext:value-type="string">
            <text:p>['Left 4 Dead 2 (2016) Ep 2', '2016-5-3', '0:11', 'Zach, Cory, Niall', 'H9m6YvmtCY4', ''],</text:p>
          </table:table-cell>
        </table:table-row>
        <table:table-row table:style-name="ro1">
          <table:table-cell office:value-type="string" calcext:value-type="string">
            <text:p>Left 4 Dead 2 (2020)</text:p>
          </table:table-cell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4:12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7gOd7xs6lLk</text:p>
          </table:table-cell>
          <table:table-cell/>
          <table:table-cell table:formula="of:=&quot;['&quot; &amp; [.A265] &amp; &quot;', '&quot; &amp; YEAR([.B265]) &amp; &quot;-&quot; &amp; MONTH([.B265]) &amp; &quot;-&quot; &amp; DAY([.B265]) &amp; &quot;', '&quot; &amp; [.C265] &amp; &quot;', '&quot; &amp; [.D265] &amp; &quot;', '&quot; &amp; [.E265] &amp; &quot;', '&quot; &amp; [.F265] &amp; &quot;'],&quot;" office:value-type="string" office:string-value="['Left 4 Dead 2 (2020)', '2020-3-27', '4:12', 'Zach, Lyle, Tomar', '7gOd7xs6lLk', '']," calcext:value-type="string">
            <text:p>['Left 4 Dead 2 (2020)', '2020-3-27', '4:12', 'Zach, Lyle, Tomar', '7gOd7xs6lLk', ''],</text:p>
          </table:table-cell>
        </table:table-row>
        <table:table-row table:style-name="ro1">
          <table:table-cell office:value-type="string" calcext:value-type="string">
            <text:p>Lego City Undercover</text:p>
          </table:table-cell>
          <table:table-cell office:value-type="date" office:date-value="2022-03-19" calcext:value-type="date">
            <text:p>2022-03-19</text:p>
          </table:table-cell>
          <table:table-cell office:value-type="string" calcext:value-type="string">
            <text:p>0:44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snbruf35H5E</text:p>
          </table:table-cell>
          <table:table-cell/>
          <table:table-cell table:formula="of:=&quot;['&quot; &amp; [.A266] &amp; &quot;', '&quot; &amp; YEAR([.B266]) &amp; &quot;-&quot; &amp; MONTH([.B266]) &amp; &quot;-&quot; &amp; DAY([.B266]) &amp; &quot;', '&quot; &amp; [.C266] &amp; &quot;', '&quot; &amp; [.D266] &amp; &quot;', '&quot; &amp; [.E266] &amp; &quot;', '&quot; &amp; [.F266] &amp; &quot;'],&quot;" office:value-type="string" office:string-value="['Lego City Undercover', '2022-3-19', '0:44', 'Adam, Lyle', 'snbruf35H5E', '']," calcext:value-type="string">
            <text:p>['Lego City Undercover', '2022-3-19', '0:44', 'Adam, Lyle', 'snbruf35H5E', ''],</text:p>
          </table:table-cell>
        </table:table-row>
        <table:table-row table:style-name="ro1">
          <table:table-cell office:value-type="string" calcext:value-type="string">
            <text:p>Lego Star Wars - The Skywalker Galactic Edition</text:p>
          </table:table-cell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0:2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5Mpnckbtka0</text:p>
          </table:table-cell>
          <table:table-cell/>
          <table:table-cell table:formula="of:=&quot;['&quot; &amp; [.A267] &amp; &quot;', '&quot; &amp; YEAR([.B267]) &amp; &quot;-&quot; &amp; MONTH([.B267]) &amp; &quot;-&quot; &amp; DAY([.B267]) &amp; &quot;', '&quot; &amp; [.C267] &amp; &quot;', '&quot; &amp; [.D267] &amp; &quot;', '&quot; &amp; [.E267] &amp; &quot;', '&quot; &amp; [.F267] &amp; &quot;'],&quot;" office:value-type="string" office:string-value="['Lego Star Wars - The Skywalker Galactic Edition', '2022-12-20', '0:27', 'Lyle, Tomar', '5Mpnckbtka0', '']," calcext:value-type="string">
            <text:p>['Lego Star Wars - The Skywalker Galactic Edition', '2022-12-20', '0:27', 'Lyle, Tomar', '5Mpnckbtka0', ''],</text:p>
          </table:table-cell>
        </table:table-row>
        <table:table-row table:style-name="ro1">
          <table:table-cell office:value-type="string" calcext:value-type="string">
            <text:p>Lego Star Wars - The Skywalker Saga - Ep 1</text:p>
          </table:table-cell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91Xkm-X8zBI</text:p>
          </table:table-cell>
          <table:table-cell/>
          <table:table-cell table:formula="of:=&quot;['&quot; &amp; [.A268] &amp; &quot;', '&quot; &amp; YEAR([.B268]) &amp; &quot;-&quot; &amp; MONTH([.B268]) &amp; &quot;-&quot; &amp; DAY([.B268]) &amp; &quot;', '&quot; &amp; [.C268] &amp; &quot;', '&quot; &amp; [.D268] &amp; &quot;', '&quot; &amp; [.E268] &amp; &quot;', '&quot; &amp; [.F268] &amp; &quot;'],&quot;" office:value-type="string" office:string-value="['Lego Star Wars - The Skywalker Saga - Ep 1', '2022-7-19', '0:21', 'Zach, Lyle, Tomar', '91Xkm-X8zBI', '']," calcext:value-type="string">
            <text:p>['Lego Star Wars - The Skywalker Saga - Ep 1', '2022-7-19', '0:21', 'Zach, Lyle, Tomar', '91Xkm-X8zBI', ''],</text:p>
          </table:table-cell>
        </table:table-row>
        <table:table-row table:style-name="ro1">
          <table:table-cell office:value-type="string" calcext:value-type="string">
            <text:p>Lego Star Wars - The Skywalker Saga - Ep 2</text:p>
          </table:table-cell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0:22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0uSdRw01MbA</text:p>
          </table:table-cell>
          <table:table-cell/>
          <table:table-cell table:formula="of:=&quot;['&quot; &amp; [.A269] &amp; &quot;', '&quot; &amp; YEAR([.B269]) &amp; &quot;-&quot; &amp; MONTH([.B269]) &amp; &quot;-&quot; &amp; DAY([.B269]) &amp; &quot;', '&quot; &amp; [.C269] &amp; &quot;', '&quot; &amp; [.D269] &amp; &quot;', '&quot; &amp; [.E269] &amp; &quot;', '&quot; &amp; [.F269] &amp; &quot;'],&quot;" office:value-type="string" office:string-value="['Lego Star Wars - The Skywalker Saga - Ep 2', '2022-7-22', '0:22', 'Zach, Lyle, Tomar', '0uSdRw01MbA', '']," calcext:value-type="string">
            <text:p>['Lego Star Wars - The Skywalker Saga - Ep 2', '2022-7-22', '0:22', 'Zach, Lyle, Tomar', '0uSdRw01MbA', ''],</text:p>
          </table:table-cell>
        </table:table-row>
        <table:table-row table:style-name="ro1">
          <table:table-cell office:value-type="string" calcext:value-type="string">
            <text:p>Lies Of P</text:p>
          </table:table-cell>
          <table:table-cell office:value-type="date" office:date-value="2024-11-05" calcext:value-type="date">
            <text:p>2024-11-05</text:p>
          </table:table-cell>
          <table:table-cell office:value-type="string" calcext:value-type="string">
            <text:p>1:07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yPbI_Wjagcw</text:p>
          </table:table-cell>
          <table:table-cell/>
          <table:table-cell table:formula="of:=&quot;['&quot; &amp; [.A270] &amp; &quot;', '&quot; &amp; YEAR([.B270]) &amp; &quot;-&quot; &amp; MONTH([.B270]) &amp; &quot;-&quot; &amp; DAY([.B270]) &amp; &quot;', '&quot; &amp; [.C270] &amp; &quot;', '&quot; &amp; [.D270] &amp; &quot;', '&quot; &amp; [.E270] &amp; &quot;', '&quot; &amp; [.F270] &amp; &quot;'],&quot;" office:value-type="string" office:string-value="['Lies Of P', '2024-11-5', '1:07', 'Cory, Lyle', 'yPbI_Wjagcw', '']," calcext:value-type="string">
            <text:p>['Lies Of P', '2024-11-5', '1:07', 'Cory, Lyle', 'yPbI_Wjagcw', ''],</text:p>
          </table:table-cell>
        </table:table-row>
        <table:table-row table:style-name="ro1">
          <table:table-cell office:value-type="string" calcext:value-type="string">
            <text:p>Life Is Strange</text:p>
          </table:table-cell>
          <table:table-cell office:value-type="date" office:date-value="2024-07-08" calcext:value-type="date">
            <text:p>2024-07-08</text:p>
          </table:table-cell>
          <table:table-cell office:value-type="string" calcext:value-type="string">
            <text:p>3:03</text:p>
          </table:table-cell>
          <table:table-cell office:value-type="string" calcext:value-type="string">
            <text:p>Niall, Lyle</text:p>
          </table:table-cell>
          <table:table-cell office:value-type="string" calcext:value-type="string">
            <text:p>d6PrnJvOtrU</text:p>
          </table:table-cell>
          <table:table-cell/>
          <table:table-cell table:formula="of:=&quot;['&quot; &amp; [.A271] &amp; &quot;', '&quot; &amp; YEAR([.B271]) &amp; &quot;-&quot; &amp; MONTH([.B271]) &amp; &quot;-&quot; &amp; DAY([.B271]) &amp; &quot;', '&quot; &amp; [.C271] &amp; &quot;', '&quot; &amp; [.D271] &amp; &quot;', '&quot; &amp; [.E271] &amp; &quot;', '&quot; &amp; [.F271] &amp; &quot;'],&quot;" office:value-type="string" office:string-value="['Life Is Strange', '2024-7-8', '3:03', 'Niall, Lyle', 'd6PrnJvOtrU', '']," calcext:value-type="string">
            <text:p>['Life Is Strange', '2024-7-8', '3:03', 'Niall, Lyle', 'd6PrnJvOtrU', ''],</text:p>
          </table:table-cell>
        </table:table-row>
        <table:table-row table:style-name="ro1">
          <table:table-cell office:value-type="string" calcext:value-type="string">
            <text:p>Lion King - Ep 1 - Brown Monkey</text:p>
          </table:table-cell>
          <table:table-cell office:value-type="date" office:date-value="2018-11-21" calcext:value-type="date">
            <text:p>2018-11-21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Veronica, Tomar</text:p>
          </table:table-cell>
          <table:table-cell office:value-type="string" calcext:value-type="string">
            <text:p>5uc-2fCykhA</text:p>
          </table:table-cell>
          <table:table-cell/>
          <table:table-cell table:formula="of:=&quot;['&quot; &amp; [.A272] &amp; &quot;', '&quot; &amp; YEAR([.B272]) &amp; &quot;-&quot; &amp; MONTH([.B272]) &amp; &quot;-&quot; &amp; DAY([.B272]) &amp; &quot;', '&quot; &amp; [.C272] &amp; &quot;', '&quot; &amp; [.D272] &amp; &quot;', '&quot; &amp; [.E272] &amp; &quot;', '&quot; &amp; [.F272] &amp; &quot;'],&quot;" office:value-type="string" office:string-value="['Lion King - Ep 1 - Brown Monkey', '2018-11-21', '0:10', 'Veronica, Tomar', '5uc-2fCykhA', '']," calcext:value-type="string">
            <text:p>['Lion King - Ep 1 - Brown Monkey', '2018-11-21', '0:10', 'Veronica, Tomar', '5uc-2fCykhA', ''],</text:p>
          </table:table-cell>
        </table:table-row>
        <table:table-row table:style-name="ro1">
          <table:table-cell office:value-type="string" calcext:value-type="string">
            <text:p>Lion King - Ep 2 - Ritual Of Chaz</text:p>
          </table:table-cell>
          <table:table-cell office:value-type="date" office:date-value="2018-11-22" calcext:value-type="date">
            <text:p>2018-11-22</text:p>
          </table:table-cell>
          <table:table-cell office:value-type="string" calcext:value-type="string">
            <text:p>0:14</text:p>
          </table:table-cell>
          <table:table-cell office:value-type="string" calcext:value-type="string">
            <text:p>Veronica, Tomar</text:p>
          </table:table-cell>
          <table:table-cell office:value-type="string" calcext:value-type="string">
            <text:p>ExbDpZ5oSzU</text:p>
          </table:table-cell>
          <table:table-cell/>
          <table:table-cell table:formula="of:=&quot;['&quot; &amp; [.A273] &amp; &quot;', '&quot; &amp; YEAR([.B273]) &amp; &quot;-&quot; &amp; MONTH([.B273]) &amp; &quot;-&quot; &amp; DAY([.B273]) &amp; &quot;', '&quot; &amp; [.C273] &amp; &quot;', '&quot; &amp; [.D273] &amp; &quot;', '&quot; &amp; [.E273] &amp; &quot;', '&quot; &amp; [.F273] &amp; &quot;'],&quot;" office:value-type="string" office:string-value="['Lion King - Ep 2 - Ritual Of Chaz', '2018-11-22', '0:14', 'Veronica, Tomar', 'ExbDpZ5oSzU', '']," calcext:value-type="string">
            <text:p>['Lion King - Ep 2 - Ritual Of Chaz', '2018-11-22', '0:14', 'Veronica, Tomar', 'ExbDpZ5oSzU', ''],</text:p>
          </table:table-cell>
        </table:table-row>
        <table:table-row table:style-name="ro1">
          <table:table-cell office:value-type="string" calcext:value-type="string">
            <text:p>Little Adventure On The Prarie</text:p>
          </table:table-cell>
          <table:table-cell office:value-type="date" office:date-value="2018-03-06" calcext:value-type="date">
            <text:p>2018-03-06</text:p>
          </table:table-cell>
          <table:table-cell office:value-type="string" calcext:value-type="string">
            <text:p>0:15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tw-dRnztFs8</text:p>
          </table:table-cell>
          <table:table-cell/>
          <table:table-cell table:formula="of:=&quot;['&quot; &amp; [.A274] &amp; &quot;', '&quot; &amp; YEAR([.B274]) &amp; &quot;-&quot; &amp; MONTH([.B274]) &amp; &quot;-&quot; &amp; DAY([.B274]) &amp; &quot;', '&quot; &amp; [.C274] &amp; &quot;', '&quot; &amp; [.D274] &amp; &quot;', '&quot; &amp; [.E274] &amp; &quot;', '&quot; &amp; [.F274] &amp; &quot;'],&quot;" office:value-type="string" office:string-value="['Little Adventure On The Prarie', '2018-3-6', '0:15', 'Zach, Lyle', 'tw-dRnztFs8', '']," calcext:value-type="string">
            <text:p>['Little Adventure On The Prarie', '2018-3-6', '0:15', 'Zach, Lyle', 'tw-dRnztFs8', ''],</text:p>
          </table:table-cell>
        </table:table-row>
        <table:table-row table:style-name="ro1">
          <table:table-cell office:value-type="string" calcext:value-type="string">
            <text:p>Little Nightmares</text:p>
          </table:table-cell>
          <table:table-cell office:value-type="date" office:date-value="2020-10-20" calcext:value-type="date">
            <text:p>2020-10-20</text:p>
          </table:table-cell>
          <table:table-cell office:value-type="string" calcext:value-type="string">
            <text:p>1:47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9ZsxaqnojH0</text:p>
          </table:table-cell>
          <table:table-cell/>
          <table:table-cell table:formula="of:=&quot;['&quot; &amp; [.A275] &amp; &quot;', '&quot; &amp; YEAR([.B275]) &amp; &quot;-&quot; &amp; MONTH([.B275]) &amp; &quot;-&quot; &amp; DAY([.B275]) &amp; &quot;', '&quot; &amp; [.C275] &amp; &quot;', '&quot; &amp; [.D275] &amp; &quot;', '&quot; &amp; [.E275] &amp; &quot;', '&quot; &amp; [.F275] &amp; &quot;'],&quot;" office:value-type="string" office:string-value="['Little Nightmares', '2020-10-20', '1:47', 'Zach, Lyle', '9ZsxaqnojH0', '']," calcext:value-type="string">
            <text:p>['Little Nightmares', '2020-10-20', '1:47', 'Zach, Lyle', '9ZsxaqnojH0', ''],</text:p>
          </table:table-cell>
        </table:table-row>
        <table:table-row table:style-name="ro1">
          <table:table-cell office:value-type="string" calcext:value-type="string">
            <text:p>Little Nightmares 2</text:p>
          </table:table-cell>
          <table:table-cell office:value-type="date" office:date-value="2021-10-23" calcext:value-type="date">
            <text:p>2021-10-23</text:p>
          </table:table-cell>
          <table:table-cell office:value-type="string" calcext:value-type="string">
            <text:p>1:31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i4rLoDm1vOs</text:p>
          </table:table-cell>
          <table:table-cell office:value-type="string" calcext:value-type="string">
            <text:p>unxKJxI265w</text:p>
          </table:table-cell>
          <table:table-cell table:formula="of:=&quot;['&quot; &amp; [.A276] &amp; &quot;', '&quot; &amp; YEAR([.B276]) &amp; &quot;-&quot; &amp; MONTH([.B276]) &amp; &quot;-&quot; &amp; DAY([.B276]) &amp; &quot;', '&quot; &amp; [.C276] &amp; &quot;', '&quot; &amp; [.D276] &amp; &quot;', '&quot; &amp; [.E276] &amp; &quot;', '&quot; &amp; [.F276] &amp; &quot;'],&quot;" office:value-type="string" office:string-value="['Little Nightmares 2', '2021-10-23', '1:31', 'Zach, Lyle', 'i4rLoDm1vOs', 'unxKJxI265w']," calcext:value-type="string">
            <text:p>['Little Nightmares 2', '2021-10-23', '1:31', 'Zach, Lyle', 'i4rLoDm1vOs', 'unxKJxI265w'],</text:p>
          </table:table-cell>
        </table:table-row>
        <table:table-row table:style-name="ro1">
          <table:table-cell office:value-type="string" calcext:value-type="string">
            <text:p>Locoroco</text:p>
          </table:table-cell>
          <table:table-cell office:value-type="date" office:date-value="2018-05-01" calcext:value-type="date">
            <text:p>2018-05-01</text:p>
          </table:table-cell>
          <table:table-cell office:value-type="string" calcext:value-type="string">
            <text:p>1:2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GWM2E0QCyaQ</text:p>
          </table:table-cell>
          <table:table-cell/>
          <table:table-cell table:formula="of:=&quot;['&quot; &amp; [.A277] &amp; &quot;', '&quot; &amp; YEAR([.B277]) &amp; &quot;-&quot; &amp; MONTH([.B277]) &amp; &quot;-&quot; &amp; DAY([.B277]) &amp; &quot;', '&quot; &amp; [.C277] &amp; &quot;', '&quot; &amp; [.D277] &amp; &quot;', '&quot; &amp; [.E277] &amp; &quot;', '&quot; &amp; [.F277] &amp; &quot;'],&quot;" office:value-type="string" office:string-value="['Locoroco', '2018-5-1', '1:24', 'Dingdong, Julian', 'GWM2E0QCyaQ', '']," calcext:value-type="string">
            <text:p>['Locoroco', '2018-5-1', '1:24', 'Dingdong, Julian', 'GWM2E0QCyaQ', ''],</text:p>
          </table:table-cell>
        </table:table-row>
        <table:table-row table:style-name="ro1">
          <table:table-cell office:value-type="string" calcext:value-type="string">
            <text:p>LOLBeans.io</text:p>
          </table:table-cell>
          <table:table-cell office:value-type="date" office:date-value="2024-11-11" calcext:value-type="date">
            <text:p>2024-11-11</text:p>
          </table:table-cell>
          <table:table-cell office:value-type="string" calcext:value-type="string">
            <text:p>0:16</text:p>
          </table:table-cell>
          <table:table-cell office:value-type="string" calcext:value-type="string">
            <text:p>Adam, Niall, Lyle</text:p>
          </table:table-cell>
          <table:table-cell office:value-type="string" calcext:value-type="string">
            <text:p>gxLdOLgBIQ8</text:p>
          </table:table-cell>
          <table:table-cell/>
          <table:table-cell table:formula="of:=&quot;['&quot; &amp; [.A278] &amp; &quot;', '&quot; &amp; YEAR([.B278]) &amp; &quot;-&quot; &amp; MONTH([.B278]) &amp; &quot;-&quot; &amp; DAY([.B278]) &amp; &quot;', '&quot; &amp; [.C278] &amp; &quot;', '&quot; &amp; [.D278] &amp; &quot;', '&quot; &amp; [.E278] &amp; &quot;', '&quot; &amp; [.F278] &amp; &quot;'],&quot;" office:value-type="string" office:string-value="['LOLBeans.io', '2024-11-11', '0:16', 'Adam, Niall, Lyle', 'gxLdOLgBIQ8', '']," calcext:value-type="string">
            <text:p>['LOLBeans.io', '2024-11-11', '0:16', 'Adam, Niall, Lyle', 'gxLdOLgBIQ8', ''],</text:p>
          </table:table-cell>
        </table:table-row>
        <table:table-row table:style-name="ro1">
          <table:table-cell office:value-type="string" calcext:value-type="string">
            <text:p>Lollipop Chainsaw</text:p>
          </table:table-cell>
          <table:table-cell office:value-type="date" office:date-value="2018-08-25" calcext:value-type="date">
            <text:p>2018-08-25</text:p>
          </table:table-cell>
          <table:table-cell office:value-type="string" calcext:value-type="string">
            <text:p>3:57</text:p>
          </table:table-cell>
          <table:table-cell office:value-type="string" calcext:value-type="string">
            <text:p>Dingdong, Amin</text:p>
          </table:table-cell>
          <table:table-cell office:value-type="string" calcext:value-type="string">
            <text:p>VNSx6SokckA</text:p>
          </table:table-cell>
          <table:table-cell/>
          <table:table-cell table:formula="of:=&quot;['&quot; &amp; [.A279] &amp; &quot;', '&quot; &amp; YEAR([.B279]) &amp; &quot;-&quot; &amp; MONTH([.B279]) &amp; &quot;-&quot; &amp; DAY([.B279]) &amp; &quot;', '&quot; &amp; [.C279] &amp; &quot;', '&quot; &amp; [.D279] &amp; &quot;', '&quot; &amp; [.E279] &amp; &quot;', '&quot; &amp; [.F279] &amp; &quot;'],&quot;" office:value-type="string" office:string-value="['Lollipop Chainsaw', '2018-8-25', '3:57', 'Dingdong, Amin', 'VNSx6SokckA', '']," calcext:value-type="string">
            <text:p>['Lollipop Chainsaw', '2018-8-25', '3:57', 'Dingdong, Amin', 'VNSx6SokckA', ''],</text:p>
          </table:table-cell>
        </table:table-row>
        <table:table-row table:style-name="ro1">
          <table:table-cell office:value-type="string" calcext:value-type="string">
            <text:p>Lord Of The Rings DOS Game</text:p>
          </table:table-cell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BEKDNndVDI</text:p>
          </table:table-cell>
          <table:table-cell/>
          <table:table-cell table:formula="of:=&quot;['&quot; &amp; [.A280] &amp; &quot;', '&quot; &amp; YEAR([.B280]) &amp; &quot;-&quot; &amp; MONTH([.B280]) &amp; &quot;-&quot; &amp; DAY([.B280]) &amp; &quot;', '&quot; &amp; [.C280] &amp; &quot;', '&quot; &amp; [.D280] &amp; &quot;', '&quot; &amp; [.E280] &amp; &quot;', '&quot; &amp; [.F280] &amp; &quot;'],&quot;" office:value-type="string" office:string-value="['Lord Of The Rings DOS Game', '2017-7-13', '0:23', 'Dingdong, Julian', 'HBEKDNndVDI', '']," calcext:value-type="string">
            <text:p>['Lord Of The Rings DOS Game', '2017-7-13', '0:23', 'Dingdong, Julian', 'HBEKDNndVDI', ''],</text:p>
          </table:table-cell>
        </table:table-row>
        <table:table-row table:style-name="ro1">
          <table:table-cell office:value-type="string" calcext:value-type="string">
            <text:p>Lost Soul Aside</text:p>
          </table:table-cell>
          <table:table-cell office:value-type="date" office:date-value="2025-09-23" calcext:value-type="date">
            <text:p>2025-09-23</text:p>
          </table:table-cell>
          <table:table-cell office:value-type="string" calcext:value-type="string">
            <text:p>0:54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w16BO253qb4</text:p>
          </table:table-cell>
          <table:table-cell/>
          <table:table-cell table:formula="of:=&quot;['&quot; &amp; [.A281] &amp; &quot;', '&quot; &amp; YEAR([.B281]) &amp; &quot;-&quot; &amp; MONTH([.B281]) &amp; &quot;-&quot; &amp; DAY([.B281]) &amp; &quot;', '&quot; &amp; [.C281] &amp; &quot;', '&quot; &amp; [.D281] &amp; &quot;', '&quot; &amp; [.E281] &amp; &quot;', '&quot; &amp; [.F281] &amp; &quot;'],&quot;" office:value-type="string" office:string-value="['Lost Soul Aside', '2025-9-23', '0:54', 'Cory, Dave', 'w16BO253qb4', '']," calcext:value-type="string">
            <text:p>['Lost Soul Aside', '2025-9-23', '0:54', 'Cory, Dave', 'w16BO253qb4', ''],</text:p>
          </table:table-cell>
        </table:table-row>
        <table:table-row table:style-name="ro1">
          <table:table-cell office:value-type="string" calcext:value-type="string">
            <text:p>Luigi's Mansion</text:p>
          </table:table-cell>
          <table:table-cell office:value-type="date" office:date-value="2016-08-04" calcext:value-type="date">
            <text:p>2016-08-04</text:p>
          </table:table-cell>
          <table:table-cell office:value-type="string" calcext:value-type="string">
            <text:p>0:31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C9zlQ5BEstU</text:p>
          </table:table-cell>
          <table:table-cell office:value-type="string" calcext:value-type="string">
            <text:p>Aqos3eWjXVw</text:p>
          </table:table-cell>
          <table:table-cell table:formula="of:=&quot;['&quot; &amp; [.A282] &amp; &quot;', '&quot; &amp; YEAR([.B282]) &amp; &quot;-&quot; &amp; MONTH([.B282]) &amp; &quot;-&quot; &amp; DAY([.B282]) &amp; &quot;', '&quot; &amp; [.C282] &amp; &quot;', '&quot; &amp; [.D282] &amp; &quot;', '&quot; &amp; [.E282] &amp; &quot;', '&quot; &amp; [.F282] &amp; &quot;'],&quot;" office:value-type="string" office:string-value="['Luigi's Mansion', '2016-8-4', '0:31', 'Dingdong, Julian, Matt', 'C9zlQ5BEstU', 'Aqos3eWjXVw']," calcext:value-type="string">
            <text:p>['Luigi's Mansion', '2016-8-4', '0:31', 'Dingdong, Julian, Matt', 'C9zlQ5BEstU', 'Aqos3eWjXVw'],</text:p>
          </table:table-cell>
        </table:table-row>
        <table:table-row table:style-name="ro1">
          <table:table-cell office:value-type="string" calcext:value-type="string">
            <text:p>Luigi's Mansion 3</text:p>
          </table:table-cell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3:17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mtNT5tbrokg</text:p>
          </table:table-cell>
          <table:table-cell/>
          <table:table-cell table:formula="of:=&quot;['&quot; &amp; [.A283] &amp; &quot;', '&quot; &amp; YEAR([.B283]) &amp; &quot;-&quot; &amp; MONTH([.B283]) &amp; &quot;-&quot; &amp; DAY([.B283]) &amp; &quot;', '&quot; &amp; [.C283] &amp; &quot;', '&quot; &amp; [.D283] &amp; &quot;', '&quot; &amp; [.E283] &amp; &quot;', '&quot; &amp; [.F283] &amp; &quot;'],&quot;" office:value-type="string" office:string-value="['Luigi's Mansion 3', '2020-1-29', '3:17', 'Zach, Lyle', 'mtNT5tbrokg', '']," calcext:value-type="string">
            <text:p>['Luigi's Mansion 3', '2020-1-29', '3:17', 'Zach, Lyle', 'mtNT5tbrokg', ''],</text:p>
          </table:table-cell>
        </table:table-row>
        <table:table-row table:style-name="ro1">
          <table:table-cell office:value-type="string" calcext:value-type="string">
            <text:p>Mad Panic Coaster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0:2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3ksL97oyrD4</text:p>
          </table:table-cell>
          <table:table-cell/>
          <table:table-cell table:formula="of:=&quot;['&quot; &amp; [.A284] &amp; &quot;', '&quot; &amp; YEAR([.B284]) &amp; &quot;-&quot; &amp; MONTH([.B284]) &amp; &quot;-&quot; &amp; DAY([.B284]) &amp; &quot;', '&quot; &amp; [.C284] &amp; &quot;', '&quot; &amp; [.D284] &amp; &quot;', '&quot; &amp; [.E284] &amp; &quot;', '&quot; &amp; [.F284] &amp; &quot;'],&quot;" office:value-type="string" office:string-value="['Mad Panic Coaster', '2017-10-31', '0:27', 'Dingdong, Julian', '3ksL97oyrD4', '']," calcext:value-type="string">
            <text:p>['Mad Panic Coaster', '2017-10-31', '0:27', 'Dingdong, Julian', '3ksL97oyrD4', ''],</text:p>
          </table:table-cell>
        </table:table-row>
        <table:table-row table:style-name="ro1">
          <table:table-cell office:value-type="string" calcext:value-type="string">
            <text:p>Mad Rat</text:p>
          </table:table-cell>
          <table:table-cell office:value-type="date" office:date-value="2021-06-12" calcext:value-type="date">
            <text:p>2021-06-12</text:p>
          </table:table-cell>
          <table:table-cell office:value-type="string" calcext:value-type="string">
            <text:p>0:4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ZsjimxNZtpU</text:p>
          </table:table-cell>
          <table:table-cell/>
          <table:table-cell table:formula="of:=&quot;['&quot; &amp; [.A285] &amp; &quot;', '&quot; &amp; YEAR([.B285]) &amp; &quot;-&quot; &amp; MONTH([.B285]) &amp; &quot;-&quot; &amp; DAY([.B285]) &amp; &quot;', '&quot; &amp; [.C285] &amp; &quot;', '&quot; &amp; [.D285] &amp; &quot;', '&quot; &amp; [.E285] &amp; &quot;', '&quot; &amp; [.F285] &amp; &quot;'],&quot;" office:value-type="string" office:string-value="['Mad Rat', '2021-6-12', '0:47', 'Dingdong, Julian', 'ZsjimxNZtpU', '']," calcext:value-type="string">
            <text:p>['Mad Rat', '2021-6-12', '0:47', 'Dingdong, Julian', 'ZsjimxNZtpU', ''],</text:p>
          </table:table-cell>
        </table:table-row>
        <table:table-row table:style-name="ro1">
          <table:table-cell office:value-type="string" calcext:value-type="string">
            <text:p>Magic School Bus Explores The Human Body, The</text:p>
          </table:table-cell>
          <table:table-cell office:value-type="date" office:date-value="2021-04-10" calcext:value-type="date">
            <text:p>2021-04-10</text:p>
          </table:table-cell>
          <table:table-cell office:value-type="string" calcext:value-type="string">
            <text:p>1:2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7sBIrNai6lw</text:p>
          </table:table-cell>
          <table:table-cell/>
          <table:table-cell table:formula="of:=&quot;['&quot; &amp; [.A286] &amp; &quot;', '&quot; &amp; YEAR([.B286]) &amp; &quot;-&quot; &amp; MONTH([.B286]) &amp; &quot;-&quot; &amp; DAY([.B286]) &amp; &quot;', '&quot; &amp; [.C286] &amp; &quot;', '&quot; &amp; [.D286] &amp; &quot;', '&quot; &amp; [.E286] &amp; &quot;', '&quot; &amp; [.F286] &amp; &quot;'],&quot;" office:value-type="string" office:string-value="['Magic School Bus Explores The Human Body, The', '2021-4-10', '1:23', 'Dingdong, Julian', '7sBIrNai6lw', '']," calcext:value-type="string">
            <text:p>['Magic School Bus Explores The Human Body, The', '2021-4-10', '1:23', 'Dingdong, Julian', '7sBIrNai6lw', ''],</text:p>
          </table:table-cell>
        </table:table-row>
        <table:table-row table:style-name="ro1">
          <table:table-cell office:value-type="string" calcext:value-type="string">
            <text:p>Making Spooky Nextbots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0:5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HFzqMYplg2Y</text:p>
          </table:table-cell>
          <table:table-cell/>
          <table:table-cell table:formula="of:=&quot;['&quot; &amp; [.A287] &amp; &quot;', '&quot; &amp; YEAR([.B287]) &amp; &quot;-&quot; &amp; MONTH([.B287]) &amp; &quot;-&quot; &amp; DAY([.B287]) &amp; &quot;', '&quot; &amp; [.C287] &amp; &quot;', '&quot; &amp; [.D287] &amp; &quot;', '&quot; &amp; [.E287] &amp; &quot;', '&quot; &amp; [.F287] &amp; &quot;'],&quot;" office:value-type="string" office:string-value="['Making Spooky Nextbots', '2024-10-22', '0:55', 'Cory, Dave', 'HFzqMYplg2Y', '']," calcext:value-type="string">
            <text:p>['Making Spooky Nextbots', '2024-10-22', '0:55', 'Cory, Dave', 'HFzqMYplg2Y', ''],</text:p>
          </table:table-cell>
        </table:table-row>
        <table:table-row table:style-name="ro1">
          <table:table-cell office:value-type="string" calcext:value-type="string">
            <text:p>Maple Story</text:p>
          </table:table-cell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0:40</text:p>
          </table:table-cell>
          <table:table-cell office:value-type="string" calcext:value-type="string">
            <text:p>Adam, Cory</text:p>
          </table:table-cell>
          <table:table-cell office:value-type="string" calcext:value-type="string">
            <text:p>_oleQu1n_Qg</text:p>
          </table:table-cell>
          <table:table-cell/>
          <table:table-cell table:formula="of:=&quot;['&quot; &amp; [.A288] &amp; &quot;', '&quot; &amp; YEAR([.B288]) &amp; &quot;-&quot; &amp; MONTH([.B288]) &amp; &quot;-&quot; &amp; DAY([.B288]) &amp; &quot;', '&quot; &amp; [.C288] &amp; &quot;', '&quot; &amp; [.D288] &amp; &quot;', '&quot; &amp; [.E288] &amp; &quot;', '&quot; &amp; [.F288] &amp; &quot;'],&quot;" office:value-type="string" office:string-value="['Maple Story', '2022-6-12', '0:40', 'Adam, Cory', '_oleQu1n_Qg', '']," calcext:value-type="string">
            <text:p>['Maple Story', '2022-6-12', '0:40', 'Adam, Cory', '_oleQu1n_Qg', ''],</text:p>
          </table:table-cell>
        </table:table-row>
        <table:table-row table:style-name="ro1">
          <table:table-cell office:value-type="string" calcext:value-type="string">
            <text:p>Marble Blast Ultra</text:p>
          </table:table-cell>
          <table:table-cell office:value-type="date" office:date-value="2017-08-20" calcext:value-type="date">
            <text:p>2017-08-20</text:p>
          </table:table-cell>
          <table:table-cell office:value-type="string" calcext:value-type="string">
            <text:p>1:0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oQv_itiGh0c</text:p>
          </table:table-cell>
          <table:table-cell/>
          <table:table-cell table:formula="of:=&quot;['&quot; &amp; [.A289] &amp; &quot;', '&quot; &amp; YEAR([.B289]) &amp; &quot;-&quot; &amp; MONTH([.B289]) &amp; &quot;-&quot; &amp; DAY([.B289]) &amp; &quot;', '&quot; &amp; [.C289] &amp; &quot;', '&quot; &amp; [.D289] &amp; &quot;', '&quot; &amp; [.E289] &amp; &quot;', '&quot; &amp; [.F289] &amp; &quot;'],&quot;" office:value-type="string" office:string-value="['Marble Blast Ultra', '2017-8-20', '1:03', 'Dingdong, Julian', 'oQv_itiGh0c', '']," calcext:value-type="string">
            <text:p>['Marble Blast Ultra', '2017-8-20', '1:03', 'Dingdong, Julian', 'oQv_itiGh0c', ''],</text:p>
          </table:table-cell>
        </table:table-row>
        <table:table-row table:style-name="ro1">
          <table:table-cell office:value-type="string" calcext:value-type="string">
            <text:p>Marble It Up</text:p>
          </table:table-cell>
          <table:table-cell office:value-type="date" office:date-value="2019-02-24" calcext:value-type="date">
            <text:p>2019-02-24</text:p>
          </table:table-cell>
          <table:table-cell office:value-type="string" calcext:value-type="string">
            <text:p>1:2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uo94MnYrzPo</text:p>
          </table:table-cell>
          <table:table-cell/>
          <table:table-cell table:formula="of:=&quot;['&quot; &amp; [.A290] &amp; &quot;', '&quot; &amp; YEAR([.B290]) &amp; &quot;-&quot; &amp; MONTH([.B290]) &amp; &quot;-&quot; &amp; DAY([.B290]) &amp; &quot;', '&quot; &amp; [.C290] &amp; &quot;', '&quot; &amp; [.D290] &amp; &quot;', '&quot; &amp; [.E290] &amp; &quot;', '&quot; &amp; [.F290] &amp; &quot;'],&quot;" office:value-type="string" office:string-value="['Marble It Up', '2019-2-24', '1:22', 'Dingdong, Julian', 'uo94MnYrzPo', '']," calcext:value-type="string">
            <text:p>['Marble It Up', '2019-2-24', '1:22', 'Dingdong, Julian', 'uo94MnYrzPo', ''],</text:p>
          </table:table-cell>
        </table:table-row>
        <table:table-row table:style-name="ro1">
          <table:table-cell office:value-type="string" calcext:value-type="string">
            <text:p>Mario Artist - Paint Studio</text:p>
          </table:table-cell>
          <table:table-cell office:value-type="date" office:date-value="2017-06-13" calcext:value-type="date">
            <text:p>2017-06-13</text:p>
          </table:table-cell>
          <table:table-cell office:value-type="string" calcext:value-type="string">
            <text:p>0:4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nVtbnGnCQUA</text:p>
          </table:table-cell>
          <table:table-cell/>
          <table:table-cell table:formula="of:=&quot;['&quot; &amp; [.A291] &amp; &quot;', '&quot; &amp; YEAR([.B291]) &amp; &quot;-&quot; &amp; MONTH([.B291]) &amp; &quot;-&quot; &amp; DAY([.B291]) &amp; &quot;', '&quot; &amp; [.C291] &amp; &quot;', '&quot; &amp; [.D291] &amp; &quot;', '&quot; &amp; [.E291] &amp; &quot;', '&quot; &amp; [.F291] &amp; &quot;'],&quot;" office:value-type="string" office:string-value="['Mario Artist - Paint Studio', '2017-6-13', '0:41', 'Dingdong, Julian', 'nVtbnGnCQUA', '']," calcext:value-type="string">
            <text:p>['Mario Artist - Paint Studio', '2017-6-13', '0:41', 'Dingdong, Julian', 'nVtbnGnCQUA', ''],</text:p>
          </table:table-cell>
        </table:table-row>
        <table:table-row table:style-name="ro1">
          <table:table-cell office:value-type="string" calcext:value-type="string">
            <text:p>Marlow Briggs And The Mask Of Death</text:p>
          </table:table-cell>
          <table:table-cell office:value-type="date" office:date-value="2020-08-13" calcext:value-type="date">
            <text:p>2020-08-13</text:p>
          </table:table-cell>
          <table:table-cell office:value-type="string" calcext:value-type="string">
            <text:p>1:3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Y-WJonlSHg4</text:p>
          </table:table-cell>
          <table:table-cell/>
          <table:table-cell table:formula="of:=&quot;['&quot; &amp; [.A292] &amp; &quot;', '&quot; &amp; YEAR([.B292]) &amp; &quot;-&quot; &amp; MONTH([.B292]) &amp; &quot;-&quot; &amp; DAY([.B292]) &amp; &quot;', '&quot; &amp; [.C292] &amp; &quot;', '&quot; &amp; [.D292] &amp; &quot;', '&quot; &amp; [.E292] &amp; &quot;', '&quot; &amp; [.F292] &amp; &quot;'],&quot;" office:value-type="string" office:string-value="['Marlow Briggs And The Mask Of Death', '2020-8-13', '1:36', 'Lyle, Tomar', 'Y-WJonlSHg4', '']," calcext:value-type="string">
            <text:p>['Marlow Briggs And The Mask Of Death', '2020-8-13', '1:36', 'Lyle, Tomar', 'Y-WJonlSHg4', ''],</text:p>
          </table:table-cell>
        </table:table-row>
        <table:table-row table:style-name="ro1">
          <table:table-cell office:value-type="string" calcext:value-type="string">
            <text:p>Marvel's Avengers</text:p>
          </table:table-cell>
          <table:table-cell office:value-type="date" office:date-value="2020-09-16" calcext:value-type="date">
            <text:p>2020-09-16</text:p>
          </table:table-cell>
          <table:table-cell office:value-type="string" calcext:value-type="string">
            <text:p>3:09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CrxPpj42KQ0</text:p>
          </table:table-cell>
          <table:table-cell/>
          <table:table-cell table:formula="of:=&quot;['&quot; &amp; [.A293] &amp; &quot;', '&quot; &amp; YEAR([.B293]) &amp; &quot;-&quot; &amp; MONTH([.B293]) &amp; &quot;-&quot; &amp; DAY([.B293]) &amp; &quot;', '&quot; &amp; [.C293] &amp; &quot;', '&quot; &amp; [.D293] &amp; &quot;', '&quot; &amp; [.E293] &amp; &quot;', '&quot; &amp; [.F293] &amp; &quot;'],&quot;" office:value-type="string" office:string-value="['Marvel's Avengers', '2020-9-16', '3:09', 'Zach, Tomar', 'CrxPpj42KQ0', '']," calcext:value-type="string">
            <text:p>['Marvel's Avengers', '2020-9-16', '3:09', 'Zach, Tomar', 'CrxPpj42KQ0', ''],</text:p>
          </table:table-cell>
        </table:table-row>
        <table:table-row table:style-name="ro1">
          <table:table-cell office:value-type="string" calcext:value-type="string">
            <text:p>Matrix Awakens, The</text:p>
          </table:table-cell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0:2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mlkv9AmNHk</text:p>
          </table:table-cell>
          <table:table-cell/>
          <table:table-cell table:formula="of:=&quot;['&quot; &amp; [.A294] &amp; &quot;', '&quot; &amp; YEAR([.B294]) &amp; &quot;-&quot; &amp; MONTH([.B294]) &amp; &quot;-&quot; &amp; DAY([.B294]) &amp; &quot;', '&quot; &amp; [.C294] &amp; &quot;', '&quot; &amp; [.D294] &amp; &quot;', '&quot; &amp; [.E294] &amp; &quot;', '&quot; &amp; [.F294] &amp; &quot;'],&quot;" office:value-type="string" office:string-value="['Matrix Awakens, The', '2022-2-7', '0:22', 'Lyle, Tomar', 'omlkv9AmNHk', '']," calcext:value-type="string">
            <text:p>['Matrix Awakens, The', '2022-2-7', '0:22', 'Lyle, Tomar', 'omlkv9AmNHk', ''],</text:p>
          </table:table-cell>
        </table:table-row>
        <table:table-row table:style-name="ro1">
          <table:table-cell office:value-type="string" calcext:value-type="string">
            <text:p>Matrix, The - Path Of Neo</text:p>
          </table:table-cell>
          <table:table-cell office:value-type="date" office:date-value="2021-12-03" calcext:value-type="date">
            <text:p>2021-12-03</text:p>
          </table:table-cell>
          <table:table-cell office:value-type="string" calcext:value-type="string">
            <text:p>1:0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Cn_MXLSaidk</text:p>
          </table:table-cell>
          <table:table-cell/>
          <table:table-cell table:formula="of:=&quot;['&quot; &amp; [.A295] &amp; &quot;', '&quot; &amp; YEAR([.B295]) &amp; &quot;-&quot; &amp; MONTH([.B295]) &amp; &quot;-&quot; &amp; DAY([.B295]) &amp; &quot;', '&quot; &amp; [.C295] &amp; &quot;', '&quot; &amp; [.D295] &amp; &quot;', '&quot; &amp; [.E295] &amp; &quot;', '&quot; &amp; [.F295] &amp; &quot;'],&quot;" office:value-type="string" office:string-value="['Matrix, The - Path Of Neo', '2021-12-3', '1:04', 'Lyle, Tomar', 'Cn_MXLSaidk', '']," calcext:value-type="string">
            <text:p>['Matrix, The - Path Of Neo', '2021-12-3', '1:04', 'Lyle, Tomar', 'Cn_MXLSaidk', ''],</text:p>
          </table:table-cell>
        </table:table-row>
        <table:table-row table:style-name="ro1">
          <table:table-cell office:value-type="string" calcext:value-type="string">
            <text:p>Max Payne - Ep 1</text:p>
          </table:table-cell>
          <table:table-cell office:value-type="date" office:date-value="2018-04-12" calcext:value-type="date">
            <text:p>2018-04-12</text:p>
          </table:table-cell>
          <table:table-cell office:value-type="string" calcext:value-type="string">
            <text:p>0:12</text:p>
          </table:table-cell>
          <table:table-cell office:value-type="string" calcext:value-type="string">
            <text:p>Niall, Amin</text:p>
          </table:table-cell>
          <table:table-cell office:value-type="string" calcext:value-type="string">
            <text:p>wB4V4hBzZvE</text:p>
          </table:table-cell>
          <table:table-cell/>
          <table:table-cell table:formula="of:=&quot;['&quot; &amp; [.A296] &amp; &quot;', '&quot; &amp; YEAR([.B296]) &amp; &quot;-&quot; &amp; MONTH([.B296]) &amp; &quot;-&quot; &amp; DAY([.B296]) &amp; &quot;', '&quot; &amp; [.C296] &amp; &quot;', '&quot; &amp; [.D296] &amp; &quot;', '&quot; &amp; [.E296] &amp; &quot;', '&quot; &amp; [.F296] &amp; &quot;'],&quot;" office:value-type="string" office:string-value="['Max Payne - Ep 1', '2018-4-12', '0:12', 'Niall, Amin', 'wB4V4hBzZvE', '']," calcext:value-type="string">
            <text:p>['Max Payne - Ep 1', '2018-4-12', '0:12', 'Niall, Amin', 'wB4V4hBzZvE', ''],</text:p>
          </table:table-cell>
        </table:table-row>
        <table:table-row table:style-name="ro1">
          <table:table-cell office:value-type="string" calcext:value-type="string">
            <text:p>Max Payne - Ep 2</text:p>
          </table:table-cell>
          <table:table-cell office:value-type="date" office:date-value="2018-04-27" calcext:value-type="date">
            <text:p>2018-04-27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Niall, Amin</text:p>
          </table:table-cell>
          <table:table-cell office:value-type="string" calcext:value-type="string">
            <text:p>IOOyH-5ePic</text:p>
          </table:table-cell>
          <table:table-cell/>
          <table:table-cell table:formula="of:=&quot;['&quot; &amp; [.A297] &amp; &quot;', '&quot; &amp; YEAR([.B297]) &amp; &quot;-&quot; &amp; MONTH([.B297]) &amp; &quot;-&quot; &amp; DAY([.B297]) &amp; &quot;', '&quot; &amp; [.C297] &amp; &quot;', '&quot; &amp; [.D297] &amp; &quot;', '&quot; &amp; [.E297] &amp; &quot;', '&quot; &amp; [.F297] &amp; &quot;'],&quot;" office:value-type="string" office:string-value="['Max Payne - Ep 2', '2018-4-27', '0:10', 'Niall, Amin', 'IOOyH-5ePic', '']," calcext:value-type="string">
            <text:p>['Max Payne - Ep 2', '2018-4-27', '0:10', 'Niall, Amin', 'IOOyH-5ePic', ''],</text:p>
          </table:table-cell>
        </table:table-row>
        <table:table-row table:style-name="ro1">
          <table:table-cell office:value-type="string" calcext:value-type="string">
            <text:p>Mega Man X</text:p>
          </table:table-cell>
          <table:table-cell office:value-type="date" office:date-value="2016-04-09" calcext:value-type="date">
            <text:p>2016-04-09</text:p>
          </table:table-cell>
          <table:table-cell office:value-type="string" calcext:value-type="string">
            <text:p>1:1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FCKq51H04CE</text:p>
          </table:table-cell>
          <table:table-cell/>
          <table:table-cell table:formula="of:=&quot;['&quot; &amp; [.A298] &amp; &quot;', '&quot; &amp; YEAR([.B298]) &amp; &quot;-&quot; &amp; MONTH([.B298]) &amp; &quot;-&quot; &amp; DAY([.B298]) &amp; &quot;', '&quot; &amp; [.C298] &amp; &quot;', '&quot; &amp; [.D298] &amp; &quot;', '&quot; &amp; [.E298] &amp; &quot;', '&quot; &amp; [.F298] &amp; &quot;'],&quot;" office:value-type="string" office:string-value="['Mega Man X', '2016-4-9', '1:16', 'Dingdong, Julian', 'FCKq51H04CE', '']," calcext:value-type="string">
            <text:p>['Mega Man X', '2016-4-9', '1:16', 'Dingdong, Julian', 'FCKq51H04CE', ''],</text:p>
          </table:table-cell>
        </table:table-row>
        <table:table-row table:style-name="ro1">
          <table:table-cell office:value-type="string" calcext:value-type="string">
            <text:p>Megabonk</text:p>
          </table:table-cell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1:02</text:p>
          </table:table-cell>
          <table:table-cell office:value-type="string" calcext:value-type="string">
            <text:p>Niall, Adam, Tomar</text:p>
          </table:table-cell>
          <table:table-cell office:value-type="string" calcext:value-type="string">
            <text:p>1DhwPQJAFns</text:p>
          </table:table-cell>
          <table:table-cell/>
          <table:table-cell table:formula="of:=&quot;['&quot; &amp; [.A299] &amp; &quot;', '&quot; &amp; YEAR([.B299]) &amp; &quot;-&quot; &amp; MONTH([.B299]) &amp; &quot;-&quot; &amp; DAY([.B299]) &amp; &quot;', '&quot; &amp; [.C299] &amp; &quot;', '&quot; &amp; [.D299] &amp; &quot;', '&quot; &amp; [.E299] &amp; &quot;', '&quot; &amp; [.F299] &amp; &quot;'],&quot;" office:value-type="string" office:string-value="['Megabonk', '2025-12-12', '1:02', 'Niall, Adam, Tomar', '1DhwPQJAFns', '']," calcext:value-type="string">
            <text:p>['Megabonk', '2025-12-12', '1:02', 'Niall, Adam, Tomar', '1DhwPQJAFns', ''],</text:p>
          </table:table-cell>
        </table:table-row>
        <table:table-row table:style-name="ro1">
          <table:table-cell office:value-type="string" calcext:value-type="string">
            <text:p>Metal Gear Rising - Revengeance</text:p>
          </table:table-cell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kBn1-7ya-wM</text:p>
          </table:table-cell>
          <table:table-cell/>
          <table:table-cell table:formula="of:=&quot;['&quot; &amp; [.A300] &amp; &quot;', '&quot; &amp; YEAR([.B300]) &amp; &quot;-&quot; &amp; MONTH([.B300]) &amp; &quot;-&quot; &amp; DAY([.B300]) &amp; &quot;', '&quot; &amp; [.C300] &amp; &quot;', '&quot; &amp; [.D300] &amp; &quot;', '&quot; &amp; [.E300] &amp; &quot;', '&quot; &amp; [.F300] &amp; &quot;'],&quot;" office:value-type="string" office:string-value="['Metal Gear Rising - Revengeance', '2020-5-30', '5:18', 'Lyle, Tomar', 'kBn1-7ya-wM', '']," calcext:value-type="string">
            <text:p>['Metal Gear Rising - Revengeance', '2020-5-30', '5:18', 'Lyle, Tomar', 'kBn1-7ya-wM', ''],</text:p>
          </table:table-cell>
        </table:table-row>
        <table:table-row table:style-name="ro1">
          <table:table-cell office:value-type="string" calcext:value-type="string">
            <text:p>Metal Gear Solid 3 - Snake Eater</text:p>
          </table:table-cell>
          <table:table-cell office:value-type="date" office:date-value="2021-12-04" calcext:value-type="date">
            <text:p>2021-12-04</text:p>
          </table:table-cell>
          <table:table-cell office:value-type="string" calcext:value-type="string">
            <text:p>0:5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SAK3JJ76Yrw</text:p>
          </table:table-cell>
          <table:table-cell/>
          <table:table-cell table:formula="of:=&quot;['&quot; &amp; [.A301] &amp; &quot;', '&quot; &amp; YEAR([.B301]) &amp; &quot;-&quot; &amp; MONTH([.B301]) &amp; &quot;-&quot; &amp; DAY([.B301]) &amp; &quot;', '&quot; &amp; [.C301] &amp; &quot;', '&quot; &amp; [.D301] &amp; &quot;', '&quot; &amp; [.E301] &amp; &quot;', '&quot; &amp; [.F301] &amp; &quot;'],&quot;" office:value-type="string" office:string-value="['Metal Gear Solid 3 - Snake Eater', '2021-12-4', '0:56', 'Lyle, Tomar', 'SAK3JJ76Yrw', '']," calcext:value-type="string">
            <text:p>['Metal Gear Solid 3 - Snake Eater', '2021-12-4', '0:56', 'Lyle, Tomar', 'SAK3JJ76Yrw', ''],</text:p>
          </table:table-cell>
        </table:table-row>
        <table:table-row table:style-name="ro1">
          <table:table-cell office:value-type="string" calcext:value-type="string">
            <text:p>Metroid - Zero Mission</text:p>
          </table:table-cell>
          <table:table-cell office:value-type="date" office:date-value="2020-12-11" calcext:value-type="date">
            <text:p>2020-12-11</text:p>
          </table:table-cell>
          <table:table-cell office:value-type="string" calcext:value-type="string">
            <text:p>1:1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fGrq7Kon7ic</text:p>
          </table:table-cell>
          <table:table-cell/>
          <table:table-cell table:formula="of:=&quot;['&quot; &amp; [.A302] &amp; &quot;', '&quot; &amp; YEAR([.B302]) &amp; &quot;-&quot; &amp; MONTH([.B302]) &amp; &quot;-&quot; &amp; DAY([.B302]) &amp; &quot;', '&quot; &amp; [.C302] &amp; &quot;', '&quot; &amp; [.D302] &amp; &quot;', '&quot; &amp; [.E302] &amp; &quot;', '&quot; &amp; [.F302] &amp; &quot;'],&quot;" office:value-type="string" office:string-value="['Metroid - Zero Mission', '2020-12-11', '1:17', 'Lyle, Tomar', 'fGrq7Kon7ic', '']," calcext:value-type="string">
            <text:p>['Metroid - Zero Mission', '2020-12-11', '1:17', 'Lyle, Tomar', 'fGrq7Kon7ic', ''],</text:p>
          </table:table-cell>
        </table:table-row>
        <table:table-row table:style-name="ro1">
          <table:table-cell office:value-type="string" calcext:value-type="string">
            <text:p>Microsoft Flight Simulator 2020</text:p>
          </table:table-cell>
          <table:table-cell office:value-type="date" office:date-value="2020-09-02" calcext:value-type="date">
            <text:p>2020-09-02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DsBQAfsQ2L0</text:p>
          </table:table-cell>
          <table:table-cell/>
          <table:table-cell table:formula="of:=&quot;['&quot; &amp; [.A303] &amp; &quot;', '&quot; &amp; YEAR([.B303]) &amp; &quot;-&quot; &amp; MONTH([.B303]) &amp; &quot;-&quot; &amp; DAY([.B303]) &amp; &quot;', '&quot; &amp; [.C303] &amp; &quot;', '&quot; &amp; [.D303] &amp; &quot;', '&quot; &amp; [.E303] &amp; &quot;', '&quot; &amp; [.F303] &amp; &quot;'],&quot;" office:value-type="string" office:string-value="['Microsoft Flight Simulator 2020', '2020-9-2', '0:21', 'Lyle, Tomar', 'DsBQAfsQ2L0', '']," calcext:value-type="string">
            <text:p>['Microsoft Flight Simulator 2020', '2020-9-2', '0:21', 'Lyle, Tomar', 'DsBQAfsQ2L0', ''],</text:p>
          </table:table-cell>
        </table:table-row>
        <table:table-row table:style-name="ro1">
          <table:table-cell office:value-type="string" calcext:value-type="string">
            <text:p>Minecraft (Playthrough 2019 - 2020)</text:p>
          </table:table-cell>
          <table:table-cell office:value-type="date" office:date-value="2019-12-20" calcext:value-type="date">
            <text:p>2019-12-20</text:p>
          </table:table-cell>
          <table:table-cell office:value-type="string" calcext:value-type="string">
            <text:p>3:5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8mEU3PJgfFg</text:p>
          </table:table-cell>
          <table:table-cell/>
          <table:table-cell table:formula="of:=&quot;['&quot; &amp; [.A304] &amp; &quot;', '&quot; &amp; YEAR([.B304]) &amp; &quot;-&quot; &amp; MONTH([.B304]) &amp; &quot;-&quot; &amp; DAY([.B304]) &amp; &quot;', '&quot; &amp; [.C304] &amp; &quot;', '&quot; &amp; [.D304] &amp; &quot;', '&quot; &amp; [.E304] &amp; &quot;', '&quot; &amp; [.F304] &amp; &quot;'],&quot;" office:value-type="string" office:string-value="['Minecraft (Playthrough 2019 - 2020)', '2019-12-20', '3:51', 'Zach, Tomar', '8mEU3PJgfFg', '']," calcext:value-type="string">
            <text:p>['Minecraft (Playthrough 2019 - 2020)', '2019-12-20', '3:51', 'Zach, Tomar', '8mEU3PJgfFg', ''],</text:p>
          </table:table-cell>
        </table:table-row>
        <table:table-row table:style-name="ro1">
          <table:table-cell office:value-type="string" calcext:value-type="string">
            <text:p>Minority Report</text:p>
          </table:table-cell>
          <table:table-cell office:value-type="date" office:date-value="2018-10-10" calcext:value-type="date">
            <text:p>2018-10-10</text:p>
          </table:table-cell>
          <table:table-cell office:value-type="string" calcext:value-type="string">
            <text:p>0:58</text:p>
          </table:table-cell>
          <table:table-cell office:value-type="string" calcext:value-type="string">
            <text:p>Lami, Jack</text:p>
          </table:table-cell>
          <table:table-cell office:value-type="string" calcext:value-type="string">
            <text:p>1tl0Js9cFzk</text:p>
          </table:table-cell>
          <table:table-cell office:value-type="string" calcext:value-type="string">
            <text:p>8DErDKd53Rc</text:p>
          </table:table-cell>
          <table:table-cell table:formula="of:=&quot;['&quot; &amp; [.A305] &amp; &quot;', '&quot; &amp; YEAR([.B305]) &amp; &quot;-&quot; &amp; MONTH([.B305]) &amp; &quot;-&quot; &amp; DAY([.B305]) &amp; &quot;', '&quot; &amp; [.C305] &amp; &quot;', '&quot; &amp; [.D305] &amp; &quot;', '&quot; &amp; [.E305] &amp; &quot;', '&quot; &amp; [.F305] &amp; &quot;'],&quot;" office:value-type="string" office:string-value="['Minority Report', '2018-10-10', '0:58', 'Lami, Jack', '1tl0Js9cFzk', '8DErDKd53Rc']," calcext:value-type="string">
            <text:p>['Minority Report', '2018-10-10', '0:58', 'Lami, Jack', '1tl0Js9cFzk', '8DErDKd53Rc'],</text:p>
          </table:table-cell>
        </table:table-row>
        <table:table-row table:style-name="ro1">
          <table:table-cell office:value-type="string" calcext:value-type="string">
            <text:p>Monster Hunter Rise</text:p>
          </table:table-cell>
          <table:table-cell office:value-type="date" office:date-value="2024-06-19" calcext:value-type="date">
            <text:p>2024-06-19</text:p>
          </table:table-cell>
          <table:table-cell office:value-type="string" calcext:value-type="string">
            <text:p>0:42</text:p>
          </table:table-cell>
          <table:table-cell office:value-type="string" calcext:value-type="string">
            <text:p>Cory, Adam, Dave</text:p>
          </table:table-cell>
          <table:table-cell office:value-type="string" calcext:value-type="string">
            <text:p>6tC6nAZ3Fhc</text:p>
          </table:table-cell>
          <table:table-cell/>
          <table:table-cell table:formula="of:=&quot;['&quot; &amp; [.A306] &amp; &quot;', '&quot; &amp; YEAR([.B306]) &amp; &quot;-&quot; &amp; MONTH([.B306]) &amp; &quot;-&quot; &amp; DAY([.B306]) &amp; &quot;', '&quot; &amp; [.C306] &amp; &quot;', '&quot; &amp; [.D306] &amp; &quot;', '&quot; &amp; [.E306] &amp; &quot;', '&quot; &amp; [.F306] &amp; &quot;'],&quot;" office:value-type="string" office:string-value="['Monster Hunter Rise', '2024-6-19', '0:42', 'Cory, Adam, Dave', '6tC6nAZ3Fhc', '']," calcext:value-type="string">
            <text:p>['Monster Hunter Rise', '2024-6-19', '0:42', 'Cory, Adam, Dave', '6tC6nAZ3Fhc', ''],</text:p>
          </table:table-cell>
        </table:table-row>
        <table:table-row table:style-name="ro1">
          <table:table-cell office:value-type="string" calcext:value-type="string">
            <text:p>Moons Of Darsalon</text:p>
          </table:table-cell>
          <table:table-cell office:value-type="date" office:date-value="2023-05-04" calcext:value-type="date">
            <text:p>2023-05-04</text:p>
          </table:table-cell>
          <table:table-cell office:value-type="string" calcext:value-type="string">
            <text:p>0:3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q81-9kzS6kM</text:p>
          </table:table-cell>
          <table:table-cell/>
          <table:table-cell table:formula="of:=&quot;['&quot; &amp; [.A307] &amp; &quot;', '&quot; &amp; YEAR([.B307]) &amp; &quot;-&quot; &amp; MONTH([.B307]) &amp; &quot;-&quot; &amp; DAY([.B307]) &amp; &quot;', '&quot; &amp; [.C307] &amp; &quot;', '&quot; &amp; [.D307] &amp; &quot;', '&quot; &amp; [.E307] &amp; &quot;', '&quot; &amp; [.F307] &amp; &quot;'],&quot;" office:value-type="string" office:string-value="['Moons Of Darsalon', '2023-5-4', '0:32', 'Lyle, Tomar', 'q81-9kzS6kM', '']," calcext:value-type="string">
            <text:p>['Moons Of Darsalon', '2023-5-4', '0:32', 'Lyle, Tomar', 'q81-9kzS6kM', ''],</text:p>
          </table:table-cell>
        </table:table-row>
        <table:table-row table:style-name="ro1">
          <table:table-cell office:value-type="string" calcext:value-type="string">
            <text:p>Mortal Shell</text:p>
          </table:table-cell>
          <table:table-cell office:value-type="date" office:date-value="2020-08-27" calcext:value-type="date">
            <text:p>2020-08-27</text:p>
          </table:table-cell>
          <table:table-cell office:value-type="string" calcext:value-type="string">
            <text:p>0:2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IHdmEhEjJk4</text:p>
          </table:table-cell>
          <table:table-cell/>
          <table:table-cell table:formula="of:=&quot;['&quot; &amp; [.A308] &amp; &quot;', '&quot; &amp; YEAR([.B308]) &amp; &quot;-&quot; &amp; MONTH([.B308]) &amp; &quot;-&quot; &amp; DAY([.B308]) &amp; &quot;', '&quot; &amp; [.C308] &amp; &quot;', '&quot; &amp; [.D308] &amp; &quot;', '&quot; &amp; [.E308] &amp; &quot;', '&quot; &amp; [.F308] &amp; &quot;'],&quot;" office:value-type="string" office:string-value="['Mortal Shell', '2020-8-27', '0:29', 'Lyle, Tomar', 'IHdmEhEjJk4', '']," calcext:value-type="string">
            <text:p>['Mortal Shell', '2020-8-27', '0:29', 'Lyle, Tomar', 'IHdmEhEjJk4', ''],</text:p>
          </table:table-cell>
        </table:table-row>
        <table:table-row table:style-name="ro1">
          <table:table-cell office:value-type="string" calcext:value-type="string">
            <text:p>Mortuary Assistant, The</text:p>
          </table:table-cell>
          <table:table-cell office:value-type="date" office:date-value="2023-10-19" calcext:value-type="date">
            <text:p>2023-10-19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ZlP91lfo8UQ</text:p>
          </table:table-cell>
          <table:table-cell/>
          <table:table-cell table:formula="of:=&quot;['&quot; &amp; [.A309] &amp; &quot;', '&quot; &amp; YEAR([.B309]) &amp; &quot;-&quot; &amp; MONTH([.B309]) &amp; &quot;-&quot; &amp; DAY([.B309]) &amp; &quot;', '&quot; &amp; [.C309] &amp; &quot;', '&quot; &amp; [.D309] &amp; &quot;', '&quot; &amp; [.E309] &amp; &quot;', '&quot; &amp; [.F309] &amp; &quot;'],&quot;" office:value-type="string" office:string-value="['Mortuary Assistant, The', '2023-10-19', '1:09', 'Lyle, Tomar', 'ZlP91lfo8UQ', '']," calcext:value-type="string">
            <text:p>['Mortuary Assistant, The', '2023-10-19', '1:09', 'Lyle, Tomar', 'ZlP91lfo8UQ', ''],</text:p>
          </table:table-cell>
        </table:table-row>
        <table:table-row table:style-name="ro1">
          <table:table-cell office:value-type="string" calcext:value-type="string">
            <text:p>Mr. Bones</text:p>
          </table:table-cell>
          <table:table-cell office:value-type="date" office:date-value="2017-10-21" calcext:value-type="date">
            <text:p>2017-10-21</text:p>
          </table:table-cell>
          <table:table-cell office:value-type="string" calcext:value-type="string">
            <text:p>0:47</text:p>
          </table:table-cell>
          <table:table-cell office:value-type="string" calcext:value-type="string">
            <text:p>Dingdong, Julian, Amin</text:p>
          </table:table-cell>
          <table:table-cell office:value-type="string" calcext:value-type="string">
            <text:p>6HyElESP8bg</text:p>
          </table:table-cell>
          <table:table-cell/>
          <table:table-cell table:formula="of:=&quot;['&quot; &amp; [.A310] &amp; &quot;', '&quot; &amp; YEAR([.B310]) &amp; &quot;-&quot; &amp; MONTH([.B310]) &amp; &quot;-&quot; &amp; DAY([.B310]) &amp; &quot;', '&quot; &amp; [.C310] &amp; &quot;', '&quot; &amp; [.D310] &amp; &quot;', '&quot; &amp; [.E310] &amp; &quot;', '&quot; &amp; [.F310] &amp; &quot;'],&quot;" office:value-type="string" office:string-value="['Mr. Bones', '2017-10-21', '0:47', 'Dingdong, Julian, Amin', '6HyElESP8bg', '']," calcext:value-type="string">
            <text:p>['Mr. Bones', '2017-10-21', '0:47', 'Dingdong, Julian, Amin', '6HyElESP8bg', ''],</text:p>
          </table:table-cell>
        </table:table-row>
        <table:table-row table:style-name="ro1">
          <table:table-cell office:value-type="string" calcext:value-type="string">
            <text:p>Mr. Maze</text:p>
          </table:table-cell>
          <table:table-cell office:value-type="date" office:date-value="2020-11-03" calcext:value-type="date">
            <text:p>2020-11-03</text:p>
          </table:table-cell>
          <table:table-cell office:value-type="string" calcext:value-type="string">
            <text:p>1:06</text:p>
          </table:table-cell>
          <table:table-cell office:value-type="string" calcext:value-type="string">
            <text:p>Dingdong, Sonny</text:p>
          </table:table-cell>
          <table:table-cell office:value-type="string" calcext:value-type="string">
            <text:p>KKI6e5ouY68</text:p>
          </table:table-cell>
          <table:table-cell/>
          <table:table-cell table:formula="of:=&quot;['&quot; &amp; [.A311] &amp; &quot;', '&quot; &amp; YEAR([.B311]) &amp; &quot;-&quot; &amp; MONTH([.B311]) &amp; &quot;-&quot; &amp; DAY([.B311]) &amp; &quot;', '&quot; &amp; [.C311] &amp; &quot;', '&quot; &amp; [.D311] &amp; &quot;', '&quot; &amp; [.E311] &amp; &quot;', '&quot; &amp; [.F311] &amp; &quot;'],&quot;" office:value-type="string" office:string-value="['Mr. Maze', '2020-11-3', '1:06', 'Dingdong, Sonny', 'KKI6e5ouY68', '']," calcext:value-type="string">
            <text:p>['Mr. Maze', '2020-11-3', '1:06', 'Dingdong, Sonny', 'KKI6e5ouY68', ''],</text:p>
          </table:table-cell>
        </table:table-row>
        <table:table-row table:style-name="ro1">
          <table:table-cell office:value-type="string" calcext:value-type="string">
            <text:p>My Friend Pedro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1:2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N9Tq0XLBZY</text:p>
          </table:table-cell>
          <table:table-cell/>
          <table:table-cell table:formula="of:=&quot;['&quot; &amp; [.A312] &amp; &quot;', '&quot; &amp; YEAR([.B312]) &amp; &quot;-&quot; &amp; MONTH([.B312]) &amp; &quot;-&quot; &amp; DAY([.B312]) &amp; &quot;', '&quot; &amp; [.C312] &amp; &quot;', '&quot; &amp; [.D312] &amp; &quot;', '&quot; &amp; [.E312] &amp; &quot;', '&quot; &amp; [.F312] &amp; &quot;'],&quot;" office:value-type="string" office:string-value="['My Friend Pedro', '2019-6-26', '1:25', 'Lyle, Tomar', 'ON9Tq0XLBZY', '']," calcext:value-type="string">
            <text:p>['My Friend Pedro', '2019-6-26', '1:25', 'Lyle, Tomar', 'ON9Tq0XLBZY', ''],</text:p>
          </table:table-cell>
        </table:table-row>
        <table:table-row table:style-name="ro1">
          <table:table-cell office:value-type="string" calcext:value-type="string">
            <text:p>My Summer Car</text:p>
          </table:table-cell>
          <table:table-cell office:value-type="date" office:date-value="2024-05-05" calcext:value-type="date">
            <text:p>2024-05-05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hQLejKgZMnM</text:p>
          </table:table-cell>
          <table:table-cell/>
          <table:table-cell table:formula="of:=&quot;['&quot; &amp; [.A313] &amp; &quot;', '&quot; &amp; YEAR([.B313]) &amp; &quot;-&quot; &amp; MONTH([.B313]) &amp; &quot;-&quot; &amp; DAY([.B313]) &amp; &quot;', '&quot; &amp; [.C313] &amp; &quot;', '&quot; &amp; [.D313] &amp; &quot;', '&quot; &amp; [.E313] &amp; &quot;', '&quot; &amp; [.F313] &amp; &quot;'],&quot;" office:value-type="string" office:string-value="['My Summer Car', '2024-5-5', '0:23', 'Lyle, Tomar', 'hQLejKgZMnM', '']," calcext:value-type="string">
            <text:p>['My Summer Car', '2024-5-5', '0:23', 'Lyle, Tomar', 'hQLejKgZMnM', ''],</text:p>
          </table:table-cell>
        </table:table-row>
        <table:table-row table:style-name="ro1">
          <table:table-cell office:value-type="string" calcext:value-type="string">
            <text:p>Mystical Ninja</text:p>
          </table:table-cell>
          <table:table-cell office:value-type="date" office:date-value="2016-09-14" calcext:value-type="date">
            <text:p>2016-09-14</text:p>
          </table:table-cell>
          <table:table-cell office:value-type="string" calcext:value-type="string">
            <text:p>1:5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bkXsg1anHkY</text:p>
          </table:table-cell>
          <table:table-cell/>
          <table:table-cell table:formula="of:=&quot;['&quot; &amp; [.A314] &amp; &quot;', '&quot; &amp; YEAR([.B314]) &amp; &quot;-&quot; &amp; MONTH([.B314]) &amp; &quot;-&quot; &amp; DAY([.B314]) &amp; &quot;', '&quot; &amp; [.C314] &amp; &quot;', '&quot; &amp; [.D314] &amp; &quot;', '&quot; &amp; [.E314] &amp; &quot;', '&quot; &amp; [.F314] &amp; &quot;'],&quot;" office:value-type="string" office:string-value="['Mystical Ninja', '2016-9-14', '1:52', 'Dingdong, Julian', 'bkXsg1anHkY', '']," calcext:value-type="string">
            <text:p>['Mystical Ninja', '2016-9-14', '1:52', 'Dingdong, Julian', 'bkXsg1anHkY', ''],</text:p>
          </table:table-cell>
        </table:table-row>
        <table:table-row table:style-name="ro1">
          <table:table-cell office:value-type="string" calcext:value-type="string">
            <text:p>Nagano Winter Olympics '98</text:p>
          </table:table-cell>
          <table:table-cell office:value-type="date" office:date-value="2017-12-25" calcext:value-type="date">
            <text:p>2017-12-25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PxFWsiTECQ</text:p>
          </table:table-cell>
          <table:table-cell/>
          <table:table-cell table:formula="of:=&quot;['&quot; &amp; [.A315] &amp; &quot;', '&quot; &amp; YEAR([.B315]) &amp; &quot;-&quot; &amp; MONTH([.B315]) &amp; &quot;-&quot; &amp; DAY([.B315]) &amp; &quot;', '&quot; &amp; [.C315] &amp; &quot;', '&quot; &amp; [.D315] &amp; &quot;', '&quot; &amp; [.E315] &amp; &quot;', '&quot; &amp; [.F315] &amp; &quot;'],&quot;" office:value-type="string" office:string-value="['Nagano Winter Olympics '98', '2017-12-25', '0:23', 'Dingdong, Julian', 'DPxFWsiTECQ', '']," calcext:value-type="string">
            <text:p>['Nagano Winter Olympics '98', '2017-12-25', '0:23', 'Dingdong, Julian', 'DPxFWsiTECQ', ''],</text:p>
          </table:table-cell>
        </table:table-row>
        <table:table-row table:style-name="ro1">
          <table:table-cell office:value-type="string" calcext:value-type="string">
            <text:p>Never Again</text:p>
          </table:table-cell>
          <table:table-cell office:value-type="date" office:date-value="2019-06-07" calcext:value-type="date">
            <text:p>2019-06-07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VYfeCVy023A</text:p>
          </table:table-cell>
          <table:table-cell/>
          <table:table-cell table:formula="of:=&quot;['&quot; &amp; [.A316] &amp; &quot;', '&quot; &amp; YEAR([.B316]) &amp; &quot;-&quot; &amp; MONTH([.B316]) &amp; &quot;-&quot; &amp; DAY([.B316]) &amp; &quot;', '&quot; &amp; [.C316] &amp; &quot;', '&quot; &amp; [.D316] &amp; &quot;', '&quot; &amp; [.E316] &amp; &quot;', '&quot; &amp; [.F316] &amp; &quot;'],&quot;" office:value-type="string" office:string-value="['Never Again', '2019-6-7', '1:00', 'Mick, Tomar', 'VYfeCVy023A', '']," calcext:value-type="string">
            <text:p>['Never Again', '2019-6-7', '1:00', 'Mick, Tomar', 'VYfeCVy023A', ''],</text:p>
          </table:table-cell>
        </table:table-row>
        <table:table-row table:style-name="ro1">
          <table:table-cell office:value-type="string" calcext:value-type="string">
            <text:p>Newgrounds Christmas Special</text:p>
          </table:table-cell>
          <table:table-cell office:value-type="date" office:date-value="2020-12-25" calcext:value-type="date">
            <text:p>2020-12-25</text:p>
          </table:table-cell>
          <table:table-cell office:value-type="string" calcext:value-type="string">
            <text:p>0:53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uA4KDhzAw_U</text:p>
          </table:table-cell>
          <table:table-cell/>
          <table:table-cell table:formula="of:=&quot;['&quot; &amp; [.A317] &amp; &quot;', '&quot; &amp; YEAR([.B317]) &amp; &quot;-&quot; &amp; MONTH([.B317]) &amp; &quot;-&quot; &amp; DAY([.B317]) &amp; &quot;', '&quot; &amp; [.C317] &amp; &quot;', '&quot; &amp; [.D317] &amp; &quot;', '&quot; &amp; [.E317] &amp; &quot;', '&quot; &amp; [.F317] &amp; &quot;'],&quot;" office:value-type="string" office:string-value="['Newgrounds Christmas Special', '2020-12-25', '0:53', 'Zach, Lyle, Tomar', 'uA4KDhzAw_U', '']," calcext:value-type="string">
            <text:p>['Newgrounds Christmas Special', '2020-12-25', '0:53', 'Zach, Lyle, Tomar', 'uA4KDhzAw_U', ''],</text:p>
          </table:table-cell>
        </table:table-row>
        <table:table-row table:style-name="ro1">
          <table:table-cell office:value-type="string" calcext:value-type="string">
            <text:p>Newgrounds Games</text:p>
          </table:table-cell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i6hYHuzhjoo</text:p>
          </table:table-cell>
          <table:table-cell/>
          <table:table-cell table:formula="of:=&quot;['&quot; &amp; [.A318] &amp; &quot;', '&quot; &amp; YEAR([.B318]) &amp; &quot;-&quot; &amp; MONTH([.B318]) &amp; &quot;-&quot; &amp; DAY([.B318]) &amp; &quot;', '&quot; &amp; [.C318] &amp; &quot;', '&quot; &amp; [.D318] &amp; &quot;', '&quot; &amp; [.E318] &amp; &quot;', '&quot; &amp; [.F318] &amp; &quot;'],&quot;" office:value-type="string" office:string-value="['Newgrounds Games', '2017-9-4', '3:39', 'Dingdong, Julian', 'i6hYHuzhjoo', '']," calcext:value-type="string">
            <text:p>['Newgrounds Games', '2017-9-4', '3:39', 'Dingdong, Julian', 'i6hYHuzhjoo', ''],</text:p>
          </table:table-cell>
        </table:table-row>
        <table:table-row table:style-name="ro1">
          <table:table-cell office:value-type="string" calcext:value-type="string">
            <text:p>Night At The Gates Of Hell</text:p>
          </table:table-cell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0:48</text:p>
          </table:table-cell>
          <table:table-cell office:value-type="string" calcext:value-type="string">
            <text:p>Cory, Lyle, Tomar</text:p>
          </table:table-cell>
          <table:table-cell office:value-type="string" calcext:value-type="string">
            <text:p>pk8j85jMzGs</text:p>
          </table:table-cell>
          <table:table-cell/>
          <table:table-cell table:formula="of:=&quot;['&quot; &amp; [.A319] &amp; &quot;', '&quot; &amp; YEAR([.B319]) &amp; &quot;-&quot; &amp; MONTH([.B319]) &amp; &quot;-&quot; &amp; DAY([.B319]) &amp; &quot;', '&quot; &amp; [.C319] &amp; &quot;', '&quot; &amp; [.D319] &amp; &quot;', '&quot; &amp; [.E319] &amp; &quot;', '&quot; &amp; [.F319] &amp; &quot;'],&quot;" office:value-type="string" office:string-value="['Night At The Gates Of Hell', '2022-10-27', '0:48', 'Cory, Lyle, Tomar', 'pk8j85jMzGs', '']," calcext:value-type="string">
            <text:p>['Night At The Gates Of Hell', '2022-10-27', '0:48', 'Cory, Lyle, Tomar', 'pk8j85jMzGs', ''],</text:p>
          </table:table-cell>
        </table:table-row>
        <table:table-row table:style-name="ro1">
          <table:table-cell office:value-type="string" calcext:value-type="string">
            <text:p>Night Security</text:p>
          </table:table-cell>
          <table:table-cell office:value-type="date" office:date-value="2025-10-31" calcext:value-type="date">
            <text:p>2025-10-31</text:p>
          </table:table-cell>
          <table:table-cell office:value-type="string" calcext:value-type="string">
            <text:p>0:53</text:p>
          </table:table-cell>
          <table:table-cell office:value-type="string" calcext:value-type="string">
            <text:p>Tomar, Niall</text:p>
          </table:table-cell>
          <table:table-cell office:value-type="string" calcext:value-type="string">
            <text:p>H4HlPPnVL0s</text:p>
          </table:table-cell>
          <table:table-cell/>
          <table:table-cell table:formula="of:=&quot;['&quot; &amp; [.A320] &amp; &quot;', '&quot; &amp; YEAR([.B320]) &amp; &quot;-&quot; &amp; MONTH([.B320]) &amp; &quot;-&quot; &amp; DAY([.B320]) &amp; &quot;', '&quot; &amp; [.C320] &amp; &quot;', '&quot; &amp; [.D320] &amp; &quot;', '&quot; &amp; [.E320] &amp; &quot;', '&quot; &amp; [.F320] &amp; &quot;'],&quot;" office:value-type="string" office:string-value="['Night Security', '2025-10-31', '0:53', 'Tomar, Niall', 'H4HlPPnVL0s', '']," calcext:value-type="string">
            <text:p>['Night Security', '2025-10-31', '0:53', 'Tomar, Niall', 'H4HlPPnVL0s', ''],</text:p>
          </table:table-cell>
        </table:table-row>
        <table:table-row table:style-name="ro1">
          <table:table-cell office:value-type="string" calcext:value-type="string">
            <text:p>Nightmare Before Christmas - Oogie's Revenge</text:p>
          </table:table-cell>
          <table:table-cell office:value-type="date" office:date-value="2016-10-25" calcext:value-type="date">
            <text:p>2016-10-25</text:p>
          </table:table-cell>
          <table:table-cell office:value-type="string" calcext:value-type="string">
            <text:p>0:4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2wtl_q7JzUQ</text:p>
          </table:table-cell>
          <table:table-cell/>
          <table:table-cell table:formula="of:=&quot;['&quot; &amp; [.A321] &amp; &quot;', '&quot; &amp; YEAR([.B321]) &amp; &quot;-&quot; &amp; MONTH([.B321]) &amp; &quot;-&quot; &amp; DAY([.B321]) &amp; &quot;', '&quot; &amp; [.C321] &amp; &quot;', '&quot; &amp; [.D321] &amp; &quot;', '&quot; &amp; [.E321] &amp; &quot;', '&quot; &amp; [.F321] &amp; &quot;'],&quot;" office:value-type="string" office:string-value="['Nightmare Before Christmas - Oogie's Revenge', '2016-10-25', '0:44', 'Dingdong, Julian', '2wtl_q7JzUQ', '']," calcext:value-type="string">
            <text:p>['Nightmare Before Christmas - Oogie's Revenge', '2016-10-25', '0:44', 'Dingdong, Julian', '2wtl_q7JzUQ', ''],</text:p>
          </table:table-cell>
        </table:table-row>
        <table:table-row table:style-name="ro1">
          <table:table-cell office:value-type="string" calcext:value-type="string">
            <text:p>Nightmare Before Christmas GBA - Ep 1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0:20</text:p>
          </table:table-cell>
          <table:table-cell office:value-type="string" calcext:value-type="string">
            <text:p>Dingdong, Julian, Amin</text:p>
          </table:table-cell>
          <table:table-cell office:value-type="string" calcext:value-type="string">
            <text:p>D2JDpHr_EcI</text:p>
          </table:table-cell>
          <table:table-cell/>
          <table:table-cell table:formula="of:=&quot;['&quot; &amp; [.A322] &amp; &quot;', '&quot; &amp; YEAR([.B322]) &amp; &quot;-&quot; &amp; MONTH([.B322]) &amp; &quot;-&quot; &amp; DAY([.B322]) &amp; &quot;', '&quot; &amp; [.C322] &amp; &quot;', '&quot; &amp; [.D322] &amp; &quot;', '&quot; &amp; [.E322] &amp; &quot;', '&quot; &amp; [.F322] &amp; &quot;'],&quot;" office:value-type="string" office:string-value="['Nightmare Before Christmas GBA - Ep 1', '2017-10-23', '0:20', 'Dingdong, Julian, Amin', 'D2JDpHr_EcI', '']," calcext:value-type="string">
            <text:p>['Nightmare Before Christmas GBA - Ep 1', '2017-10-23', '0:20', 'Dingdong, Julian, Amin', 'D2JDpHr_EcI', ''],</text:p>
          </table:table-cell>
        </table:table-row>
        <table:table-row table:style-name="ro1">
          <table:table-cell office:value-type="string" calcext:value-type="string">
            <text:p>Nightmare Before Christmas GBA - Ep 2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0:19</text:p>
          </table:table-cell>
          <table:table-cell office:value-type="string" calcext:value-type="string">
            <text:p>Dingdong, Julian, Amin</text:p>
          </table:table-cell>
          <table:table-cell office:value-type="string" calcext:value-type="string">
            <text:p>ZJ8FMYGFrPE</text:p>
          </table:table-cell>
          <table:table-cell/>
          <table:table-cell table:formula="of:=&quot;['&quot; &amp; [.A323] &amp; &quot;', '&quot; &amp; YEAR([.B323]) &amp; &quot;-&quot; &amp; MONTH([.B323]) &amp; &quot;-&quot; &amp; DAY([.B323]) &amp; &quot;', '&quot; &amp; [.C323] &amp; &quot;', '&quot; &amp; [.D323] &amp; &quot;', '&quot; &amp; [.E323] &amp; &quot;', '&quot; &amp; [.F323] &amp; &quot;'],&quot;" office:value-type="string" office:string-value="['Nightmare Before Christmas GBA - Ep 2', '2017-10-24', '0:19', 'Dingdong, Julian, Amin', 'ZJ8FMYGFrPE', '']," calcext:value-type="string">
            <text:p>['Nightmare Before Christmas GBA - Ep 2', '2017-10-24', '0:19', 'Dingdong, Julian, Amin', 'ZJ8FMYGFrPE', ''],</text:p>
          </table:table-cell>
        </table:table-row>
        <table:table-row table:style-name="ro1">
          <table:table-cell office:value-type="string" calcext:value-type="string">
            <text:p>No Cure</text:p>
          </table:table-cell>
          <table:table-cell office:value-type="date" office:date-value="2020-10-28" calcext:value-type="date">
            <text:p>2020-10-28</text:p>
          </table:table-cell>
          <table:table-cell office:value-type="string" calcext:value-type="string">
            <text:p>0:46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vG-7H1P_8B4</text:p>
          </table:table-cell>
          <table:table-cell/>
          <table:table-cell table:formula="of:=&quot;['&quot; &amp; [.A324] &amp; &quot;', '&quot; &amp; YEAR([.B324]) &amp; &quot;-&quot; &amp; MONTH([.B324]) &amp; &quot;-&quot; &amp; DAY([.B324]) &amp; &quot;', '&quot; &amp; [.C324] &amp; &quot;', '&quot; &amp; [.D324] &amp; &quot;', '&quot; &amp; [.E324] &amp; &quot;', '&quot; &amp; [.F324] &amp; &quot;'],&quot;" office:value-type="string" office:string-value="['No Cure', '2020-10-28', '0:46', 'Zach, Lyle', 'vG-7H1P_8B4', '']," calcext:value-type="string">
            <text:p>['No Cure', '2020-10-28', '0:46', 'Zach, Lyle', 'vG-7H1P_8B4', ''],</text:p>
          </table:table-cell>
        </table:table-row>
        <table:table-row table:style-name="ro1">
          <table:table-cell office:value-type="string" calcext:value-type="string">
            <text:p>No Man's Sky</text:p>
          </table:table-cell>
          <table:table-cell office:value-type="date" office:date-value="2016-08-10" calcext:value-type="date">
            <text:p>2016-08-10</text:p>
          </table:table-cell>
          <table:table-cell office:value-type="string" calcext:value-type="string">
            <text:p>0:5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7vy-GZhQKo</text:p>
          </table:table-cell>
          <table:table-cell/>
          <table:table-cell table:formula="of:=&quot;['&quot; &amp; [.A325] &amp; &quot;', '&quot; &amp; YEAR([.B325]) &amp; &quot;-&quot; &amp; MONTH([.B325]) &amp; &quot;-&quot; &amp; DAY([.B325]) &amp; &quot;', '&quot; &amp; [.C325] &amp; &quot;', '&quot; &amp; [.D325] &amp; &quot;', '&quot; &amp; [.E325] &amp; &quot;', '&quot; &amp; [.F325] &amp; &quot;'],&quot;" office:value-type="string" office:string-value="['No Man's Sky', '2016-8-10', '0:51', 'Dingdong, Julian', 'c7vy-GZhQKo', '']," calcext:value-type="string">
            <text:p>['No Man's Sky', '2016-8-10', '0:51', 'Dingdong, Julian', 'c7vy-GZhQKo', ''],</text:p>
          </table:table-cell>
        </table:table-row>
        <table:table-row table:style-name="ro1">
          <table:table-cell office:value-type="string" calcext:value-type="string">
            <text:p>No More Heroes</text:p>
          </table:table-cell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1:56</text:p>
          </table:table-cell>
          <table:table-cell office:value-type="string" calcext:value-type="string">
            <text:p>Lyle, Dave</text:p>
          </table:table-cell>
          <table:table-cell office:value-type="string" calcext:value-type="string">
            <text:p>2ezNhEZyr9A</text:p>
          </table:table-cell>
          <table:table-cell/>
          <table:table-cell table:formula="of:=&quot;['&quot; &amp; [.A326] &amp; &quot;', '&quot; &amp; YEAR([.B326]) &amp; &quot;-&quot; &amp; MONTH([.B326]) &amp; &quot;-&quot; &amp; DAY([.B326]) &amp; &quot;', '&quot; &amp; [.C326] &amp; &quot;', '&quot; &amp; [.D326] &amp; &quot;', '&quot; &amp; [.E326] &amp; &quot;', '&quot; &amp; [.F326] &amp; &quot;'],&quot;" office:value-type="string" office:string-value="['No More Heroes', '2022-8-31', '1:56', 'Lyle, Dave', '2ezNhEZyr9A', '']," calcext:value-type="string">
            <text:p>['No More Heroes', '2022-8-31', '1:56', 'Lyle, Dave', '2ezNhEZyr9A', ''],</text:p>
          </table:table-cell>
        </table:table-row>
        <table:table-row table:style-name="ro1">
          <table:table-cell office:value-type="string" calcext:value-type="string">
            <text:p>No One Lives Under The Lighthouse</text:p>
          </table:table-cell>
          <table:table-cell office:value-type="date" office:date-value="2020-07-31" calcext:value-type="date">
            <text:p>2020-07-31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60zyAYqtXjQ</text:p>
          </table:table-cell>
          <table:table-cell/>
          <table:table-cell table:formula="of:=&quot;['&quot; &amp; [.A327] &amp; &quot;', '&quot; &amp; YEAR([.B327]) &amp; &quot;-&quot; &amp; MONTH([.B327]) &amp; &quot;-&quot; &amp; DAY([.B327]) &amp; &quot;', '&quot; &amp; [.C327] &amp; &quot;', '&quot; &amp; [.D327] &amp; &quot;', '&quot; &amp; [.E327] &amp; &quot;', '&quot; &amp; [.F327] &amp; &quot;'],&quot;" office:value-type="string" office:string-value="['No One Lives Under The Lighthouse', '2020-7-31', '1:09', 'Lyle, Tomar', '60zyAYqtXjQ', '']," calcext:value-type="string">
            <text:p>['No One Lives Under The Lighthouse', '2020-7-31', '1:09', 'Lyle, Tomar', '60zyAYqtXjQ', ''],</text:p>
          </table:table-cell>
        </table:table-row>
        <table:table-row table:style-name="ro1">
          <table:table-cell office:value-type="string" calcext:value-type="string">
            <text:p>Noita</text:p>
          </table:table-cell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VjOc85meYkg</text:p>
          </table:table-cell>
          <table:table-cell/>
          <table:table-cell table:formula="of:=&quot;['&quot; &amp; [.A328] &amp; &quot;', '&quot; &amp; YEAR([.B328]) &amp; &quot;-&quot; &amp; MONTH([.B328]) &amp; &quot;-&quot; &amp; DAY([.B328]) &amp; &quot;', '&quot; &amp; [.C328] &amp; &quot;', '&quot; &amp; [.D328] &amp; &quot;', '&quot; &amp; [.E328] &amp; &quot;', '&quot; &amp; [.F328] &amp; &quot;'],&quot;" office:value-type="string" office:string-value="['Noita', '2020-7-22', '6:49', 'Zach, Tomar', 'VjOc85meYkg', '']," calcext:value-type="string">
            <text:p>['Noita', '2020-7-22', '6:49', 'Zach, Tomar', 'VjOc85meYkg', ''],</text:p>
          </table:table-cell>
        </table:table-row>
        <table:table-row table:style-name="ro1">
          <table:table-cell office:value-type="string" calcext:value-type="string">
            <text:p>Noita (Stream) 1</text:p>
          </table:table-cell>
          <table:table-cell office:value-type="date" office:date-value="2021-05-16" calcext:value-type="date">
            <text:p>2021-05-16</text:p>
          </table:table-cell>
          <table:table-cell office:value-type="string" calcext:value-type="string">
            <text:p>1:19</text:p>
          </table:table-cell>
          <table:table-cell office:value-type="string" calcext:value-type="string">
            <text:p>Veronica, Sonny</text:p>
          </table:table-cell>
          <table:table-cell office:value-type="string" calcext:value-type="string">
            <text:p>LqbPmzR6zEw</text:p>
          </table:table-cell>
          <table:table-cell/>
          <table:table-cell table:formula="of:=&quot;['&quot; &amp; [.A329] &amp; &quot;', '&quot; &amp; YEAR([.B329]) &amp; &quot;-&quot; &amp; MONTH([.B329]) &amp; &quot;-&quot; &amp; DAY([.B329]) &amp; &quot;', '&quot; &amp; [.C329] &amp; &quot;', '&quot; &amp; [.D329] &amp; &quot;', '&quot; &amp; [.E329] &amp; &quot;', '&quot; &amp; [.F329] &amp; &quot;'],&quot;" office:value-type="string" office:string-value="['Noita (Stream) 1', '2021-5-16', '1:19', 'Veronica, Sonny', 'LqbPmzR6zEw', '']," calcext:value-type="string">
            <text:p>['Noita (Stream) 1', '2021-5-16', '1:19', 'Veronica, Sonny', 'LqbPmzR6zEw', ''],</text:p>
          </table:table-cell>
        </table:table-row>
        <table:table-row table:style-name="ro1">
          <table:table-cell office:value-type="string" calcext:value-type="string">
            <text:p>Noita (Stream) 2</text:p>
          </table:table-cell>
          <table:table-cell office:value-type="date" office:date-value="2021-09-07" calcext:value-type="date">
            <text:p>2021-09-07</text:p>
          </table:table-cell>
          <table:table-cell office:value-type="string" calcext:value-type="string">
            <text:p>1:3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hTVeyZgy-o</text:p>
          </table:table-cell>
          <table:table-cell/>
          <table:table-cell table:formula="of:=&quot;['&quot; &amp; [.A330] &amp; &quot;', '&quot; &amp; YEAR([.B330]) &amp; &quot;-&quot; &amp; MONTH([.B330]) &amp; &quot;-&quot; &amp; DAY([.B330]) &amp; &quot;', '&quot; &amp; [.C330] &amp; &quot;', '&quot; &amp; [.D330] &amp; &quot;', '&quot; &amp; [.E330] &amp; &quot;', '&quot; &amp; [.F330] &amp; &quot;'],&quot;" office:value-type="string" office:string-value="['Noita (Stream) 2', '2021-9-7', '1:35', 'Adam', 'GhTVeyZgy-o', '']," calcext:value-type="string">
            <text:p>['Noita (Stream) 2', '2021-9-7', '1:35', 'Adam', 'GhTVeyZgy-o', ''],</text:p>
          </table:table-cell>
        </table:table-row>
        <table:table-row table:style-name="ro1">
          <table:table-cell office:value-type="string" calcext:value-type="string">
            <text:p>Not Digimon World 1 <text:s/>-</text:p>
          </table:table-cell>
          <table:table-cell office:value-type="date" office:date-value="2016-10-03" calcext:value-type="date">
            <text:p>2016-10-03</text:p>
          </table:table-cell>
          <table:table-cell office:value-type="string" calcext:value-type="string">
            <text:p>0:1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9DdkDRAyAvk</text:p>
          </table:table-cell>
          <table:table-cell/>
          <table:table-cell table:formula="of:=&quot;['&quot; &amp; [.A331] &amp; &quot;', '&quot; &amp; YEAR([.B331]) &amp; &quot;-&quot; &amp; MONTH([.B331]) &amp; &quot;-&quot; &amp; DAY([.B331]) &amp; &quot;', '&quot; &amp; [.C331] &amp; &quot;', '&quot; &amp; [.D331] &amp; &quot;', '&quot; &amp; [.E331] &amp; &quot;', '&quot; &amp; [.F331] &amp; &quot;'],&quot;" office:value-type="string" office:string-value="['Not Digimon World 1  -', '2016-10-3', '0:15', 'Dingdong, Julian', '9DdkDRAyAvk', '']," calcext:value-type="string">
            <text:p>['Not Digimon World 1 <text:s/>-', '2016-10-3', '0:15', 'Dingdong, Julian', '9DdkDRAyAvk', ''],</text:p>
          </table:table-cell>
        </table:table-row>
        <table:table-row table:style-name="ro1">
          <table:table-cell office:value-type="string" calcext:value-type="string">
            <text:p>Oblivion (2018) - Ep1</text:p>
          </table:table-cell>
          <table:table-cell office:value-type="date" office:date-value="2018-06-23" calcext:value-type="date">
            <text:p>2018-06-23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5dTUPGyLUU8</text:p>
          </table:table-cell>
          <table:table-cell/>
          <table:table-cell table:formula="of:=&quot;['&quot; &amp; [.A332] &amp; &quot;', '&quot; &amp; YEAR([.B332]) &amp; &quot;-&quot; &amp; MONTH([.B332]) &amp; &quot;-&quot; &amp; DAY([.B332]) &amp; &quot;', '&quot; &amp; [.C332] &amp; &quot;', '&quot; &amp; [.D332] &amp; &quot;', '&quot; &amp; [.E332] &amp; &quot;', '&quot; &amp; [.F332] &amp; &quot;'],&quot;" office:value-type="string" office:string-value="['Oblivion (2018) - Ep1', '2018-6-23', '0:10', 'Solo', '5dTUPGyLUU8', '']," calcext:value-type="string">
            <text:p>['Oblivion (2018) - Ep1', '2018-6-23', '0:10', 'Solo', '5dTUPGyLUU8', ''],</text:p>
          </table:table-cell>
        </table:table-row>
        <table:table-row table:style-name="ro1">
          <table:table-cell office:value-type="string" calcext:value-type="string">
            <text:p>Oblivion (2018) - Ep2</text:p>
          </table:table-cell>
          <table:table-cell office:value-type="date" office:date-value="2018-06-27" calcext:value-type="date">
            <text:p>2018-06-27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-xPgrp_XjQ</text:p>
          </table:table-cell>
          <table:table-cell/>
          <table:table-cell table:formula="of:=&quot;['&quot; &amp; [.A333] &amp; &quot;', '&quot; &amp; YEAR([.B333]) &amp; &quot;-&quot; &amp; MONTH([.B333]) &amp; &quot;-&quot; &amp; DAY([.B333]) &amp; &quot;', '&quot; &amp; [.C333] &amp; &quot;', '&quot; &amp; [.D333] &amp; &quot;', '&quot; &amp; [.E333] &amp; &quot;', '&quot; &amp; [.F333] &amp; &quot;'],&quot;" office:value-type="string" office:string-value="['Oblivion (2018) - Ep2', '2018-6-27', '0:11', 'Solo', 's-xPgrp_XjQ', '']," calcext:value-type="string">
            <text:p>['Oblivion (2018) - Ep2', '2018-6-27', '0:11', 'Solo', 's-xPgrp_XjQ', ''],</text:p>
          </table:table-cell>
        </table:table-row>
        <table:table-row table:style-name="ro1">
          <table:table-cell office:value-type="string" calcext:value-type="string">
            <text:p>Oblivion (Stream) - Ep 1</text:p>
          </table:table-cell>
          <table:table-cell office:value-type="date" office:date-value="2023-05-22" calcext:value-type="date">
            <text:p>2023-05-22</text:p>
          </table:table-cell>
          <table:table-cell office:value-type="string" calcext:value-type="string">
            <text:p>1:4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ISvfx375Ew</text:p>
          </table:table-cell>
          <table:table-cell/>
          <table:table-cell table:formula="of:=&quot;['&quot; &amp; [.A334] &amp; &quot;', '&quot; &amp; YEAR([.B334]) &amp; &quot;-&quot; &amp; MONTH([.B334]) &amp; &quot;-&quot; &amp; DAY([.B334]) &amp; &quot;', '&quot; &amp; [.C334] &amp; &quot;', '&quot; &amp; [.D334] &amp; &quot;', '&quot; &amp; [.E334] &amp; &quot;', '&quot; &amp; [.F334] &amp; &quot;'],&quot;" office:value-type="string" office:string-value="['Oblivion (Stream) - Ep 1', '2023-5-22', '1:44', 'Adam', 'SISvfx375Ew', '']," calcext:value-type="string">
            <text:p>['Oblivion (Stream) - Ep 1', '2023-5-22', '1:44', 'Adam', 'SISvfx375Ew', ''],</text:p>
          </table:table-cell>
        </table:table-row>
        <table:table-row table:style-name="ro1">
          <table:table-cell office:value-type="string" calcext:value-type="string">
            <text:p>Oblivion (Stream) - Ep 2</text:p>
          </table:table-cell>
          <table:table-cell office:value-type="date" office:date-value="2024-05-06" calcext:value-type="date">
            <text:p>2024-05-06</text:p>
          </table:table-cell>
          <table:table-cell office:value-type="string" calcext:value-type="string">
            <text:p>2:01</text:p>
          </table:table-cell>
          <table:table-cell office:value-type="string" calcext:value-type="string">
            <text:p>Adam, Niall, Tomar</text:p>
          </table:table-cell>
          <table:table-cell office:value-type="string" calcext:value-type="string">
            <text:p>Lhg0x5-0XjE</text:p>
          </table:table-cell>
          <table:table-cell/>
          <table:table-cell table:formula="of:=&quot;['&quot; &amp; [.A335] &amp; &quot;', '&quot; &amp; YEAR([.B335]) &amp; &quot;-&quot; &amp; MONTH([.B335]) &amp; &quot;-&quot; &amp; DAY([.B335]) &amp; &quot;', '&quot; &amp; [.C335] &amp; &quot;', '&quot; &amp; [.D335] &amp; &quot;', '&quot; &amp; [.E335] &amp; &quot;', '&quot; &amp; [.F335] &amp; &quot;'],&quot;" office:value-type="string" office:string-value="['Oblivion (Stream) - Ep 2', '2024-5-6', '2:01', 'Adam, Niall, Tomar', 'Lhg0x5-0XjE', '']," calcext:value-type="string">
            <text:p>['Oblivion (Stream) - Ep 2', '2024-5-6', '2:01', 'Adam, Niall, Tomar', 'Lhg0x5-0XjE', ''],</text:p>
          </table:table-cell>
        </table:table-row>
        <table:table-row table:style-name="ro1">
          <table:table-cell office:value-type="string" calcext:value-type="string">
            <text:p>Oblivion (Stream) - Ep 3</text:p>
          </table:table-cell>
          <table:table-cell office:value-type="date" office:date-value="2024-05-18" calcext:value-type="date">
            <text:p>2024-05-18</text:p>
          </table:table-cell>
          <table:table-cell office:value-type="string" calcext:value-type="string">
            <text:p>2:10</text:p>
          </table:table-cell>
          <table:table-cell office:value-type="string" calcext:value-type="string">
            <text:p>Adam, Niall, Tomar</text:p>
          </table:table-cell>
          <table:table-cell office:value-type="string" calcext:value-type="string">
            <text:p>GTSnv-vnNkY</text:p>
          </table:table-cell>
          <table:table-cell/>
          <table:table-cell table:formula="of:=&quot;['&quot; &amp; [.A336] &amp; &quot;', '&quot; &amp; YEAR([.B336]) &amp; &quot;-&quot; &amp; MONTH([.B336]) &amp; &quot;-&quot; &amp; DAY([.B336]) &amp; &quot;', '&quot; &amp; [.C336] &amp; &quot;', '&quot; &amp; [.D336] &amp; &quot;', '&quot; &amp; [.E336] &amp; &quot;', '&quot; &amp; [.F336] &amp; &quot;'],&quot;" office:value-type="string" office:string-value="['Oblivion (Stream) - Ep 3', '2024-5-18', '2:10', 'Adam, Niall, Tomar', 'GTSnv-vnNkY', '']," calcext:value-type="string">
            <text:p>['Oblivion (Stream) - Ep 3', '2024-5-18', '2:10', 'Adam, Niall, Tomar', 'GTSnv-vnNkY', ''],</text:p>
          </table:table-cell>
        </table:table-row>
        <table:table-row table:style-name="ro1">
          <table:table-cell office:value-type="string" calcext:value-type="string">
            <text:p>Oblivion Remastered</text:p>
          </table:table-cell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4:18</text:p>
          </table:table-cell>
          <table:table-cell office:value-type="string" calcext:value-type="string">
            <text:p>Lyle, Niall</text:p>
          </table:table-cell>
          <table:table-cell office:value-type="string" calcext:value-type="string">
            <text:p>N3W1g_FL3AE</text:p>
          </table:table-cell>
          <table:table-cell/>
          <table:table-cell table:formula="of:=&quot;['&quot; &amp; [.A337] &amp; &quot;', '&quot; &amp; YEAR([.B337]) &amp; &quot;-&quot; &amp; MONTH([.B337]) &amp; &quot;-&quot; &amp; DAY([.B337]) &amp; &quot;', '&quot; &amp; [.C337] &amp; &quot;', '&quot; &amp; [.D337] &amp; &quot;', '&quot; &amp; [.E337] &amp; &quot;', '&quot; &amp; [.F337] &amp; &quot;'],&quot;" office:value-type="string" office:string-value="['Oblivion Remastered', '2025-4-24', '4:18', 'Lyle, Niall', 'N3W1g_FL3AE', '']," calcext:value-type="string">
            <text:p>['Oblivion Remastered', '2025-4-24', '4:18', 'Lyle, Niall', 'N3W1g_FL3AE', ''],</text:p>
          </table:table-cell>
        </table:table-row>
        <table:table-row table:style-name="ro1">
          <table:table-cell office:value-type="string" calcext:value-type="string">
            <text:p>Oney Doesn't Play...</text:p>
          </table:table-cell>
          <table:table-cell office:value-type="date" office:date-value="2021-11-08" calcext:value-type="date">
            <text:p>2021-11-08</text:p>
          </table:table-cell>
          <table:table-cell office:value-type="string" calcext:value-type="string">
            <text:p>0:12</text:p>
          </table:table-cell>
          <table:table-cell office:value-type="string" calcext:value-type="string">
            <text:p>Adam, Zach, Lyle</text:p>
          </table:table-cell>
          <table:table-cell office:value-type="string" calcext:value-type="string">
            <text:p>kE3ofuCYcTw</text:p>
          </table:table-cell>
          <table:table-cell/>
          <table:table-cell table:formula="of:=&quot;['&quot; &amp; [.A338] &amp; &quot;', '&quot; &amp; YEAR([.B338]) &amp; &quot;-&quot; &amp; MONTH([.B338]) &amp; &quot;-&quot; &amp; DAY([.B338]) &amp; &quot;', '&quot; &amp; [.C338] &amp; &quot;', '&quot; &amp; [.D338] &amp; &quot;', '&quot; &amp; [.E338] &amp; &quot;', '&quot; &amp; [.F338] &amp; &quot;'],&quot;" office:value-type="string" office:string-value="['Oney Doesn't Play...', '2021-11-8', '0:12', 'Adam, Zach, Lyle', 'kE3ofuCYcTw', '']," calcext:value-type="string">
            <text:p>['Oney Doesn't Play...', '2021-11-8', '0:12', 'Adam, Zach, Lyle', 'kE3ofuCYcTw', ''],</text:p>
          </table:table-cell>
        </table:table-row>
        <table:table-row table:style-name="ro1">
          <table:table-cell office:value-type="string" calcext:value-type="string">
            <text:p>Ori And The Will Of The Wisps</text:p>
          </table:table-cell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1:0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maNN15qmFYU</text:p>
          </table:table-cell>
          <table:table-cell/>
          <table:table-cell table:formula="of:=&quot;['&quot; &amp; [.A339] &amp; &quot;', '&quot; &amp; YEAR([.B339]) &amp; &quot;-&quot; &amp; MONTH([.B339]) &amp; &quot;-&quot; &amp; DAY([.B339]) &amp; &quot;', '&quot; &amp; [.C339] &amp; &quot;', '&quot; &amp; [.D339] &amp; &quot;', '&quot; &amp; [.E339] &amp; &quot;', '&quot; &amp; [.F339] &amp; &quot;'],&quot;" office:value-type="string" office:string-value="['Ori And The Will Of The Wisps', '2020-3-22', '1:03', 'Lyle, Tomar', 'maNN15qmFYU', '']," calcext:value-type="string">
            <text:p>['Ori And The Will Of The Wisps', '2020-3-22', '1:03', 'Lyle, Tomar', 'maNN15qmFYU', ''],</text:p>
          </table:table-cell>
        </table:table-row>
        <table:table-row table:style-name="ro1">
          <table:table-cell office:value-type="string" calcext:value-type="string">
            <text:p>Outlast</text:p>
          </table:table-cell>
          <table:table-cell office:value-type="date" office:date-value="2021-10-19" calcext:value-type="date">
            <text:p>2021-10-19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Nhd6mNq8JQg</text:p>
          </table:table-cell>
          <table:table-cell/>
          <table:table-cell table:formula="of:=&quot;['&quot; &amp; [.A340] &amp; &quot;', '&quot; &amp; YEAR([.B340]) &amp; &quot;-&quot; &amp; MONTH([.B340]) &amp; &quot;-&quot; &amp; DAY([.B340]) &amp; &quot;', '&quot; &amp; [.C340] &amp; &quot;', '&quot; &amp; [.D340] &amp; &quot;', '&quot; &amp; [.E340] &amp; &quot;', '&quot; &amp; [.F340] &amp; &quot;'],&quot;" office:value-type="string" office:string-value="['Outlast', '2021-10-19', '0:43', 'Zach, Lyle', 'Nhd6mNq8JQg', '']," calcext:value-type="string">
            <text:p>['Outlast', '2021-10-19', '0:43', 'Zach, Lyle', 'Nhd6mNq8JQg', ''],</text:p>
          </table:table-cell>
        </table:table-row>
        <table:table-row table:style-name="ro1">
          <table:table-cell office:value-type="string" calcext:value-type="string">
            <text:p>Ouya</text:p>
          </table:table-cell>
          <table:table-cell office:value-type="date" office:date-value="2017-04-01" calcext:value-type="date">
            <text:p>2017-04-01</text:p>
          </table:table-cell>
          <table:table-cell office:value-type="string" calcext:value-type="string">
            <text:p>1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t-6IPlps5TY</text:p>
          </table:table-cell>
          <table:table-cell/>
          <table:table-cell table:formula="of:=&quot;['&quot; &amp; [.A341] &amp; &quot;', '&quot; &amp; YEAR([.B341]) &amp; &quot;-&quot; &amp; MONTH([.B341]) &amp; &quot;-&quot; &amp; DAY([.B341]) &amp; &quot;', '&quot; &amp; [.C341] &amp; &quot;', '&quot; &amp; [.D341] &amp; &quot;', '&quot; &amp; [.E341] &amp; &quot;', '&quot; &amp; [.F341] &amp; &quot;'],&quot;" office:value-type="string" office:string-value="['Ouya', '2017-4-1', '1:10', 'Dingdong, Julian', 't-6IPlps5TY', '']," calcext:value-type="string">
            <text:p>['Ouya', '2017-4-1', '1:10', 'Dingdong, Julian', 't-6IPlps5TY', ''],</text:p>
          </table:table-cell>
        </table:table-row>
        <table:table-row table:style-name="ro1">
          <table:table-cell office:value-type="string" calcext:value-type="string">
            <text:p>Overgrowth</text:p>
          </table:table-cell>
          <table:table-cell office:value-type="date" office:date-value="2019-03-13" calcext:value-type="date">
            <text:p>2019-03-13</text:p>
          </table:table-cell>
          <table:table-cell office:value-type="string" calcext:value-type="string">
            <text:p>1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521-Y4RlTYc</text:p>
          </table:table-cell>
          <table:table-cell/>
          <table:table-cell table:formula="of:=&quot;['&quot; &amp; [.A342] &amp; &quot;', '&quot; &amp; YEAR([.B342]) &amp; &quot;-&quot; &amp; MONTH([.B342]) &amp; &quot;-&quot; &amp; DAY([.B342]) &amp; &quot;', '&quot; &amp; [.C342] &amp; &quot;', '&quot; &amp; [.D342] &amp; &quot;', '&quot; &amp; [.E342] &amp; &quot;', '&quot; &amp; [.F342] &amp; &quot;'],&quot;" office:value-type="string" office:string-value="['Overgrowth', '2019-3-13', '1:12', 'Dingdong, Julian', '521-Y4RlTYc', '']," calcext:value-type="string">
            <text:p>['Overgrowth', '2019-3-13', '1:12', 'Dingdong, Julian', '521-Y4RlTYc', ''],</text:p>
          </table:table-cell>
        </table:table-row>
        <table:table-row table:style-name="ro1">
          <table:table-cell office:value-type="string" calcext:value-type="string">
            <text:p>Owlboy</text:p>
          </table:table-cell>
          <table:table-cell office:value-type="date" office:date-value="2016-11-06" calcext:value-type="date">
            <text:p>2016-11-06</text:p>
          </table:table-cell>
          <table:table-cell office:value-type="string" calcext:value-type="string">
            <text:p>0:3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0__My--4sqo</text:p>
          </table:table-cell>
          <table:table-cell office:value-type="string" calcext:value-type="string">
            <text:p>3Q8gwAQ0DvM</text:p>
          </table:table-cell>
          <table:table-cell table:formula="of:=&quot;['&quot; &amp; [.A343] &amp; &quot;', '&quot; &amp; YEAR([.B343]) &amp; &quot;-&quot; &amp; MONTH([.B343]) &amp; &quot;-&quot; &amp; DAY([.B343]) &amp; &quot;', '&quot; &amp; [.C343] &amp; &quot;', '&quot; &amp; [.D343] &amp; &quot;', '&quot; &amp; [.E343] &amp; &quot;', '&quot; &amp; [.F343] &amp; &quot;'],&quot;" office:value-type="string" office:string-value="['Owlboy', '2016-11-6', '0:30', 'Dingdong, Julian', '0__My--4sqo', '3Q8gwAQ0DvM']," calcext:value-type="string">
            <text:p>['Owlboy', '2016-11-6', '0:30', 'Dingdong, Julian', '0__My--4sqo', '3Q8gwAQ0DvM'],</text:p>
          </table:table-cell>
        </table:table-row>
        <table:table-row table:style-name="ro1">
          <table:table-cell office:value-type="string" calcext:value-type="string">
            <text:p>Pac Man 2</text:p>
          </table:table-cell>
          <table:table-cell office:value-type="date" office:date-value="2021-09-20" calcext:value-type="date">
            <text:p>2021-09-20</text:p>
          </table:table-cell>
          <table:table-cell office:value-type="string" calcext:value-type="string">
            <text:p>0:47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lqaSJAzV5VA</text:p>
          </table:table-cell>
          <table:table-cell/>
          <table:table-cell table:formula="of:=&quot;['&quot; &amp; [.A344] &amp; &quot;', '&quot; &amp; YEAR([.B344]) &amp; &quot;-&quot; &amp; MONTH([.B344]) &amp; &quot;-&quot; &amp; DAY([.B344]) &amp; &quot;', '&quot; &amp; [.C344] &amp; &quot;', '&quot; &amp; [.D344] &amp; &quot;', '&quot; &amp; [.E344] &amp; &quot;', '&quot; &amp; [.F344] &amp; &quot;'],&quot;" office:value-type="string" office:string-value="['Pac Man 2', '2021-9-20', '0:47', 'Adam, Tomar', 'lqaSJAzV5VA', '']," calcext:value-type="string">
            <text:p>['Pac Man 2', '2021-9-20', '0:47', 'Adam, Tomar', 'lqaSJAzV5VA', ''],</text:p>
          </table:table-cell>
        </table:table-row>
        <table:table-row table:style-name="ro1">
          <table:table-cell office:value-type="string" calcext:value-type="string">
            <text:p>Paddy Wants To Fish - Ep 1</text:p>
          </table:table-cell>
          <table:table-cell office:value-type="date" office:date-value="2024-04-03" calcext:value-type="date">
            <text:p>2024-04-03</text:p>
          </table:table-cell>
          <table:table-cell office:value-type="string" calcext:value-type="string">
            <text:p>0:27</text:p>
          </table:table-cell>
          <table:table-cell office:value-type="string" calcext:value-type="string">
            <text:p>Paddy, Cory, Lyle</text:p>
          </table:table-cell>
          <table:table-cell office:value-type="string" calcext:value-type="string">
            <text:p>vladAGEeV70</text:p>
          </table:table-cell>
          <table:table-cell/>
          <table:table-cell table:formula="of:=&quot;['&quot; &amp; [.A345] &amp; &quot;', '&quot; &amp; YEAR([.B345]) &amp; &quot;-&quot; &amp; MONTH([.B345]) &amp; &quot;-&quot; &amp; DAY([.B345]) &amp; &quot;', '&quot; &amp; [.C345] &amp; &quot;', '&quot; &amp; [.D345] &amp; &quot;', '&quot; &amp; [.E345] &amp; &quot;', '&quot; &amp; [.F345] &amp; &quot;'],&quot;" office:value-type="string" office:string-value="['Paddy Wants To Fish - Ep 1', '2024-4-3', '0:27', 'Paddy, Cory, Lyle', 'vladAGEeV70', '']," calcext:value-type="string">
            <text:p>['Paddy Wants To Fish - Ep 1', '2024-4-3', '0:27', 'Paddy, Cory, Lyle', 'vladAGEeV70', ''],</text:p>
          </table:table-cell>
        </table:table-row>
        <table:table-row table:style-name="ro1">
          <table:table-cell office:value-type="string" calcext:value-type="string">
            <text:p>Paddy Wants To Fish - Ep 2</text:p>
          </table:table-cell>
          <table:table-cell office:value-type="date" office:date-value="2024-04-05" calcext:value-type="date">
            <text:p>2024-04-05</text:p>
          </table:table-cell>
          <table:table-cell office:value-type="string" calcext:value-type="string">
            <text:p>0:31</text:p>
          </table:table-cell>
          <table:table-cell office:value-type="string" calcext:value-type="string">
            <text:p>Paddy, Cory, Lyle</text:p>
          </table:table-cell>
          <table:table-cell office:value-type="string" calcext:value-type="string">
            <text:p>I-Y7rpmnjLA</text:p>
          </table:table-cell>
          <table:table-cell/>
          <table:table-cell table:formula="of:=&quot;['&quot; &amp; [.A346] &amp; &quot;', '&quot; &amp; YEAR([.B346]) &amp; &quot;-&quot; &amp; MONTH([.B346]) &amp; &quot;-&quot; &amp; DAY([.B346]) &amp; &quot;', '&quot; &amp; [.C346] &amp; &quot;', '&quot; &amp; [.D346] &amp; &quot;', '&quot; &amp; [.E346] &amp; &quot;', '&quot; &amp; [.F346] &amp; &quot;'],&quot;" office:value-type="string" office:string-value="['Paddy Wants To Fish - Ep 2', '2024-4-5', '0:31', 'Paddy, Cory, Lyle', 'I-Y7rpmnjLA', '']," calcext:value-type="string">
            <text:p>['Paddy Wants To Fish - Ep 2', '2024-4-5', '0:31', 'Paddy, Cory, Lyle', 'I-Y7rpmnjLA', ''],</text:p>
          </table:table-cell>
        </table:table-row>
        <table:table-row table:style-name="ro1">
          <table:table-cell office:value-type="string" calcext:value-type="string">
            <text:p>Paddy Wants To Fly</text:p>
          </table:table-cell>
          <table:table-cell office:value-type="date" office:date-value="2024-04-17" calcext:value-type="date">
            <text:p>2024-04-17</text:p>
          </table:table-cell>
          <table:table-cell office:value-type="string" calcext:value-type="string">
            <text:p>0:32</text:p>
          </table:table-cell>
          <table:table-cell office:value-type="string" calcext:value-type="string">
            <text:p>Paddy, Cory, Tomar</text:p>
          </table:table-cell>
          <table:table-cell office:value-type="string" calcext:value-type="string">
            <text:p>-bojBnuhXIM</text:p>
          </table:table-cell>
          <table:table-cell/>
          <table:table-cell table:formula="of:=&quot;['&quot; &amp; [.A347] &amp; &quot;', '&quot; &amp; YEAR([.B347]) &amp; &quot;-&quot; &amp; MONTH([.B347]) &amp; &quot;-&quot; &amp; DAY([.B347]) &amp; &quot;', '&quot; &amp; [.C347] &amp; &quot;', '&quot; &amp; [.D347] &amp; &quot;', '&quot; &amp; [.E347] &amp; &quot;', '&quot; &amp; [.F347] &amp; &quot;'],&quot;" office:value-type="string" office:string-value="['Paddy Wants To Fly', '2024-4-17', '0:32', 'Paddy, Cory, Tomar', '-bojBnuhXIM', '']," calcext:value-type="string">
            <text:p>['Paddy Wants To Fly', '2024-4-17', '0:32', 'Paddy, Cory, Tomar', '-bojBnuhXIM', ''],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 office:value-type="date" office:date-value="2024-02-13" calcext:value-type="date">
            <text:p>2024-02-13</text:p>
          </table:table-cell>
          <table:table-cell office:value-type="string" calcext:value-type="string">
            <text:p>1:28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sUBczBZQvzU</text:p>
          </table:table-cell>
          <table:table-cell/>
          <table:table-cell table:formula="of:=&quot;['&quot; &amp; [.A348] &amp; &quot;', '&quot; &amp; YEAR([.B348]) &amp; &quot;-&quot; &amp; MONTH([.B348]) &amp; &quot;-&quot; &amp; DAY([.B348]) &amp; &quot;', '&quot; &amp; [.C348] &amp; &quot;', '&quot; &amp; [.D348] &amp; &quot;', '&quot; &amp; [.E348] &amp; &quot;', '&quot; &amp; [.F348] &amp; &quot;'],&quot;" office:value-type="string" office:string-value="['Palworld', '2024-2-13', '1:28', 'Zach, Lyle, Tomar', 'sUBczBZQvzU', '']," calcext:value-type="string">
            <text:p>['Palworld', '2024-2-13', '1:28', 'Zach, Lyle, Tomar', 'sUBczBZQvzU', ''],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office:value-type="date" office:date-value="2021-04-27" calcext:value-type="date">
            <text:p>2021-04-27</text:p>
          </table:table-cell>
          <table:table-cell office:value-type="string" calcext:value-type="string">
            <text:p>0:18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OT_aVNqkgeY</text:p>
          </table:table-cell>
          <table:table-cell/>
          <table:table-cell table:formula="of:=&quot;['&quot; &amp; [.A349] &amp; &quot;', '&quot; &amp; YEAR([.B349]) &amp; &quot;-&quot; &amp; MONTH([.B349]) &amp; &quot;-&quot; &amp; DAY([.B349]) &amp; &quot;', '&quot; &amp; [.C349] &amp; &quot;', '&quot; &amp; [.D349] &amp; &quot;', '&quot; &amp; [.E349] &amp; &quot;', '&quot; &amp; [.F349] &amp; &quot;'],&quot;" office:value-type="string" office:string-value="['Panic', '2021-4-27', '0:18', 'Dingdong, Julian', 'OT_aVNqkgeY', '']," calcext:value-type="string">
            <text:p>['Panic', '2021-4-27', '0:18', 'Dingdong, Julian', 'OT_aVNqkgeY', ''],</text:p>
          </table:table-cell>
        </table:table-row>
        <table:table-row table:style-name="ro1">
          <table:table-cell office:value-type="string" calcext:value-type="string">
            <text:p>Paper Mario World Gold</text:p>
          </table:table-cell>
          <table:table-cell office:value-type="date" office:date-value="2016-11-10" calcext:value-type="date">
            <text:p>2016-11-10</text:p>
          </table:table-cell>
          <table:table-cell office:value-type="string" calcext:value-type="string">
            <text:p>0:2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mTyKBlJFZ3s</text:p>
          </table:table-cell>
          <table:table-cell/>
          <table:table-cell table:formula="of:=&quot;['&quot; &amp; [.A350] &amp; &quot;', '&quot; &amp; YEAR([.B350]) &amp; &quot;-&quot; &amp; MONTH([.B350]) &amp; &quot;-&quot; &amp; DAY([.B350]) &amp; &quot;', '&quot; &amp; [.C350] &amp; &quot;', '&quot; &amp; [.D350] &amp; &quot;', '&quot; &amp; [.E350] &amp; &quot;', '&quot; &amp; [.F350] &amp; &quot;'],&quot;" office:value-type="string" office:string-value="['Paper Mario World Gold', '2016-11-10', '0:20', 'Dingdong, Julian', 'mTyKBlJFZ3s', '']," calcext:value-type="string">
            <text:p>['Paper Mario World Gold', '2016-11-10', '0:20', 'Dingdong, Julian', 'mTyKBlJFZ3s', ''],</text:p>
          </table:table-cell>
        </table:table-row>
        <table:table-row table:style-name="ro1">
          <table:table-cell office:value-type="string" calcext:value-type="string">
            <text:p>Parasocial - Ep 1</text:p>
          </table:table-cell>
          <table:table-cell office:value-type="date" office:date-value="2025-10-28" calcext:value-type="date">
            <text:p>2025-10-28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yWRhLQnqm38</text:p>
          </table:table-cell>
          <table:table-cell/>
          <table:table-cell table:formula="of:=&quot;['&quot; &amp; [.A351] &amp; &quot;', '&quot; &amp; YEAR([.B351]) &amp; &quot;-&quot; &amp; MONTH([.B351]) &amp; &quot;-&quot; &amp; DAY([.B351]) &amp; &quot;', '&quot; &amp; [.C351] &amp; &quot;', '&quot; &amp; [.D351] &amp; &quot;', '&quot; &amp; [.E351] &amp; &quot;', '&quot; &amp; [.F351] &amp; &quot;'],&quot;" office:value-type="string" office:string-value="['Parasocial - Ep 1', '2025-10-28', '0:43', 'Lyle, Tomar', 'yWRhLQnqm38', '']," calcext:value-type="string">
            <text:p>['Parasocial - Ep 1', '2025-10-28', '0:43', 'Lyle, Tomar', 'yWRhLQnqm38', ''],</text:p>
          </table:table-cell>
        </table:table-row>
        <table:table-row table:style-name="ro1">
          <table:table-cell office:value-type="string" calcext:value-type="string">
            <text:p>Parasocial - Ep 2</text:p>
          </table:table-cell>
          <table:table-cell office:value-type="date" office:date-value="2025-10-29" calcext:value-type="date">
            <text:p>2025-10-29</text:p>
          </table:table-cell>
          <table:table-cell office:value-type="string" calcext:value-type="string">
            <text:p>0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FTPK3bT1GCI</text:p>
          </table:table-cell>
          <table:table-cell/>
          <table:table-cell table:formula="of:=&quot;['&quot; &amp; [.A352] &amp; &quot;', '&quot; &amp; YEAR([.B352]) &amp; &quot;-&quot; &amp; MONTH([.B352]) &amp; &quot;-&quot; &amp; DAY([.B352]) &amp; &quot;', '&quot; &amp; [.C352] &amp; &quot;', '&quot; &amp; [.D352] &amp; &quot;', '&quot; &amp; [.E352] &amp; &quot;', '&quot; &amp; [.F352] &amp; &quot;'],&quot;" office:value-type="string" office:string-value="['Parasocial - Ep 2', '2025-10-29', '0:26', 'Lyle, Tomar', 'FTPK3bT1GCI', '']," calcext:value-type="string">
            <text:p>['Parasocial - Ep 2', '2025-10-29', '0:26', 'Lyle, Tomar', 'FTPK3bT1GCI', ''],</text:p>
          </table:table-cell>
        </table:table-row>
        <table:table-row table:style-name="ro1">
          <table:table-cell office:value-type="string" calcext:value-type="string">
            <text:p>Penguins Arena</text:p>
          </table:table-cell>
          <table:table-cell office:value-type="date" office:date-value="2016-09-13" calcext:value-type="date">
            <text:p>2016-09-13</text:p>
          </table:table-cell>
          <table:table-cell office:value-type="string" calcext:value-type="string">
            <text:p>0:12</text:p>
          </table:table-cell>
          <table:table-cell office:value-type="string" calcext:value-type="string">
            <text:p>Dingdong, Cory</text:p>
          </table:table-cell>
          <table:table-cell office:value-type="string" calcext:value-type="string">
            <text:p>bkBhr7_vbqo</text:p>
          </table:table-cell>
          <table:table-cell/>
          <table:table-cell table:formula="of:=&quot;['&quot; &amp; [.A353] &amp; &quot;', '&quot; &amp; YEAR([.B353]) &amp; &quot;-&quot; &amp; MONTH([.B353]) &amp; &quot;-&quot; &amp; DAY([.B353]) &amp; &quot;', '&quot; &amp; [.C353] &amp; &quot;', '&quot; &amp; [.D353] &amp; &quot;', '&quot; &amp; [.E353] &amp; &quot;', '&quot; &amp; [.F353] &amp; &quot;'],&quot;" office:value-type="string" office:string-value="['Penguins Arena', '2016-9-13', '0:12', 'Dingdong, Cory', 'bkBhr7_vbqo', '']," calcext:value-type="string">
            <text:p>['Penguins Arena', '2016-9-13', '0:12', 'Dingdong, Cory', 'bkBhr7_vbqo', ''],</text:p>
          </table:table-cell>
        </table:table-row>
        <table:table-row table:style-name="ro1">
          <table:table-cell office:value-type="string" calcext:value-type="string">
            <text:p>Penpen Triicelon</text:p>
          </table:table-cell>
          <table:table-cell office:value-type="date" office:date-value="2016-12-19" calcext:value-type="date">
            <text:p>2016-12-19</text:p>
          </table:table-cell>
          <table:table-cell office:value-type="string" calcext:value-type="string">
            <text:p>0:2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_NOm2bRFJtM</text:p>
          </table:table-cell>
          <table:table-cell/>
          <table:table-cell table:formula="of:=&quot;['&quot; &amp; [.A354] &amp; &quot;', '&quot; &amp; YEAR([.B354]) &amp; &quot;-&quot; &amp; MONTH([.B354]) &amp; &quot;-&quot; &amp; DAY([.B354]) &amp; &quot;', '&quot; &amp; [.C354] &amp; &quot;', '&quot; &amp; [.D354] &amp; &quot;', '&quot; &amp; [.E354] &amp; &quot;', '&quot; &amp; [.F354] &amp; &quot;'],&quot;" office:value-type="string" office:string-value="['Penpen Triicelon', '2016-12-19', '0:20', 'Dingdong, Julian', '_NOm2bRFJtM', '']," calcext:value-type="string">
            <text:p>['Penpen Triicelon', '2016-12-19', '0:20', 'Dingdong, Julian', '_NOm2bRFJtM', ''],</text:p>
          </table:table-cell>
        </table:table-row>
        <table:table-row table:style-name="ro1">
          <table:table-cell office:value-type="string" calcext:value-type="string">
            <text:p>People Playground</text:p>
          </table:table-cell>
          <table:table-cell office:value-type="date" office:date-value="2021-03-28" calcext:value-type="date">
            <text:p>2021-03-28</text:p>
          </table:table-cell>
          <table:table-cell office:value-type="string" calcext:value-type="string">
            <text:p>0:27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jrF6oun4vl4</text:p>
          </table:table-cell>
          <table:table-cell/>
          <table:table-cell table:formula="of:=&quot;['&quot; &amp; [.A355] &amp; &quot;', '&quot; &amp; YEAR([.B355]) &amp; &quot;-&quot; &amp; MONTH([.B355]) &amp; &quot;-&quot; &amp; DAY([.B355]) &amp; &quot;', '&quot; &amp; [.C355] &amp; &quot;', '&quot; &amp; [.D355] &amp; &quot;', '&quot; &amp; [.E355] &amp; &quot;', '&quot; &amp; [.F355] &amp; &quot;'],&quot;" office:value-type="string" office:string-value="['People Playground', '2021-3-28', '0:27', 'Zach, Tomar', 'jrF6oun4vl4', '']," calcext:value-type="string">
            <text:p>['People Playground', '2021-3-28', '0:27', 'Zach, Tomar', 'jrF6oun4vl4', ''],</text:p>
          </table:table-cell>
        </table:table-row>
        <table:table-row table:style-name="ro1">
          <table:table-cell office:value-type="string" calcext:value-type="string">
            <text:p>Peter Griffin Is A Real Human</text:p>
          </table:table-cell>
          <table:table-cell office:value-type="date" office:date-value="2021-12-23" calcext:value-type="date">
            <text:p>2021-12-23</text:p>
          </table:table-cell>
          <table:table-cell office:value-type="string" calcext:value-type="string">
            <text:p>0:12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BY4adFd5mfY</text:p>
          </table:table-cell>
          <table:table-cell/>
          <table:table-cell table:formula="of:=&quot;['&quot; &amp; [.A356] &amp; &quot;', '&quot; &amp; YEAR([.B356]) &amp; &quot;-&quot; &amp; MONTH([.B356]) &amp; &quot;-&quot; &amp; DAY([.B356]) &amp; &quot;', '&quot; &amp; [.C356] &amp; &quot;', '&quot; &amp; [.D356] &amp; &quot;', '&quot; &amp; [.E356] &amp; &quot;', '&quot; &amp; [.F356] &amp; &quot;'],&quot;" office:value-type="string" office:string-value="['Peter Griffin Is A Real Human', '2021-12-23', '0:12', 'Zach, Lyle', 'BY4adFd5mfY', '']," calcext:value-type="string">
            <text:p>['Peter Griffin Is A Real Human', '2021-12-23', '0:12', 'Zach, Lyle', 'BY4adFd5mfY', ''],</text:p>
          </table:table-cell>
        </table:table-row>
        <table:table-row table:style-name="ro1">
          <table:table-cell office:value-type="string" calcext:value-type="string">
            <text:p>Phucker In The Ashes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1:05</text:p>
          </table:table-cell>
          <table:table-cell office:value-type="string" calcext:value-type="string">
            <text:p>Cory, Lyle, Tomar</text:p>
          </table:table-cell>
          <table:table-cell office:value-type="string" calcext:value-type="string">
            <text:p>IRhJslOJACw</text:p>
          </table:table-cell>
          <table:table-cell/>
          <table:table-cell table:formula="of:=&quot;['&quot; &amp; [.A357] &amp; &quot;', '&quot; &amp; YEAR([.B357]) &amp; &quot;-&quot; &amp; MONTH([.B357]) &amp; &quot;-&quot; &amp; DAY([.B357]) &amp; &quot;', '&quot; &amp; [.C357] &amp; &quot;', '&quot; &amp; [.D357] &amp; &quot;', '&quot; &amp; [.E357] &amp; &quot;', '&quot; &amp; [.F357] &amp; &quot;'],&quot;" office:value-type="string" office:string-value="['Phucker In The Ashes', '2024-7-11', '1:05', 'Cory, Lyle, Tomar', 'IRhJslOJACw', '']," calcext:value-type="string">
            <text:p>['Phucker In The Ashes', '2024-7-11', '1:05', 'Cory, Lyle, Tomar', 'IRhJslOJACw', ''],</text:p>
          </table:table-cell>
        </table:table-row>
        <table:table-row table:style-name="ro1">
          <table:table-cell office:value-type="string" calcext:value-type="string">
            <text:p>Phucker In The Gulag</text:p>
          </table:table-cell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1:53</text:p>
          </table:table-cell>
          <table:table-cell office:value-type="string" calcext:value-type="string">
            <text:p>Cory, Lyle, Tomar</text:p>
          </table:table-cell>
          <table:table-cell office:value-type="string" calcext:value-type="string">
            <text:p>UUsNQvSyV4Y</text:p>
          </table:table-cell>
          <table:table-cell/>
          <table:table-cell table:formula="of:=&quot;['&quot; &amp; [.A358] &amp; &quot;', '&quot; &amp; YEAR([.B358]) &amp; &quot;-&quot; &amp; MONTH([.B358]) &amp; &quot;-&quot; &amp; DAY([.B358]) &amp; &quot;', '&quot; &amp; [.C358] &amp; &quot;', '&quot; &amp; [.D358] &amp; &quot;', '&quot; &amp; [.E358] &amp; &quot;', '&quot; &amp; [.F358] &amp; &quot;'],&quot;" office:value-type="string" office:string-value="['Phucker In The Gulag', '2024-11-22', '1:53', 'Cory, Lyle, Tomar', 'UUsNQvSyV4Y', '']," calcext:value-type="string">
            <text:p>['Phucker In The Gulag', '2024-11-22', '1:53', 'Cory, Lyle, Tomar', 'UUsNQvSyV4Y', ''],</text:p>
          </table:table-cell>
        </table:table-row>
        <table:table-row table:style-name="ro1">
          <table:table-cell office:value-type="string" calcext:value-type="string">
            <text:p>Pikachu's Quest</text:p>
          </table:table-cell>
          <table:table-cell office:value-type="date" office:date-value="2021-08-25" calcext:value-type="date">
            <text:p>2021-08-25</text:p>
          </table:table-cell>
          <table:table-cell office:value-type="string" calcext:value-type="string">
            <text:p>0:3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i1eNrz6agg</text:p>
          </table:table-cell>
          <table:table-cell/>
          <table:table-cell table:formula="of:=&quot;['&quot; &amp; [.A359] &amp; &quot;', '&quot; &amp; YEAR([.B359]) &amp; &quot;-&quot; &amp; MONTH([.B359]) &amp; &quot;-&quot; &amp; DAY([.B359]) &amp; &quot;', '&quot; &amp; [.C359] &amp; &quot;', '&quot; &amp; [.D359] &amp; &quot;', '&quot; &amp; [.E359] &amp; &quot;', '&quot; &amp; [.F359] &amp; &quot;'],&quot;" office:value-type="string" office:string-value="['Pikachu's Quest', '2021-8-25', '0:30', 'Dingdong, Julian', 'vi1eNrz6agg', '']," calcext:value-type="string">
            <text:p>['Pikachu's Quest', '2021-8-25', '0:30', 'Dingdong, Julian', 'vi1eNrz6agg', ''],</text:p>
          </table:table-cell>
        </table:table-row>
        <table:table-row table:style-name="ro1">
          <table:table-cell office:value-type="string" calcext:value-type="string">
            <text:p>Pikmin</text:p>
          </table:table-cell>
          <table:table-cell office:value-type="date" office:date-value="2017-07-12" calcext:value-type="date">
            <text:p>2017-07-12</text:p>
          </table:table-cell>
          <table:table-cell office:value-type="string" calcext:value-type="string">
            <text:p>2:3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5qtL6fDJhg8</text:p>
          </table:table-cell>
          <table:table-cell/>
          <table:table-cell table:formula="of:=&quot;['&quot; &amp; [.A360] &amp; &quot;', '&quot; &amp; YEAR([.B360]) &amp; &quot;-&quot; &amp; MONTH([.B360]) &amp; &quot;-&quot; &amp; DAY([.B360]) &amp; &quot;', '&quot; &amp; [.C360] &amp; &quot;', '&quot; &amp; [.D360] &amp; &quot;', '&quot; &amp; [.E360] &amp; &quot;', '&quot; &amp; [.F360] &amp; &quot;'],&quot;" office:value-type="string" office:string-value="['Pikmin', '2017-7-12', '2:36', 'Dingdong, Julian', '5qtL6fDJhg8', '']," calcext:value-type="string">
            <text:p>['Pikmin', '2017-7-12', '2:36', 'Dingdong, Julian', '5qtL6fDJhg8', ''],</text:p>
          </table:table-cell>
        </table:table-row>
        <table:table-row table:style-name="ro1">
          <table:table-cell office:value-type="string" calcext:value-type="string">
            <text:p>Pilotwings</text:p>
          </table:table-cell>
          <table:table-cell office:value-type="date" office:date-value="2018-11-11" calcext:value-type="date">
            <text:p>2018-11-11</text:p>
          </table:table-cell>
          <table:table-cell office:value-type="string" calcext:value-type="string">
            <text:p>0:15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zPxIVCJTrMo</text:p>
          </table:table-cell>
          <table:table-cell/>
          <table:table-cell table:formula="of:=&quot;['&quot; &amp; [.A361] &amp; &quot;', '&quot; &amp; YEAR([.B361]) &amp; &quot;-&quot; &amp; MONTH([.B361]) &amp; &quot;-&quot; &amp; DAY([.B361]) &amp; &quot;', '&quot; &amp; [.C361] &amp; &quot;', '&quot; &amp; [.D361] &amp; &quot;', '&quot; &amp; [.E361] &amp; &quot;', '&quot; &amp; [.F361] &amp; &quot;'],&quot;" office:value-type="string" office:string-value="['Pilotwings', '2018-11-11', '0:15', 'Zach, Tomar', 'zPxIVCJTrMo', '']," calcext:value-type="string">
            <text:p>['Pilotwings', '2018-11-11', '0:15', 'Zach, Tomar', 'zPxIVCJTrMo', ''],</text:p>
          </table:table-cell>
        </table:table-row>
        <table:table-row table:style-name="ro1">
          <table:table-cell office:value-type="string" calcext:value-type="string">
            <text:p>Pilotwings 64</text:p>
          </table:table-cell>
          <table:table-cell office:value-type="date" office:date-value="2017-09-30" calcext:value-type="date">
            <text:p>2017-09-30</text:p>
          </table:table-cell>
          <table:table-cell office:value-type="string" calcext:value-type="string">
            <text:p>0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S4k9RJ1A9uM</text:p>
          </table:table-cell>
          <table:table-cell/>
          <table:table-cell table:formula="of:=&quot;['&quot; &amp; [.A362] &amp; &quot;', '&quot; &amp; YEAR([.B362]) &amp; &quot;-&quot; &amp; MONTH([.B362]) &amp; &quot;-&quot; &amp; DAY([.B362]) &amp; &quot;', '&quot; &amp; [.C362] &amp; &quot;', '&quot; &amp; [.D362] &amp; &quot;', '&quot; &amp; [.E362] &amp; &quot;', '&quot; &amp; [.F362] &amp; &quot;'],&quot;" office:value-type="string" office:string-value="['Pilotwings 64', '2017-9-30', '0:12', 'Dingdong, Julian', 'S4k9RJ1A9uM', '']," calcext:value-type="string">
            <text:p>['Pilotwings 64', '2017-9-30', '0:12', 'Dingdong, Julian', 'S4k9RJ1A9uM', ''],</text:p>
          </table:table-cell>
        </table:table-row>
        <table:table-row table:style-name="ro1">
          <table:table-cell office:value-type="string" calcext:value-type="string">
            <text:p>Pinocchio</text:p>
          </table:table-cell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ezFnquuwZok</text:p>
          </table:table-cell>
          <table:table-cell/>
          <table:table-cell table:formula="of:=&quot;['&quot; &amp; [.A363] &amp; &quot;', '&quot; &amp; YEAR([.B363]) &amp; &quot;-&quot; &amp; MONTH([.B363]) &amp; &quot;-&quot; &amp; DAY([.B363]) &amp; &quot;', '&quot; &amp; [.C363] &amp; &quot;', '&quot; &amp; [.D363] &amp; &quot;', '&quot; &amp; [.E363] &amp; &quot;', '&quot; &amp; [.F363] &amp; &quot;'],&quot;" office:value-type="string" office:string-value="['Pinocchio', '2022-11-2', '0:43', 'Cory, Tomar', 'ezFnquuwZok', '']," calcext:value-type="string">
            <text:p>['Pinocchio', '2022-11-2', '0:43', 'Cory, Tomar', 'ezFnquuwZok', ''],</text:p>
          </table:table-cell>
        </table:table-row>
        <table:table-row table:style-name="ro1">
          <table:table-cell office:value-type="string" calcext:value-type="string">
            <text:p>Pipe Dream</text:p>
          </table:table-cell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0:26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sIoxOKmanHI</text:p>
          </table:table-cell>
          <table:table-cell/>
          <table:table-cell table:formula="of:=&quot;['&quot; &amp; [.A364] &amp; &quot;', '&quot; &amp; YEAR([.B364]) &amp; &quot;-&quot; &amp; MONTH([.B364]) &amp; &quot;-&quot; &amp; DAY([.B364]) &amp; &quot;', '&quot; &amp; [.C364] &amp; &quot;', '&quot; &amp; [.D364] &amp; &quot;', '&quot; &amp; [.E364] &amp; &quot;', '&quot; &amp; [.F364] &amp; &quot;'],&quot;" office:value-type="string" office:string-value="['Pipe Dream', '2022-3-1', '0:26', 'Adam, Tomar', 'sIoxOKmanHI', '']," calcext:value-type="string">
            <text:p>['Pipe Dream', '2022-3-1', '0:26', 'Adam, Tomar', 'sIoxOKmanHI', ''],</text:p>
          </table:table-cell>
        </table:table-row>
        <table:table-row table:style-name="ro1">
          <table:table-cell office:value-type="string" calcext:value-type="string">
            <text:p>Pizza Tower</text:p>
          </table:table-cell>
          <table:table-cell office:value-type="date" office:date-value="2023-04-24" calcext:value-type="date">
            <text:p>2023-04-24</text:p>
          </table:table-cell>
          <table:table-cell office:value-type="string" calcext:value-type="string">
            <text:p>1:40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93FgWZOftfQ</text:p>
          </table:table-cell>
          <table:table-cell/>
          <table:table-cell table:formula="of:=&quot;['&quot; &amp; [.A365] &amp; &quot;', '&quot; &amp; YEAR([.B365]) &amp; &quot;-&quot; &amp; MONTH([.B365]) &amp; &quot;-&quot; &amp; DAY([.B365]) &amp; &quot;', '&quot; &amp; [.C365] &amp; &quot;', '&quot; &amp; [.D365] &amp; &quot;', '&quot; &amp; [.E365] &amp; &quot;', '&quot; &amp; [.F365] &amp; &quot;'],&quot;" office:value-type="string" office:string-value="['Pizza Tower', '2023-4-24', '1:40', 'Adam, Lyle', '93FgWZOftfQ', '']," calcext:value-type="string">
            <text:p>['Pizza Tower', '2023-4-24', '1:40', 'Adam, Lyle', '93FgWZOftfQ', ''],</text:p>
          </table:table-cell>
        </table:table-row>
        <table:table-row table:style-name="ro1">
          <table:table-cell office:value-type="string" calcext:value-type="string">
            <text:p>Playstation All-Stars Battle Royale</text:p>
          </table:table-cell>
          <table:table-cell office:value-type="date" office:date-value="2018-01-25" calcext:value-type="date">
            <text:p>2018-01-25</text:p>
          </table:table-cell>
          <table:table-cell office:value-type="string" calcext:value-type="string">
            <text:p>0:18</text:p>
          </table:table-cell>
          <table:table-cell office:value-type="string" calcext:value-type="string">
            <text:p>Dingdong, Julian, Lyle</text:p>
          </table:table-cell>
          <table:table-cell office:value-type="string" calcext:value-type="string">
            <text:p>91HefkcCHWU</text:p>
          </table:table-cell>
          <table:table-cell/>
          <table:table-cell table:formula="of:=&quot;['&quot; &amp; [.A366] &amp; &quot;', '&quot; &amp; YEAR([.B366]) &amp; &quot;-&quot; &amp; MONTH([.B366]) &amp; &quot;-&quot; &amp; DAY([.B366]) &amp; &quot;', '&quot; &amp; [.C366] &amp; &quot;', '&quot; &amp; [.D366] &amp; &quot;', '&quot; &amp; [.E366] &amp; &quot;', '&quot; &amp; [.F366] &amp; &quot;'],&quot;" office:value-type="string" office:string-value="['Playstation All-Stars Battle Royale', '2018-1-25', '0:18', 'Dingdong, Julian, Lyle', '91HefkcCHWU', '']," calcext:value-type="string">
            <text:p>['Playstation All-Stars Battle Royale', '2018-1-25', '0:18', 'Dingdong, Julian, Lyle', '91HefkcCHWU', ''],</text:p>
          </table:table-cell>
        </table:table-row>
        <table:table-row table:style-name="ro1">
          <table:table-cell office:value-type="string" calcext:value-type="string">
            <text:p>Plumbers Don't Wear Ties</text:p>
          </table:table-cell>
          <table:table-cell office:value-type="date" office:date-value="2017-12-31" calcext:value-type="date">
            <text:p>2017-12-31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LCr-X2LimO0</text:p>
          </table:table-cell>
          <table:table-cell/>
          <table:table-cell table:formula="of:=&quot;['&quot; &amp; [.A367] &amp; &quot;', '&quot; &amp; YEAR([.B367]) &amp; &quot;-&quot; &amp; MONTH([.B367]) &amp; &quot;-&quot; &amp; DAY([.B367]) &amp; &quot;', '&quot; &amp; [.C367] &amp; &quot;', '&quot; &amp; [.D367] &amp; &quot;', '&quot; &amp; [.E367] &amp; &quot;', '&quot; &amp; [.F367] &amp; &quot;'],&quot;" office:value-type="string" office:string-value="['Plumbers Don't Wear Ties', '2017-12-31', '0:43', 'Dingdong, Julian', 'LCr-X2LimO0', '']," calcext:value-type="string">
            <text:p>['Plumbers Don't Wear Ties', '2017-12-31', '0:43', 'Dingdong, Julian', 'LCr-X2LimO0', ''],</text:p>
          </table:table-cell>
        </table:table-row>
        <table:table-row table:style-name="ro1">
          <table:table-cell office:value-type="string" calcext:value-type="string">
            <text:p>Pocahontas</text:p>
          </table:table-cell>
          <table:table-cell office:value-type="date" office:date-value="2017-01-22" calcext:value-type="date">
            <text:p>2017-01-22</text:p>
          </table:table-cell>
          <table:table-cell office:value-type="string" calcext:value-type="string">
            <text:p>0:1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eeDcCxUgMU</text:p>
          </table:table-cell>
          <table:table-cell/>
          <table:table-cell table:formula="of:=&quot;['&quot; &amp; [.A368] &amp; &quot;', '&quot; &amp; YEAR([.B368]) &amp; &quot;-&quot; &amp; MONTH([.B368]) &amp; &quot;-&quot; &amp; DAY([.B368]) &amp; &quot;', '&quot; &amp; [.C368] &amp; &quot;', '&quot; &amp; [.D368] &amp; &quot;', '&quot; &amp; [.E368] &amp; &quot;', '&quot; &amp; [.F368] &amp; &quot;'],&quot;" office:value-type="string" office:string-value="['Pocahontas', '2017-1-22', '0:13', 'Dingdong, Julian', 'heeDcCxUgMU', '']," calcext:value-type="string">
            <text:p>['Pocahontas', '2017-1-22', '0:13', 'Dingdong, Julian', 'heeDcCxUgMU', ''],</text:p>
          </table:table-cell>
        </table:table-row>
        <table:table-row table:style-name="ro1">
          <table:table-cell office:value-type="string" calcext:value-type="string">
            <text:p>Pokemon Arceus</text:p>
          </table:table-cell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Ny77R96PLH8</text:p>
          </table:table-cell>
          <table:table-cell/>
          <table:table-cell table:formula="of:=&quot;['&quot; &amp; [.A369] &amp; &quot;', '&quot; &amp; YEAR([.B369]) &amp; &quot;-&quot; &amp; MONTH([.B369]) &amp; &quot;-&quot; &amp; DAY([.B369]) &amp; &quot;', '&quot; &amp; [.C369] &amp; &quot;', '&quot; &amp; [.D369] &amp; &quot;', '&quot; &amp; [.E369] &amp; &quot;', '&quot; &amp; [.F369] &amp; &quot;'],&quot;" office:value-type="string" office:string-value="['Pokemon Arceus', '2022-3-11', '1:09', 'Adam, Tomar', 'Ny77R96PLH8', '']," calcext:value-type="string">
            <text:p>['Pokemon Arceus', '2022-3-11', '1:09', 'Adam, Tomar', 'Ny77R96PLH8', ''],</text:p>
          </table:table-cell>
        </table:table-row>
        <table:table-row table:style-name="ro1">
          <table:table-cell office:value-type="string" calcext:value-type="string">
            <text:p>Pokemon Legends Z-A</text:p>
          </table:table-cell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1:46</text:p>
          </table:table-cell>
          <table:table-cell office:value-type="string" calcext:value-type="string">
            <text:p>Tomar, Adam, Niall</text:p>
          </table:table-cell>
          <table:table-cell office:value-type="string" calcext:value-type="string">
            <text:p>4IVLX4y7S9s</text:p>
          </table:table-cell>
          <table:table-cell/>
          <table:table-cell table:formula="of:=&quot;['&quot; &amp; [.A370] &amp; &quot;', '&quot; &amp; YEAR([.B370]) &amp; &quot;-&quot; &amp; MONTH([.B370]) &amp; &quot;-&quot; &amp; DAY([.B370]) &amp; &quot;', '&quot; &amp; [.C370] &amp; &quot;', '&quot; &amp; [.D370] &amp; &quot;', '&quot; &amp; [.E370] &amp; &quot;', '&quot; &amp; [.F370] &amp; &quot;'],&quot;" office:value-type="string" office:string-value="['Pokemon Legends Z-A', '2025-12-4', '1:46', 'Tomar, Adam, Niall', '4IVLX4y7S9s', '']," calcext:value-type="string">
            <text:p>['Pokemon Legends Z-A', '2025-12-4', '1:46', 'Tomar, Adam, Niall', '4IVLX4y7S9s', ''],</text:p>
          </table:table-cell>
        </table:table-row>
        <table:table-row table:style-name="ro1">
          <table:table-cell office:value-type="string" calcext:value-type="string">
            <text:p>Pokemon Red Version - Part 1</text:p>
          </table:table-cell>
          <table:table-cell office:value-type="date" office:date-value="2016-11-16" calcext:value-type="date">
            <text:p>2016-11-16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9Rnw7INyFHs</text:p>
          </table:table-cell>
          <table:table-cell/>
          <table:table-cell table:formula="of:=&quot;['&quot; &amp; [.A371] &amp; &quot;', '&quot; &amp; YEAR([.B371]) &amp; &quot;-&quot; &amp; MONTH([.B371]) &amp; &quot;-&quot; &amp; DAY([.B371]) &amp; &quot;', '&quot; &amp; [.C371] &amp; &quot;', '&quot; &amp; [.D371] &amp; &quot;', '&quot; &amp; [.E371] &amp; &quot;', '&quot; &amp; [.F371] &amp; &quot;'],&quot;" office:value-type="string" office:string-value="['Pokemon Red Version - Part 1', '2016-11-16', '7:29', 'Dingdong, Julian', '9Rnw7INyFHs', '']," calcext:value-type="string">
            <text:p>['Pokemon Red Version - Part 1', '2016-11-16', '7:29', 'Dingdong, Julian', '9Rnw7INyFHs', ''],</text:p>
          </table:table-cell>
        </table:table-row>
        <table:table-row table:style-name="ro1">
          <table:table-cell office:value-type="string" calcext:value-type="string">
            <text:p>Pokemon Red Version - Part 2</text:p>
          </table:table-cell>
          <table:table-cell office:value-type="date" office:date-value="2016-11-16" calcext:value-type="date">
            <text:p>2016-11-16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edj4tuH9Tg8</text:p>
          </table:table-cell>
          <table:table-cell/>
          <table:table-cell table:formula="of:=&quot;['&quot; &amp; [.A372] &amp; &quot;', '&quot; &amp; YEAR([.B372]) &amp; &quot;-&quot; &amp; MONTH([.B372]) &amp; &quot;-&quot; &amp; DAY([.B372]) &amp; &quot;', '&quot; &amp; [.C372] &amp; &quot;', '&quot; &amp; [.D372] &amp; &quot;', '&quot; &amp; [.E372] &amp; &quot;', '&quot; &amp; [.F372] &amp; &quot;'],&quot;" office:value-type="string" office:string-value="['Pokemon Red Version - Part 2', '2016-11-16', '6:27', 'Dingdong, Julian', 'edj4tuH9Tg8', '']," calcext:value-type="string">
            <text:p>['Pokemon Red Version - Part 2', '2016-11-16', '6:27', 'Dingdong, Julian', 'edj4tuH9Tg8', ''],</text:p>
          </table:table-cell>
        </table:table-row>
        <table:table-row table:style-name="ro1">
          <table:table-cell office:value-type="string" calcext:value-type="string">
            <text:p>Pokemon Silver</text:p>
          </table:table-cell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2:31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6lLqmz97M9c</text:p>
          </table:table-cell>
          <table:table-cell/>
          <table:table-cell table:formula="of:=&quot;['&quot; &amp; [.A373] &amp; &quot;', '&quot; &amp; YEAR([.B373]) &amp; &quot;-&quot; &amp; MONTH([.B373]) &amp; &quot;-&quot; &amp; DAY([.B373]) &amp; &quot;', '&quot; &amp; [.C373] &amp; &quot;', '&quot; &amp; [.D373] &amp; &quot;', '&quot; &amp; [.E373] &amp; &quot;', '&quot; &amp; [.F373] &amp; &quot;'],&quot;" office:value-type="string" office:string-value="['Pokemon Silver', '2022-10-15', '2:31', 'Zach, Cory, Tomar', '6lLqmz97M9c', '']," calcext:value-type="string">
            <text:p>['Pokemon Silver', '2022-10-15', '2:31', 'Zach, Cory, Tomar', '6lLqmz97M9c', ''],</text:p>
          </table:table-cell>
        </table:table-row>
        <table:table-row table:style-name="ro1">
          <table:table-cell office:value-type="string" calcext:value-type="string">
            <text:p>Polar Express</text:p>
          </table:table-cell>
          <table:table-cell office:value-type="date" office:date-value="2016-12-22" calcext:value-type="date">
            <text:p>2016-12-22</text:p>
          </table:table-cell>
          <table:table-cell office:value-type="string" calcext:value-type="string">
            <text:p>1:0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VGplaG4igT0</text:p>
          </table:table-cell>
          <table:table-cell/>
          <table:table-cell table:formula="of:=&quot;['&quot; &amp; [.A374] &amp; &quot;', '&quot; &amp; YEAR([.B374]) &amp; &quot;-&quot; &amp; MONTH([.B374]) &amp; &quot;-&quot; &amp; DAY([.B374]) &amp; &quot;', '&quot; &amp; [.C374] &amp; &quot;', '&quot; &amp; [.D374] &amp; &quot;', '&quot; &amp; [.E374] &amp; &quot;', '&quot; &amp; [.F374] &amp; &quot;'],&quot;" office:value-type="string" office:string-value="['Polar Express', '2016-12-22', '1:05', 'Dingdong, Julian', 'VGplaG4igT0', '']," calcext:value-type="string">
            <text:p>['Polar Express', '2016-12-22', '1:05', 'Dingdong, Julian', 'VGplaG4igT0', ''],</text:p>
          </table:table-cell>
        </table:table-row>
        <table:table-row table:style-name="ro1">
          <table:table-cell office:value-type="string" calcext:value-type="string">
            <text:p>Pools</text:p>
          </table:table-cell>
          <table:table-cell office:value-type="date" office:date-value="2024-10-23" calcext:value-type="date">
            <text:p>2024-10-23</text:p>
          </table:table-cell>
          <table:table-cell office:value-type="string" calcext:value-type="string">
            <text:p>1:2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J91ootV_A_k</text:p>
          </table:table-cell>
          <table:table-cell/>
          <table:table-cell table:formula="of:=&quot;['&quot; &amp; [.A375] &amp; &quot;', '&quot; &amp; YEAR([.B375]) &amp; &quot;-&quot; &amp; MONTH([.B375]) &amp; &quot;-&quot; &amp; DAY([.B375]) &amp; &quot;', '&quot; &amp; [.C375] &amp; &quot;', '&quot; &amp; [.D375] &amp; &quot;', '&quot; &amp; [.E375] &amp; &quot;', '&quot; &amp; [.F375] &amp; &quot;'],&quot;" office:value-type="string" office:string-value="['Pools', '2024-10-23', '1:21', 'Zach, Tomar', 'J91ootV_A_k', '']," calcext:value-type="string">
            <text:p>['Pools', '2024-10-23', '1:21', 'Zach, Tomar', 'J91ootV_A_k', ''],</text:p>
          </table:table-cell>
        </table:table-row>
        <table:table-row table:style-name="ro1">
          <table:table-cell office:value-type="string" calcext:value-type="string">
            <text:p>Poppy Playtime</text:p>
          </table:table-cell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1:50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EkuWwIB1meU</text:p>
          </table:table-cell>
          <table:table-cell/>
          <table:table-cell table:formula="of:=&quot;['&quot; &amp; [.A376] &amp; &quot;', '&quot; &amp; YEAR([.B376]) &amp; &quot;-&quot; &amp; MONTH([.B376]) &amp; &quot;-&quot; &amp; DAY([.B376]) &amp; &quot;', '&quot; &amp; [.C376] &amp; &quot;', '&quot; &amp; [.D376] &amp; &quot;', '&quot; &amp; [.E376] &amp; &quot;', '&quot; &amp; [.F376] &amp; &quot;'],&quot;" office:value-type="string" office:string-value="['Poppy Playtime', '2022-10-19', '1:50', 'Cory, Lyle', 'EkuWwIB1meU', '']," calcext:value-type="string">
            <text:p>['Poppy Playtime', '2022-10-19', '1:50', 'Cory, Lyle', 'EkuWwIB1meU', ''],</text:p>
          </table:table-cell>
        </table:table-row>
        <table:table-row table:style-name="ro1">
          <table:table-cell office:value-type="string" calcext:value-type="string">
            <text:p>Portaboy+</text:p>
          </table:table-cell>
          <table:table-cell office:value-type="date" office:date-value="2023-10-19" calcext:value-type="date">
            <text:p>2023-10-19</text:p>
          </table:table-cell>
          <table:table-cell office:value-type="string" calcext:value-type="string">
            <text:p>0:20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xonfSItnEo0</text:p>
          </table:table-cell>
          <table:table-cell/>
          <table:table-cell table:formula="of:=&quot;['&quot; &amp; [.A377] &amp; &quot;', '&quot; &amp; YEAR([.B377]) &amp; &quot;-&quot; &amp; MONTH([.B377]) &amp; &quot;-&quot; &amp; DAY([.B377]) &amp; &quot;', '&quot; &amp; [.C377] &amp; &quot;', '&quot; &amp; [.D377] &amp; &quot;', '&quot; &amp; [.E377] &amp; &quot;', '&quot; &amp; [.F377] &amp; &quot;'],&quot;" office:value-type="string" office:string-value="['Portaboy+', '2023-10-19', '0:20', 'Zach, Tomar', 'xonfSItnEo0', '']," calcext:value-type="string">
            <text:p>['Portaboy+', '2023-10-19', '0:20', 'Zach, Tomar', 'xonfSItnEo0', ''],</text:p>
          </table:table-cell>
        </table:table-row>
        <table:table-row table:style-name="ro1">
          <table:table-cell office:value-type="string" calcext:value-type="string">
            <text:p>Postal 2 - Ep 1</text:p>
          </table:table-cell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0:18</text:p>
          </table:table-cell>
          <table:table-cell office:value-type="string" calcext:value-type="string">
            <text:p>Cory, Adam, Lyle</text:p>
          </table:table-cell>
          <table:table-cell office:value-type="string" calcext:value-type="string">
            <text:p>k5fnNnERTX0</text:p>
          </table:table-cell>
          <table:table-cell/>
          <table:table-cell table:formula="of:=&quot;['&quot; &amp; [.A378] &amp; &quot;', '&quot; &amp; YEAR([.B378]) &amp; &quot;-&quot; &amp; MONTH([.B378]) &amp; &quot;-&quot; &amp; DAY([.B378]) &amp; &quot;', '&quot; &amp; [.C378] &amp; &quot;', '&quot; &amp; [.D378] &amp; &quot;', '&quot; &amp; [.E378] &amp; &quot;', '&quot; &amp; [.F378] &amp; &quot;'],&quot;" office:value-type="string" office:string-value="['Postal 2 - Ep 1', '2022-6-17', '0:18', 'Cory, Adam, Lyle', 'k5fnNnERTX0', '']," calcext:value-type="string">
            <text:p>['Postal 2 - Ep 1', '2022-6-17', '0:18', 'Cory, Adam, Lyle', 'k5fnNnERTX0', ''],</text:p>
          </table:table-cell>
        </table:table-row>
        <table:table-row table:style-name="ro1">
          <table:table-cell office:value-type="string" calcext:value-type="string">
            <text:p>Postal 2 - Ep 2</text:p>
          </table:table-cell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Cory, Adam, Lyle</text:p>
          </table:table-cell>
          <table:table-cell office:value-type="string" calcext:value-type="string">
            <text:p>egYFv7Il0kE</text:p>
          </table:table-cell>
          <table:table-cell/>
          <table:table-cell table:formula="of:=&quot;['&quot; &amp; [.A379] &amp; &quot;', '&quot; &amp; YEAR([.B379]) &amp; &quot;-&quot; &amp; MONTH([.B379]) &amp; &quot;-&quot; &amp; DAY([.B379]) &amp; &quot;', '&quot; &amp; [.C379] &amp; &quot;', '&quot; &amp; [.D379] &amp; &quot;', '&quot; &amp; [.E379] &amp; &quot;', '&quot; &amp; [.F379] &amp; &quot;'],&quot;" office:value-type="string" office:string-value="['Postal 2 - Ep 2', '2022-6-22', '0:21', 'Cory, Adam, Lyle', 'egYFv7Il0kE', '']," calcext:value-type="string">
            <text:p>['Postal 2 - Ep 2', '2022-6-22', '0:21', 'Cory, Adam, Lyle', 'egYFv7Il0kE', ''],</text:p>
          </table:table-cell>
        </table:table-row>
        <table:table-row table:style-name="ro1">
          <table:table-cell office:value-type="string" calcext:value-type="string">
            <text:p>Poy Poy Boy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0:2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WekAfSootgI</text:p>
          </table:table-cell>
          <table:table-cell/>
          <table:table-cell table:formula="of:=&quot;['&quot; &amp; [.A380] &amp; &quot;', '&quot; &amp; YEAR([.B380]) &amp; &quot;-&quot; &amp; MONTH([.B380]) &amp; &quot;-&quot; &amp; DAY([.B380]) &amp; &quot;', '&quot; &amp; [.C380] &amp; &quot;', '&quot; &amp; [.D380] &amp; &quot;', '&quot; &amp; [.E380] &amp; &quot;', '&quot; &amp; [.F380] &amp; &quot;'],&quot;" office:value-type="string" office:string-value="['Poy Poy Boy', '2017-12-10', '0:22', 'Dingdong, Julian', 'WekAfSootgI', '']," calcext:value-type="string">
            <text:p>['Poy Poy Boy', '2017-12-10', '0:22', 'Dingdong, Julian', 'WekAfSootgI', ''],</text:p>
          </table:table-cell>
        </table:table-row>
        <table:table-row table:style-name="ro1">
          <table:table-cell office:value-type="string" calcext:value-type="string">
            <text:p>Priest Simulator</text:p>
          </table:table-cell>
          <table:table-cell office:value-type="date" office:date-value="2021-11-07" calcext:value-type="date">
            <text:p>2021-11-07</text:p>
          </table:table-cell>
          <table:table-cell office:value-type="string" calcext:value-type="string">
            <text:p>0:39</text:p>
          </table:table-cell>
          <table:table-cell office:value-type="string" calcext:value-type="string">
            <text:p>Zach, Adam, Lyle</text:p>
          </table:table-cell>
          <table:table-cell office:value-type="string" calcext:value-type="string">
            <text:p>B_wAgU3_Q4Q</text:p>
          </table:table-cell>
          <table:table-cell/>
          <table:table-cell table:formula="of:=&quot;['&quot; &amp; [.A381] &amp; &quot;', '&quot; &amp; YEAR([.B381]) &amp; &quot;-&quot; &amp; MONTH([.B381]) &amp; &quot;-&quot; &amp; DAY([.B381]) &amp; &quot;', '&quot; &amp; [.C381] &amp; &quot;', '&quot; &amp; [.D381] &amp; &quot;', '&quot; &amp; [.E381] &amp; &quot;', '&quot; &amp; [.F381] &amp; &quot;'],&quot;" office:value-type="string" office:string-value="['Priest Simulator', '2021-11-7', '0:39', 'Zach, Adam, Lyle', 'B_wAgU3_Q4Q', '']," calcext:value-type="string">
            <text:p>['Priest Simulator', '2021-11-7', '0:39', 'Zach, Adam, Lyle', 'B_wAgU3_Q4Q', ''],</text:p>
          </table:table-cell>
        </table:table-row>
        <table:table-row table:style-name="ro1">
          <table:table-cell office:value-type="string" calcext:value-type="string">
            <text:p>Prince Of Persia</text:p>
          </table:table-cell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0:40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ZXIIaUu5YE0</text:p>
          </table:table-cell>
          <table:table-cell/>
          <table:table-cell table:formula="of:=&quot;['&quot; &amp; [.A382] &amp; &quot;', '&quot; &amp; YEAR([.B382]) &amp; &quot;-&quot; &amp; MONTH([.B382]) &amp; &quot;-&quot; &amp; DAY([.B382]) &amp; &quot;', '&quot; &amp; [.C382] &amp; &quot;', '&quot; &amp; [.D382] &amp; &quot;', '&quot; &amp; [.E382] &amp; &quot;', '&quot; &amp; [.F382] &amp; &quot;'],&quot;" office:value-type="string" office:string-value="['Prince Of Persia', '2020-2-21', '0:40', 'Cory, Lyle', 'ZXIIaUu5YE0', '']," calcext:value-type="string">
            <text:p>['Prince Of Persia', '2020-2-21', '0:40', 'Cory, Lyle', 'ZXIIaUu5YE0', ''],</text:p>
          </table:table-cell>
        </table:table-row>
        <table:table-row table:style-name="ro1">
          <table:table-cell office:value-type="string" calcext:value-type="string">
            <text:p>Prison Simulator</text:p>
          </table:table-cell>
          <table:table-cell office:value-type="date" office:date-value="2021-11-27" calcext:value-type="date">
            <text:p>2021-11-27</text:p>
          </table:table-cell>
          <table:table-cell office:value-type="string" calcext:value-type="string">
            <text:p>0:4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DmikHdKLmlo</text:p>
          </table:table-cell>
          <table:table-cell/>
          <table:table-cell table:formula="of:=&quot;['&quot; &amp; [.A383] &amp; &quot;', '&quot; &amp; YEAR([.B383]) &amp; &quot;-&quot; &amp; MONTH([.B383]) &amp; &quot;-&quot; &amp; DAY([.B383]) &amp; &quot;', '&quot; &amp; [.C383] &amp; &quot;', '&quot; &amp; [.D383] &amp; &quot;', '&quot; &amp; [.E383] &amp; &quot;', '&quot; &amp; [.F383] &amp; &quot;'],&quot;" office:value-type="string" office:string-value="['Prison Simulator', '2021-11-27', '0:44', 'Lyle, Tomar', 'DmikHdKLmlo', '']," calcext:value-type="string">
            <text:p>['Prison Simulator', '2021-11-27', '0:44', 'Lyle, Tomar', 'DmikHdKLmlo', ''],</text:p>
          </table:table-cell>
        </table:table-row>
        <table:table-row table:style-name="ro1">
          <table:table-cell office:value-type="string" calcext:value-type="string">
            <text:p>Pseudoregalia</text:p>
          </table:table-cell>
          <table:table-cell office:value-type="date" office:date-value="2024-06-04" calcext:value-type="date">
            <text:p>2024-06-04</text:p>
          </table:table-cell>
          <table:table-cell office:value-type="string" calcext:value-type="string">
            <text:p>2:44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0WfGBEEDFWQ</text:p>
          </table:table-cell>
          <table:table-cell/>
          <table:table-cell table:formula="of:=&quot;['&quot; &amp; [.A384] &amp; &quot;', '&quot; &amp; YEAR([.B384]) &amp; &quot;-&quot; &amp; MONTH([.B384]) &amp; &quot;-&quot; &amp; DAY([.B384]) &amp; &quot;', '&quot; &amp; [.C384] &amp; &quot;', '&quot; &amp; [.D384] &amp; &quot;', '&quot; &amp; [.E384] &amp; &quot;', '&quot; &amp; [.F384] &amp; &quot;'],&quot;" office:value-type="string" office:string-value="['Pseudoregalia', '2024-6-4', '2:44', 'Cory, Dave', '0WfGBEEDFWQ', '']," calcext:value-type="string">
            <text:p>['Pseudoregalia', '2024-6-4', '2:44', 'Cory, Dave', '0WfGBEEDFWQ', ''],</text:p>
          </table:table-cell>
        </table:table-row>
        <table:table-row table:style-name="ro1">
          <table:table-cell office:value-type="string" calcext:value-type="string">
            <text:p>Pubg (Playerunknown's Battlegrounds)</text:p>
          </table:table-cell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1:3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POWBoYA-HE</text:p>
          </table:table-cell>
          <table:table-cell/>
          <table:table-cell table:formula="of:=&quot;['&quot; &amp; [.A385] &amp; &quot;', '&quot; &amp; YEAR([.B385]) &amp; &quot;-&quot; &amp; MONTH([.B385]) &amp; &quot;-&quot; &amp; DAY([.B385]) &amp; &quot;', '&quot; &amp; [.C385] &amp; &quot;', '&quot; &amp; [.D385] &amp; &quot;', '&quot; &amp; [.E385] &amp; &quot;', '&quot; &amp; [.F385] &amp; &quot;'],&quot;" office:value-type="string" office:string-value="['Pubg (Playerunknown's Battlegrounds)', '2017-9-11', '1:32', 'Dingdong, Julian', 'CPOWBoYA-HE', '']," calcext:value-type="string">
            <text:p>['Pubg (Playerunknown's Battlegrounds)', '2017-9-11', '1:32', 'Dingdong, Julian', 'CPOWBoYA-HE', ''],</text:p>
          </table:table-cell>
        </table:table-row>
        <table:table-row table:style-name="ro1">
          <table:table-cell office:value-type="string" calcext:value-type="string">
            <text:p>Ragdoll Masters</text:p>
          </table:table-cell>
          <table:table-cell office:value-type="date" office:date-value="2014-07-18" calcext:value-type="date">
            <text:p>2014-07-18</text:p>
          </table:table-cell>
          <table:table-cell office:value-type="string" calcext:value-type="string">
            <text:p>0:28</text:p>
          </table:table-cell>
          <table:table-cell office:value-type="string" calcext:value-type="string">
            <text:p>Egoraptor</text:p>
          </table:table-cell>
          <table:table-cell office:value-type="string" calcext:value-type="string">
            <text:p>Uf9AwcrmyGs</text:p>
          </table:table-cell>
          <table:table-cell/>
          <table:table-cell table:formula="of:=&quot;['&quot; &amp; [.A386] &amp; &quot;', '&quot; &amp; YEAR([.B386]) &amp; &quot;-&quot; &amp; MONTH([.B386]) &amp; &quot;-&quot; &amp; DAY([.B386]) &amp; &quot;', '&quot; &amp; [.C386] &amp; &quot;', '&quot; &amp; [.D386] &amp; &quot;', '&quot; &amp; [.E386] &amp; &quot;', '&quot; &amp; [.F386] &amp; &quot;'],&quot;" office:value-type="string" office:string-value="['Ragdoll Masters', '2014-7-18', '0:28', 'Egoraptor', 'Uf9AwcrmyGs', '']," calcext:value-type="string">
            <text:p>['Ragdoll Masters', '2014-7-18', '0:28', 'Egoraptor', 'Uf9AwcrmyGs', ''],</text:p>
          </table:table-cell>
        </table:table-row>
        <table:table-row table:style-name="ro1">
          <table:table-cell office:value-type="string" calcext:value-type="string">
            <text:p>Rain World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vpaI6svpPJ0</text:p>
          </table:table-cell>
          <table:table-cell/>
          <table:table-cell table:formula="of:=&quot;['&quot; &amp; [.A387] &amp; &quot;', '&quot; &amp; YEAR([.B387]) &amp; &quot;-&quot; &amp; MONTH([.B387]) &amp; &quot;-&quot; &amp; DAY([.B387]) &amp; &quot;', '&quot; &amp; [.C387] &amp; &quot;', '&quot; &amp; [.D387] &amp; &quot;', '&quot; &amp; [.E387] &amp; &quot;', '&quot; &amp; [.F387] &amp; &quot;'],&quot;" office:value-type="string" office:string-value="['Rain World', '2019-7-30', '0:23', 'Lyle, Tomar', 'vpaI6svpPJ0', '']," calcext:value-type="string">
            <text:p>['Rain World', '2019-7-30', '0:23', 'Lyle, Tomar', 'vpaI6svpPJ0', ''],</text:p>
          </table:table-cell>
        </table:table-row>
        <table:table-row table:style-name="ro1">
          <table:table-cell office:value-type="string" calcext:value-type="string">
            <text:p>Random .Io Games</text:p>
          </table:table-cell>
          <table:table-cell office:value-type="date" office:date-value="2024-11-29" calcext:value-type="date">
            <text:p>2024-11-29</text:p>
          </table:table-cell>
          <table:table-cell office:value-type="string" calcext:value-type="string">
            <text:p>0:34</text:p>
          </table:table-cell>
          <table:table-cell office:value-type="string" calcext:value-type="string">
            <text:p>Adam, Niall, Lyle</text:p>
          </table:table-cell>
          <table:table-cell office:value-type="string" calcext:value-type="string">
            <text:p>vmwSe41GgY0</text:p>
          </table:table-cell>
          <table:table-cell/>
          <table:table-cell table:formula="of:=&quot;['&quot; &amp; [.A388] &amp; &quot;', '&quot; &amp; YEAR([.B388]) &amp; &quot;-&quot; &amp; MONTH([.B388]) &amp; &quot;-&quot; &amp; DAY([.B388]) &amp; &quot;', '&quot; &amp; [.C388] &amp; &quot;', '&quot; &amp; [.D388] &amp; &quot;', '&quot; &amp; [.E388] &amp; &quot;', '&quot; &amp; [.F388] &amp; &quot;'],&quot;" office:value-type="string" office:string-value="['Random .Io Games', '2024-11-29', '0:34', 'Adam, Niall, Lyle', 'vmwSe41GgY0', '']," calcext:value-type="string">
            <text:p>['Random .Io Games', '2024-11-29', '0:34', 'Adam, Niall, Lyle', 'vmwSe41GgY0', ''],</text:p>
          </table:table-cell>
        </table:table-row>
        <table:table-row table:style-name="ro1">
          <table:table-cell office:value-type="string" calcext:value-type="string">
            <text:p>Rat Simulator Game</text:p>
          </table:table-cell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0:30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wLlK1TgVYIk</text:p>
          </table:table-cell>
          <table:table-cell/>
          <table:table-cell table:formula="of:=&quot;['&quot; &amp; [.A389] &amp; &quot;', '&quot; &amp; YEAR([.B389]) &amp; &quot;-&quot; &amp; MONTH([.B389]) &amp; &quot;-&quot; &amp; DAY([.B389]) &amp; &quot;', '&quot; &amp; [.C389] &amp; &quot;', '&quot; &amp; [.D389] &amp; &quot;', '&quot; &amp; [.E389] &amp; &quot;', '&quot; &amp; [.F389] &amp; &quot;'],&quot;" office:value-type="string" office:string-value="['Rat Simulator Game', '2019-10-31', '0:30', 'Zach, Tomar', 'wLlK1TgVYIk', '']," calcext:value-type="string">
            <text:p>['Rat Simulator Game', '2019-10-31', '0:30', 'Zach, Tomar', 'wLlK1TgVYIk', ''],</text:p>
          </table:table-cell>
        </table:table-row>
        <table:table-row table:style-name="ro1">
          <table:table-cell office:value-type="string" calcext:value-type="string">
            <text:p>Ratchet And Clank - Rift Apart</text:p>
          </table:table-cell>
          <table:table-cell office:value-type="date" office:date-value="2021-06-22" calcext:value-type="date">
            <text:p>2021-06-22</text:p>
          </table:table-cell>
          <table:table-cell office:value-type="string" calcext:value-type="string">
            <text:p>1:4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iIk-RJD3RzE</text:p>
          </table:table-cell>
          <table:table-cell/>
          <table:table-cell table:formula="of:=&quot;['&quot; &amp; [.A390] &amp; &quot;', '&quot; &amp; YEAR([.B390]) &amp; &quot;-&quot; &amp; MONTH([.B390]) &amp; &quot;-&quot; &amp; DAY([.B390]) &amp; &quot;', '&quot; &amp; [.C390] &amp; &quot;', '&quot; &amp; [.D390] &amp; &quot;', '&quot; &amp; [.E390] &amp; &quot;', '&quot; &amp; [.F390] &amp; &quot;'],&quot;" office:value-type="string" office:string-value="['Ratchet And Clank - Rift Apart', '2021-6-22', '1:48', 'Lyle, Tomar', 'iIk-RJD3RzE', '']," calcext:value-type="string">
            <text:p>['Ratchet And Clank - Rift Apart', '2021-6-22', '1:48', 'Lyle, Tomar', 'iIk-RJD3RzE', ''],</text:p>
          </table:table-cell>
        </table:table-row>
        <table:table-row table:style-name="ro1">
          <table:table-cell office:value-type="string" calcext:value-type="string">
            <text:p>Rayman Origins</text:p>
          </table:table-cell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1:0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PNz6C7EN6U</text:p>
          </table:table-cell>
          <table:table-cell/>
          <table:table-cell table:formula="of:=&quot;['&quot; &amp; [.A391] &amp; &quot;', '&quot; &amp; YEAR([.B391]) &amp; &quot;-&quot; &amp; MONTH([.B391]) &amp; &quot;-&quot; &amp; DAY([.B391]) &amp; &quot;', '&quot; &amp; [.C391] &amp; &quot;', '&quot; &amp; [.D391] &amp; &quot;', '&quot; &amp; [.E391] &amp; &quot;', '&quot; &amp; [.F391] &amp; &quot;'],&quot;" office:value-type="string" office:string-value="['Rayman Origins', '2017-8-10', '1:03', 'Dingdong, Julian', 'DPNz6C7EN6U', '']," calcext:value-type="string">
            <text:p>['Rayman Origins', '2017-8-10', '1:03', 'Dingdong, Julian', 'DPNz6C7EN6U', ''],</text:p>
          </table:table-cell>
        </table:table-row>
        <table:table-row table:style-name="ro1">
          <table:table-cell office:value-type="string" calcext:value-type="string">
            <text:p>Remothered</text:p>
          </table:table-cell>
          <table:table-cell office:value-type="date" office:date-value="2021-10-25" calcext:value-type="date">
            <text:p>2021-10-25</text:p>
          </table:table-cell>
          <table:table-cell office:value-type="string" calcext:value-type="string">
            <text:p>0:1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rGRPI8vEr70</text:p>
          </table:table-cell>
          <table:table-cell/>
          <table:table-cell table:formula="of:=&quot;['&quot; &amp; [.A392] &amp; &quot;', '&quot; &amp; YEAR([.B392]) &amp; &quot;-&quot; &amp; MONTH([.B392]) &amp; &quot;-&quot; &amp; DAY([.B392]) &amp; &quot;', '&quot; &amp; [.C392] &amp; &quot;', '&quot; &amp; [.D392] &amp; &quot;', '&quot; &amp; [.E392] &amp; &quot;', '&quot; &amp; [.F392] &amp; &quot;'],&quot;" office:value-type="string" office:string-value="['Remothered', '2021-10-25', '0:17', 'Lyle, Tomar', 'rGRPI8vEr70', '']," calcext:value-type="string">
            <text:p>['Remothered', '2021-10-25', '0:17', 'Lyle, Tomar', 'rGRPI8vEr70', ''],</text:p>
          </table:table-cell>
        </table:table-row>
        <table:table-row table:style-name="ro1">
          <table:table-cell office:value-type="string" calcext:value-type="string">
            <text:p>Resident Evil - Gaiden (Game Boy Color)</text:p>
          </table:table-cell>
          <table:table-cell office:value-type="date" office:date-value="2021-10-26" calcext:value-type="date">
            <text:p>2021-10-26</text:p>
          </table:table-cell>
          <table:table-cell office:value-type="string" calcext:value-type="string">
            <text:p>1:0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RpqbL7unCCE</text:p>
          </table:table-cell>
          <table:table-cell/>
          <table:table-cell table:formula="of:=&quot;['&quot; &amp; [.A393] &amp; &quot;', '&quot; &amp; YEAR([.B393]) &amp; &quot;-&quot; &amp; MONTH([.B393]) &amp; &quot;-&quot; &amp; DAY([.B393]) &amp; &quot;', '&quot; &amp; [.C393] &amp; &quot;', '&quot; &amp; [.D393] &amp; &quot;', '&quot; &amp; [.E393] &amp; &quot;', '&quot; &amp; [.F393] &amp; &quot;'],&quot;" office:value-type="string" office:string-value="['Resident Evil - Gaiden (Game Boy Color)', '2021-10-26', '1:02', 'Lyle, Tomar', 'RpqbL7unCCE', '']," calcext:value-type="string">
            <text:p>['Resident Evil - Gaiden (Game Boy Color)', '2021-10-26', '1:02', 'Lyle, Tomar', 'RpqbL7unCCE', ''],</text:p>
          </table:table-cell>
        </table:table-row>
        <table:table-row table:style-name="ro1">
          <table:table-cell office:value-type="string" calcext:value-type="string">
            <text:p>Resident Evil (2017)</text:p>
          </table:table-cell>
          <table:table-cell office:value-type="date" office:date-value="2017-12-04" calcext:value-type="date">
            <text:p>2017-12-04</text:p>
          </table:table-cell>
          <table:table-cell office:value-type="string" calcext:value-type="string">
            <text:p>0:5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Tb78TNSu3Xk</text:p>
          </table:table-cell>
          <table:table-cell/>
          <table:table-cell table:formula="of:=&quot;['&quot; &amp; [.A394] &amp; &quot;', '&quot; &amp; YEAR([.B394]) &amp; &quot;-&quot; &amp; MONTH([.B394]) &amp; &quot;-&quot; &amp; DAY([.B394]) &amp; &quot;', '&quot; &amp; [.C394] &amp; &quot;', '&quot; &amp; [.D394] &amp; &quot;', '&quot; &amp; [.E394] &amp; &quot;', '&quot; &amp; [.F394] &amp; &quot;'],&quot;" office:value-type="string" office:string-value="['Resident Evil (2017)', '2017-12-4', '0:55', 'Dingdong, Julian', 'Tb78TNSu3Xk', '']," calcext:value-type="string">
            <text:p>['Resident Evil (2017)', '2017-12-4', '0:55', 'Dingdong, Julian', 'Tb78TNSu3Xk', ''],</text:p>
          </table:table-cell>
        </table:table-row>
        <table:table-row table:style-name="ro1">
          <table:table-cell office:value-type="string" calcext:value-type="string">
            <text:p>Resident Evil (2023)</text:p>
          </table:table-cell>
          <table:table-cell office:value-type="date" office:date-value="2023-10-21" calcext:value-type="date">
            <text:p>2023-10-21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fu3pumUTZJM</text:p>
          </table:table-cell>
          <table:table-cell/>
          <table:table-cell table:formula="of:=&quot;['&quot; &amp; [.A395] &amp; &quot;', '&quot; &amp; YEAR([.B395]) &amp; &quot;-&quot; &amp; MONTH([.B395]) &amp; &quot;-&quot; &amp; DAY([.B395]) &amp; &quot;', '&quot; &amp; [.C395] &amp; &quot;', '&quot; &amp; [.D395] &amp; &quot;', '&quot; &amp; [.E395] &amp; &quot;', '&quot; &amp; [.F395] &amp; &quot;'],&quot;" office:value-type="string" office:string-value="['Resident Evil (2023)', '2023-10-21', '8:39', 'Cory, Dave', 'fu3pumUTZJM', '']," calcext:value-type="string">
            <text:p>['Resident Evil (2023)', '2023-10-21', '8:39', 'Cory, Dave', 'fu3pumUTZJM', ''],</text:p>
          </table:table-cell>
        </table:table-row>
        <table:table-row table:style-name="ro1">
          <table:table-cell office:value-type="string" calcext:value-type="string">
            <text:p>Resident Evil 2 (2014)</text:p>
          </table:table-cell>
          <table:table-cell office:value-type="date" office:date-value="2014-09-30" calcext:value-type="date">
            <text:p>2014-09-30</text:p>
          </table:table-cell>
          <table:table-cell office:value-type="string" calcext:value-type="string">
            <text:p>1:20</text:p>
          </table:table-cell>
          <table:table-cell office:value-type="string" calcext:value-type="string">
            <text:p>Cory, Zach, Niall</text:p>
          </table:table-cell>
          <table:table-cell office:value-type="string" calcext:value-type="string">
            <text:p>vgHj89VtC-Y</text:p>
          </table:table-cell>
          <table:table-cell/>
          <table:table-cell table:formula="of:=&quot;['&quot; &amp; [.A396] &amp; &quot;', '&quot; &amp; YEAR([.B396]) &amp; &quot;-&quot; &amp; MONTH([.B396]) &amp; &quot;-&quot; &amp; DAY([.B396]) &amp; &quot;', '&quot; &amp; [.C396] &amp; &quot;', '&quot; &amp; [.D396] &amp; &quot;', '&quot; &amp; [.E396] &amp; &quot;', '&quot; &amp; [.F396] &amp; &quot;'],&quot;" office:value-type="string" office:string-value="['Resident Evil 2 (2014)', '2014-9-30', '1:20', 'Cory, Zach, Niall', 'vgHj89VtC-Y', '']," calcext:value-type="string">
            <text:p>['Resident Evil 2 (2014)', '2014-9-30', '1:20', 'Cory, Zach, Niall', 'vgHj89VtC-Y', ''],</text:p>
          </table:table-cell>
        </table:table-row>
        <table:table-row table:style-name="ro1">
          <table:table-cell office:value-type="string" calcext:value-type="string">
            <text:p>Resident Evil 2 (2018 Run)</text:p>
          </table:table-cell>
          <table:table-cell office:value-type="date" office:date-value="2018-03-10" calcext:value-type="date">
            <text:p>2018-03-10</text:p>
          </table:table-cell>
          <table:table-cell office:value-type="string" calcext:value-type="string">
            <text:p>0:32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xCg-lwttWW8</text:p>
          </table:table-cell>
          <table:table-cell/>
          <table:table-cell table:formula="of:=&quot;['&quot; &amp; [.A397] &amp; &quot;', '&quot; &amp; YEAR([.B397]) &amp; &quot;-&quot; &amp; MONTH([.B397]) &amp; &quot;-&quot; &amp; DAY([.B397]) &amp; &quot;', '&quot; &amp; [.C397] &amp; &quot;', '&quot; &amp; [.D397] &amp; &quot;', '&quot; &amp; [.E397] &amp; &quot;', '&quot; &amp; [.F397] &amp; &quot;'],&quot;" office:value-type="string" office:string-value="['Resident Evil 2 (2018 Run)', '2018-3-10', '0:32', 'Zach, Lyle', 'xCg-lwttWW8', '']," calcext:value-type="string">
            <text:p>['Resident Evil 2 (2018 Run)', '2018-3-10', '0:32', 'Zach, Lyle', 'xCg-lwttWW8', ''],</text:p>
          </table:table-cell>
        </table:table-row>
        <table:table-row table:style-name="ro1">
          <table:table-cell office:value-type="string" calcext:value-type="string">
            <text:p>Resident Evil 2 (2024)</text:p>
          </table:table-cell>
          <table:table-cell office:value-type="date" office:date-value="2024-10-20" calcext:value-type="date">
            <text:p>2024-10-20</text:p>
          </table:table-cell>
          <table:table-cell office:value-type="string" calcext:value-type="string">
            <text:p>4:01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o0OUWNWezwY</text:p>
          </table:table-cell>
          <table:table-cell/>
          <table:table-cell table:formula="of:=&quot;['&quot; &amp; [.A398] &amp; &quot;', '&quot; &amp; YEAR([.B398]) &amp; &quot;-&quot; &amp; MONTH([.B398]) &amp; &quot;-&quot; &amp; DAY([.B398]) &amp; &quot;', '&quot; &amp; [.C398] &amp; &quot;', '&quot; &amp; [.D398] &amp; &quot;', '&quot; &amp; [.E398] &amp; &quot;', '&quot; &amp; [.F398] &amp; &quot;'],&quot;" office:value-type="string" office:string-value="['Resident Evil 2 (2024)', '2024-10-20', '4:01', 'Cory, Dave', 'o0OUWNWezwY', '']," calcext:value-type="string">
            <text:p>['Resident Evil 2 (2024)', '2024-10-20', '4:01', 'Cory, Dave', 'o0OUWNWezwY', ''],</text:p>
          </table:table-cell>
        </table:table-row>
        <table:table-row table:style-name="ro1">
          <table:table-cell office:value-type="string" calcext:value-type="string">
            <text:p>Resident Evil 2 Remake</text:p>
          </table:table-cell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1:32</text:p>
          </table:table-cell>
          <table:table-cell office:value-type="string" calcext:value-type="string">
            <text:p>Cory, Jeff, Dave</text:p>
          </table:table-cell>
          <table:table-cell office:value-type="string" calcext:value-type="string">
            <text:p>tpA58Q6zhl4</text:p>
          </table:table-cell>
          <table:table-cell/>
          <table:table-cell table:formula="of:=&quot;['&quot; &amp; [.A399] &amp; &quot;', '&quot; &amp; YEAR([.B399]) &amp; &quot;-&quot; &amp; MONTH([.B399]) &amp; &quot;-&quot; &amp; DAY([.B399]) &amp; &quot;', '&quot; &amp; [.C399] &amp; &quot;', '&quot; &amp; [.D399] &amp; &quot;', '&quot; &amp; [.E399] &amp; &quot;', '&quot; &amp; [.F399] &amp; &quot;'],&quot;" office:value-type="string" office:string-value="['Resident Evil 2 Remake', '2019-8-28', '1:32', 'Cory, Jeff, Dave', 'tpA58Q6zhl4', '']," calcext:value-type="string">
            <text:p>['Resident Evil 2 Remake', '2019-8-28', '1:32', 'Cory, Jeff, Dave', 'tpA58Q6zhl4', ''],</text:p>
          </table:table-cell>
        </table:table-row>
        <table:table-row table:style-name="ro1">
          <table:table-cell office:value-type="string" calcext:value-type="string">
            <text:p>Resident Evil 3 - Nemesis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5:08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2DW2sExl3yQ</text:p>
          </table:table-cell>
          <table:table-cell/>
          <table:table-cell table:formula="of:=&quot;['&quot; &amp; [.A400] &amp; &quot;', '&quot; &amp; YEAR([.B400]) &amp; &quot;-&quot; &amp; MONTH([.B400]) &amp; &quot;-&quot; &amp; DAY([.B400]) &amp; &quot;', '&quot; &amp; [.C400] &amp; &quot;', '&quot; &amp; [.D400] &amp; &quot;', '&quot; &amp; [.E400] &amp; &quot;', '&quot; &amp; [.F400] &amp; &quot;'],&quot;" office:value-type="string" office:string-value="['Resident Evil 3 - Nemesis', '2019-10-21', '5:08', 'Cory, Dave', '2DW2sExl3yQ', '']," calcext:value-type="string">
            <text:p>['Resident Evil 3 - Nemesis', '2019-10-21', '5:08', 'Cory, Dave', '2DW2sExl3yQ', ''],</text:p>
          </table:table-cell>
        </table:table-row>
        <table:table-row table:style-name="ro1">
          <table:table-cell office:value-type="string" calcext:value-type="string">
            <text:p>Resident Evil 3 Remake</text:p>
          </table:table-cell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1:15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WJHh-NY33_M</text:p>
          </table:table-cell>
          <table:table-cell/>
          <table:table-cell table:formula="of:=&quot;['&quot; &amp; [.A401] &amp; &quot;', '&quot; &amp; YEAR([.B401]) &amp; &quot;-&quot; &amp; MONTH([.B401]) &amp; &quot;-&quot; &amp; DAY([.B401]) &amp; &quot;', '&quot; &amp; [.C401] &amp; &quot;', '&quot; &amp; [.D401] &amp; &quot;', '&quot; &amp; [.E401] &amp; &quot;', '&quot; &amp; [.F401] &amp; &quot;'],&quot;" office:value-type="string" office:string-value="['Resident Evil 3 Remake', '2020-4-9', '1:15', 'Zach, Lyle, Tomar', 'WJHh-NY33_M', '']," calcext:value-type="string">
            <text:p>['Resident Evil 3 Remake', '2020-4-9', '1:15', 'Zach, Lyle, Tomar', 'WJHh-NY33_M', ''],</text:p>
          </table:table-cell>
        </table:table-row>
        <table:table-row table:style-name="ro1">
          <table:table-cell office:value-type="string" calcext:value-type="string">
            <text:p>Resident Evil 4</text:p>
          </table:table-cell>
          <table:table-cell office:value-type="date" office:date-value="2017-03-23" calcext:value-type="date">
            <text:p>2017-03-23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89z4tfG3cc</text:p>
          </table:table-cell>
          <table:table-cell/>
          <table:table-cell table:formula="of:=&quot;['&quot; &amp; [.A402] &amp; &quot;', '&quot; &amp; YEAR([.B402]) &amp; &quot;-&quot; &amp; MONTH([.B402]) &amp; &quot;-&quot; &amp; DAY([.B402]) &amp; &quot;', '&quot; &amp; [.C402] &amp; &quot;', '&quot; &amp; [.D402] &amp; &quot;', '&quot; &amp; [.E402] &amp; &quot;', '&quot; &amp; [.F402] &amp; &quot;'],&quot;" office:value-type="string" office:string-value="['Resident Evil 4', '2017-3-23', '8:58', 'Dingdong, Julian', 'C89z4tfG3cc', '']," calcext:value-type="string">
            <text:p>['Resident Evil 4', '2017-3-23', '8:58', 'Dingdong, Julian', 'C89z4tfG3cc', ''],</text:p>
          </table:table-cell>
        </table:table-row>
        <table:table-row table:style-name="ro1">
          <table:table-cell office:value-type="string" calcext:value-type="string">
            <text:p>Resident Evil 4 (Stream)</text:p>
          </table:table-cell>
          <table:table-cell office:value-type="date" office:date-value="2018-11-05" calcext:value-type="date">
            <text:p>2018-11-05</text:p>
          </table:table-cell>
          <table:table-cell office:value-type="string" calcext:value-type="string">
            <text:p>1:49</text:p>
          </table:table-cell>
          <table:table-cell office:value-type="string" calcext:value-type="string">
            <text:p>Dingdong, Waffle</text:p>
          </table:table-cell>
          <table:table-cell office:value-type="string" calcext:value-type="string">
            <text:p>1xXVLKI_btU</text:p>
          </table:table-cell>
          <table:table-cell/>
          <table:table-cell table:formula="of:=&quot;['&quot; &amp; [.A403] &amp; &quot;', '&quot; &amp; YEAR([.B403]) &amp; &quot;-&quot; &amp; MONTH([.B403]) &amp; &quot;-&quot; &amp; DAY([.B403]) &amp; &quot;', '&quot; &amp; [.C403] &amp; &quot;', '&quot; &amp; [.D403] &amp; &quot;', '&quot; &amp; [.E403] &amp; &quot;', '&quot; &amp; [.F403] &amp; &quot;'],&quot;" office:value-type="string" office:string-value="['Resident Evil 4 (Stream)', '2018-11-5', '1:49', 'Dingdong, Waffle', '1xXVLKI_btU', '']," calcext:value-type="string">
            <text:p>['Resident Evil 4 (Stream)', '2018-11-5', '1:49', 'Dingdong, Waffle', '1xXVLKI_btU', ''],</text:p>
          </table:table-cell>
        </table:table-row>
        <table:table-row table:style-name="ro1">
          <table:table-cell office:value-type="string" calcext:value-type="string">
            <text:p>Resident Evil 4 Remake</text:p>
          </table:table-cell>
          <table:table-cell office:value-type="date" office:date-value="2023-03-26" calcext:value-type="date">
            <text:p>2023-03-26</text:p>
          </table:table-cell>
          <table:table-cell office:value-type="string" calcext:value-type="string">
            <text:p>1:45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a0xQYzbHjcM</text:p>
          </table:table-cell>
          <table:table-cell/>
          <table:table-cell table:formula="of:=&quot;['&quot; &amp; [.A404] &amp; &quot;', '&quot; &amp; YEAR([.B404]) &amp; &quot;-&quot; &amp; MONTH([.B404]) &amp; &quot;-&quot; &amp; DAY([.B404]) &amp; &quot;', '&quot; &amp; [.C404] &amp; &quot;', '&quot; &amp; [.D404] &amp; &quot;', '&quot; &amp; [.E404] &amp; &quot;', '&quot; &amp; [.F404] &amp; &quot;'],&quot;" office:value-type="string" office:string-value="['Resident Evil 4 Remake', '2023-3-26', '1:45', 'Adam, Lyle', 'a0xQYzbHjcM', '']," calcext:value-type="string">
            <text:p>['Resident Evil 4 Remake', '2023-3-26', '1:45', 'Adam, Lyle', 'a0xQYzbHjcM', ''],</text:p>
          </table:table-cell>
        </table:table-row>
        <table:table-row table:style-name="ro1">
          <table:table-cell office:value-type="string" calcext:value-type="string">
            <text:p>Resident Evil 5</text:p>
          </table:table-cell>
          <table:table-cell office:value-type="date" office:date-value="2017-10-27" calcext:value-type="date">
            <text:p>2017-10-27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uDCj4GTQ_UA</text:p>
          </table:table-cell>
          <table:table-cell/>
          <table:table-cell table:formula="of:=&quot;['&quot; &amp; [.A405] &amp; &quot;', '&quot; &amp; YEAR([.B405]) &amp; &quot;-&quot; &amp; MONTH([.B405]) &amp; &quot;-&quot; &amp; DAY([.B405]) &amp; &quot;', '&quot; &amp; [.C405] &amp; &quot;', '&quot; &amp; [.D405] &amp; &quot;', '&quot; &amp; [.E405] &amp; &quot;', '&quot; &amp; [.F405] &amp; &quot;'],&quot;" office:value-type="string" office:string-value="['Resident Evil 5', '2017-10-27', '0:43', 'Lyle', 'uDCj4GTQ_UA', '']," calcext:value-type="string">
            <text:p>['Resident Evil 5', '2017-10-27', '0:43', 'Lyle', 'uDCj4GTQ_UA', ''],</text:p>
          </table:table-cell>
        </table:table-row>
        <table:table-row table:style-name="ro1">
          <table:table-cell office:value-type="string" calcext:value-type="string">
            <text:p>Resident Evil 6</text:p>
          </table:table-cell>
          <table:table-cell office:value-type="date" office:date-value="2023-05-14" calcext:value-type="date">
            <text:p>2023-05-14</text:p>
          </table:table-cell>
          <table:table-cell office:value-type="string" calcext:value-type="string">
            <text:p>1:0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DPl1c8GGBs</text:p>
          </table:table-cell>
          <table:table-cell/>
          <table:table-cell table:formula="of:=&quot;['&quot; &amp; [.A406] &amp; &quot;', '&quot; &amp; YEAR([.B406]) &amp; &quot;-&quot; &amp; MONTH([.B406]) &amp; &quot;-&quot; &amp; DAY([.B406]) &amp; &quot;', '&quot; &amp; [.C406] &amp; &quot;', '&quot; &amp; [.D406] &amp; &quot;', '&quot; &amp; [.E406] &amp; &quot;', '&quot; &amp; [.F406] &amp; &quot;'],&quot;" office:value-type="string" office:string-value="['Resident Evil 6', '2023-5-14', '1:02', 'Lyle, Tomar', 'oDPl1c8GGBs', '']," calcext:value-type="string">
            <text:p>['Resident Evil 6', '2023-5-14', '1:02', 'Lyle, Tomar', 'oDPl1c8GGBs', ''],</text:p>
          </table:table-cell>
        </table:table-row>
        <table:table-row table:style-name="ro1">
          <table:table-cell office:value-type="string" calcext:value-type="string">
            <text:p>Resident Evil 7 VR</text:p>
          </table:table-cell>
          <table:table-cell office:value-type="date" office:date-value="2017-01-30" calcext:value-type="date">
            <text:p>2017-01-30</text:p>
          </table:table-cell>
          <table:table-cell office:value-type="string" calcext:value-type="string">
            <text:p>1:56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WjPYuipVe7Y</text:p>
          </table:table-cell>
          <table:table-cell/>
          <table:table-cell table:formula="of:=&quot;['&quot; &amp; [.A407] &amp; &quot;', '&quot; &amp; YEAR([.B407]) &amp; &quot;-&quot; &amp; MONTH([.B407]) &amp; &quot;-&quot; &amp; DAY([.B407]) &amp; &quot;', '&quot; &amp; [.C407] &amp; &quot;', '&quot; &amp; [.D407] &amp; &quot;', '&quot; &amp; [.E407] &amp; &quot;', '&quot; &amp; [.F407] &amp; &quot;'],&quot;" office:value-type="string" office:string-value="['Resident Evil 7 VR', '2017-1-30', '1:56', 'Dingdong, Julian', 'WjPYuipVe7Y', '']," calcext:value-type="string">
            <text:p>['Resident Evil 7 VR', '2017-1-30', '1:56', 'Dingdong, Julian', 'WjPYuipVe7Y', ''],</text:p>
          </table:table-cell>
        </table:table-row>
        <table:table-row table:style-name="ro1">
          <table:table-cell office:value-type="string" calcext:value-type="string">
            <text:p>Resident Evil 8 Village</text:p>
          </table:table-cell>
          <table:table-cell office:value-type="date" office:date-value="2021-06-14" calcext:value-type="date">
            <text:p>2021-06-14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fU4ssszN-SQ</text:p>
          </table:table-cell>
          <table:table-cell/>
          <table:table-cell table:formula="of:=&quot;['&quot; &amp; [.A408] &amp; &quot;', '&quot; &amp; YEAR([.B408]) &amp; &quot;-&quot; &amp; MONTH([.B408]) &amp; &quot;-&quot; &amp; DAY([.B408]) &amp; &quot;', '&quot; &amp; [.C408] &amp; &quot;', '&quot; &amp; [.D408] &amp; &quot;', '&quot; &amp; [.E408] &amp; &quot;', '&quot; &amp; [.F408] &amp; &quot;'],&quot;" office:value-type="string" office:string-value="['Resident Evil 8 Village', '2021-6-14', '7:39', 'Lyle, Tomar', 'fU4ssszN-SQ', '']," calcext:value-type="string">
            <text:p>['Resident Evil 8 Village', '2021-6-14', '7:39', 'Lyle, Tomar', 'fU4ssszN-SQ', ''],</text:p>
          </table:table-cell>
        </table:table-row>
        <table:table-row table:style-name="ro1">
          <table:table-cell office:value-type="string" calcext:value-type="string">
            <text:p>Resident Evil Revelations</text:p>
          </table:table-cell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3:35</text:p>
          </table:table-cell>
          <table:table-cell office:value-type="string" calcext:value-type="string">
            <text:p>Dave, Lyle</text:p>
          </table:table-cell>
          <table:table-cell office:value-type="string" calcext:value-type="string">
            <text:p>9YXbwEvS4oc</text:p>
          </table:table-cell>
          <table:table-cell/>
          <table:table-cell table:formula="of:=&quot;['&quot; &amp; [.A409] &amp; &quot;', '&quot; &amp; YEAR([.B409]) &amp; &quot;-&quot; &amp; MONTH([.B409]) &amp; &quot;-&quot; &amp; DAY([.B409]) &amp; &quot;', '&quot; &amp; [.C409] &amp; &quot;', '&quot; &amp; [.D409] &amp; &quot;', '&quot; &amp; [.E409] &amp; &quot;', '&quot; &amp; [.F409] &amp; &quot;'],&quot;" office:value-type="string" office:string-value="['Resident Evil Revelations', '2022-8-22', '3:35', 'Dave, Lyle', '9YXbwEvS4oc', '']," calcext:value-type="string">
            <text:p>['Resident Evil Revelations', '2022-8-22', '3:35', 'Dave, Lyle', '9YXbwEvS4oc', ''],</text:p>
          </table:table-cell>
        </table:table-row>
        <table:table-row table:style-name="ro1">
          <table:table-cell office:value-type="string" calcext:value-type="string">
            <text:p>Revenge Of Shinobi</text:p>
          </table:table-cell>
          <table:table-cell office:value-type="date" office:date-value="2019-11-19" calcext:value-type="date">
            <text:p>2019-11-19</text:p>
          </table:table-cell>
          <table:table-cell office:value-type="string" calcext:value-type="string">
            <text:p>0:36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R_A_PDWp6Fs</text:p>
          </table:table-cell>
          <table:table-cell/>
          <table:table-cell table:formula="of:=&quot;['&quot; &amp; [.A410] &amp; &quot;', '&quot; &amp; YEAR([.B410]) &amp; &quot;-&quot; &amp; MONTH([.B410]) &amp; &quot;-&quot; &amp; DAY([.B410]) &amp; &quot;', '&quot; &amp; [.C410] &amp; &quot;', '&quot; &amp; [.D410] &amp; &quot;', '&quot; &amp; [.E410] &amp; &quot;', '&quot; &amp; [.F410] &amp; &quot;'],&quot;" office:value-type="string" office:string-value="['Revenge Of Shinobi', '2019-11-19', '0:36', 'Cory, Dave', 'R_A_PDWp6Fs', '']," calcext:value-type="string">
            <text:p>['Revenge Of Shinobi', '2019-11-19', '0:36', 'Cory, Dave', 'R_A_PDWp6Fs', ''],</text:p>
          </table:table-cell>
        </table:table-row>
        <table:table-row table:style-name="ro1">
          <table:table-cell office:value-type="string" calcext:value-type="string">
            <text:p>Revolution 60</text:p>
          </table:table-cell>
          <table:table-cell office:value-type="date" office:date-value="2016-09-19" calcext:value-type="date">
            <text:p>2016-09-19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Dingdong, Cory</text:p>
          </table:table-cell>
          <table:table-cell office:value-type="string" calcext:value-type="string">
            <text:p>wX4kxGdwmdM</text:p>
          </table:table-cell>
          <table:table-cell/>
          <table:table-cell table:formula="of:=&quot;['&quot; &amp; [.A411] &amp; &quot;', '&quot; &amp; YEAR([.B411]) &amp; &quot;-&quot; &amp; MONTH([.B411]) &amp; &quot;-&quot; &amp; DAY([.B411]) &amp; &quot;', '&quot; &amp; [.C411] &amp; &quot;', '&quot; &amp; [.D411] &amp; &quot;', '&quot; &amp; [.E411] &amp; &quot;', '&quot; &amp; [.F411] &amp; &quot;'],&quot;" office:value-type="string" office:string-value="['Revolution 60', '2016-9-19', '1:09', 'Dingdong, Cory', 'wX4kxGdwmdM', '']," calcext:value-type="string">
            <text:p>['Revolution 60', '2016-9-19', '1:09', 'Dingdong, Cory', 'wX4kxGdwmdM', ''],</text:p>
          </table:table-cell>
        </table:table-row>
        <table:table-row table:style-name="ro1">
          <table:table-cell office:value-type="string" calcext:value-type="string">
            <text:p>Risk Of Rain 2</text:p>
          </table:table-cell>
          <table:table-cell office:value-type="date" office:date-value="2021-01-14" calcext:value-type="date">
            <text:p>2021-01-14</text:p>
          </table:table-cell>
          <table:table-cell office:value-type="string" calcext:value-type="string">
            <text:p>0:44</text:p>
          </table:table-cell>
          <table:table-cell office:value-type="string" calcext:value-type="string">
            <text:p>Lyle, Tomar, Sonny</text:p>
          </table:table-cell>
          <table:table-cell office:value-type="string" calcext:value-type="string">
            <text:p>5DtYnWv5BNk</text:p>
          </table:table-cell>
          <table:table-cell/>
          <table:table-cell table:formula="of:=&quot;['&quot; &amp; [.A412] &amp; &quot;', '&quot; &amp; YEAR([.B412]) &amp; &quot;-&quot; &amp; MONTH([.B412]) &amp; &quot;-&quot; &amp; DAY([.B412]) &amp; &quot;', '&quot; &amp; [.C412] &amp; &quot;', '&quot; &amp; [.D412] &amp; &quot;', '&quot; &amp; [.E412] &amp; &quot;', '&quot; &amp; [.F412] &amp; &quot;'],&quot;" office:value-type="string" office:string-value="['Risk Of Rain 2', '2021-1-14', '0:44', 'Lyle, Tomar, Sonny', '5DtYnWv5BNk', '']," calcext:value-type="string">
            <text:p>['Risk Of Rain 2', '2021-1-14', '0:44', 'Lyle, Tomar, Sonny', '5DtYnWv5BNk', ''],</text:p>
          </table:table-cell>
        </table:table-row>
        <table:table-row table:style-name="ro1">
          <table:table-cell office:value-type="string" calcext:value-type="string">
            <text:p>Roblox Games</text:p>
          </table:table-cell>
          <table:table-cell office:value-type="date" office:date-value="2023-11-15" calcext:value-type="date">
            <text:p>2023-11-15</text:p>
          </table:table-cell>
          <table:table-cell office:value-type="string" calcext:value-type="string">
            <text:p>1:43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KnbWRMnEI-Y</text:p>
          </table:table-cell>
          <table:table-cell/>
          <table:table-cell table:formula="of:=&quot;['&quot; &amp; [.A413] &amp; &quot;', '&quot; &amp; YEAR([.B413]) &amp; &quot;-&quot; &amp; MONTH([.B413]) &amp; &quot;-&quot; &amp; DAY([.B413]) &amp; &quot;', '&quot; &amp; [.C413] &amp; &quot;', '&quot; &amp; [.D413] &amp; &quot;', '&quot; &amp; [.E413] &amp; &quot;', '&quot; &amp; [.F413] &amp; &quot;'],&quot;" office:value-type="string" office:string-value="['Roblox Games', '2023-11-15', '1:43', 'Dave, Cory', 'KnbWRMnEI-Y', '']," calcext:value-type="string">
            <text:p>['Roblox Games', '2023-11-15', '1:43', 'Dave, Cory', 'KnbWRMnEI-Y', ''],</text:p>
          </table:table-cell>
        </table:table-row>
        <table:table-row table:style-name="ro1">
          <table:table-cell office:value-type="string" calcext:value-type="string">
            <text:p>Roblox Halloween</text:p>
          </table:table-cell>
          <table:table-cell office:value-type="date" office:date-value="2024-10-31" calcext:value-type="date">
            <text:p>2024-10-31</text:p>
          </table:table-cell>
          <table:table-cell office:value-type="string" calcext:value-type="string">
            <text:p>0:37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4uWBt9bCmPA</text:p>
          </table:table-cell>
          <table:table-cell/>
          <table:table-cell table:formula="of:=&quot;['&quot; &amp; [.A414] &amp; &quot;', '&quot; &amp; YEAR([.B414]) &amp; &quot;-&quot; &amp; MONTH([.B414]) &amp; &quot;-&quot; &amp; DAY([.B414]) &amp; &quot;', '&quot; &amp; [.C414] &amp; &quot;', '&quot; &amp; [.D414] &amp; &quot;', '&quot; &amp; [.E414] &amp; &quot;', '&quot; &amp; [.F414] &amp; &quot;'],&quot;" office:value-type="string" office:string-value="['Roblox Halloween', '2024-10-31', '0:37', 'Cory, Dave', '4uWBt9bCmPA', '']," calcext:value-type="string">
            <text:p>['Roblox Halloween', '2024-10-31', '0:37', 'Cory, Dave', '4uWBt9bCmPA', ''],</text:p>
          </table:table-cell>
        </table:table-row>
        <table:table-row table:style-name="ro1">
          <table:table-cell office:value-type="string" calcext:value-type="string">
            <text:p>Robocop - Rogue City</text:p>
          </table:table-cell>
          <table:table-cell office:value-type="date" office:date-value="2023-12-09" calcext:value-type="date">
            <text:p>2023-12-09</text:p>
          </table:table-cell>
          <table:table-cell office:value-type="string" calcext:value-type="string">
            <text:p>1:08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wjVTYhPpi1s</text:p>
          </table:table-cell>
          <table:table-cell/>
          <table:table-cell table:formula="of:=&quot;['&quot; &amp; [.A415] &amp; &quot;', '&quot; &amp; YEAR([.B415]) &amp; &quot;-&quot; &amp; MONTH([.B415]) &amp; &quot;-&quot; &amp; DAY([.B415]) &amp; &quot;', '&quot; &amp; [.C415] &amp; &quot;', '&quot; &amp; [.D415] &amp; &quot;', '&quot; &amp; [.E415] &amp; &quot;', '&quot; &amp; [.F415] &amp; &quot;'],&quot;" office:value-type="string" office:string-value="['Robocop - Rogue City', '2023-12-9', '1:08', 'Zach, Lyle, Tomar', 'wjVTYhPpi1s', '']," calcext:value-type="string">
            <text:p>['Robocop - Rogue City', '2023-12-9', '1:08', 'Zach, Lyle, Tomar', 'wjVTYhPpi1s', ''],</text:p>
          </table:table-cell>
        </table:table-row>
        <table:table-row table:style-name="ro1">
          <table:table-cell office:value-type="string" calcext:value-type="string">
            <text:p>Rocket Power</text:p>
          </table:table-cell>
          <table:table-cell office:value-type="date" office:date-value="2017-07-12" calcext:value-type="date">
            <text:p>2017-07-12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pZhf6d6MY00</text:p>
          </table:table-cell>
          <table:table-cell/>
          <table:table-cell table:formula="of:=&quot;['&quot; &amp; [.A416] &amp; &quot;', '&quot; &amp; YEAR([.B416]) &amp; &quot;-&quot; &amp; MONTH([.B416]) &amp; &quot;-&quot; &amp; DAY([.B416]) &amp; &quot;', '&quot; &amp; [.C416] &amp; &quot;', '&quot; &amp; [.D416] &amp; &quot;', '&quot; &amp; [.E416] &amp; &quot;', '&quot; &amp; [.F416] &amp; &quot;'],&quot;" office:value-type="string" office:string-value="['Rocket Power', '2017-7-12', '0:10', 'Dingdong, Julian', 'pZhf6d6MY00', '']," calcext:value-type="string">
            <text:p>['Rocket Power', '2017-7-12', '0:10', 'Dingdong, Julian', 'pZhf6d6MY00', ''],</text:p>
          </table:table-cell>
        </table:table-row>
        <table:table-row table:style-name="ro1">
          <table:table-cell office:value-type="string" calcext:value-type="string">
            <text:p>Rodent's Revenge</text:p>
          </table:table-cell>
          <table:table-cell office:value-type="date" office:date-value="2021-11-14" calcext:value-type="date">
            <text:p>2021-11-14</text:p>
          </table:table-cell>
          <table:table-cell office:value-type="string" calcext:value-type="string">
            <text:p>0:14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7BiA6m3u4TY</text:p>
          </table:table-cell>
          <table:table-cell/>
          <table:table-cell table:formula="of:=&quot;['&quot; &amp; [.A417] &amp; &quot;', '&quot; &amp; YEAR([.B417]) &amp; &quot;-&quot; &amp; MONTH([.B417]) &amp; &quot;-&quot; &amp; DAY([.B417]) &amp; &quot;', '&quot; &amp; [.C417] &amp; &quot;', '&quot; &amp; [.D417] &amp; &quot;', '&quot; &amp; [.E417] &amp; &quot;', '&quot; &amp; [.F417] &amp; &quot;'],&quot;" office:value-type="string" office:string-value="['Rodent's Revenge', '2021-11-14', '0:14', 'Adam, Tomar', '7BiA6m3u4TY', '']," calcext:value-type="string">
            <text:p>['Rodent's Revenge', '2021-11-14', '0:14', 'Adam, Tomar', '7BiA6m3u4TY', ''],</text:p>
          </table:table-cell>
        </table:table-row>
        <table:table-row table:style-name="ro1">
          <table:table-cell office:value-type="string" calcext:value-type="string">
            <text:p>Rogue Legacy</text:p>
          </table:table-cell>
          <table:table-cell office:value-type="date" office:date-value="2024-08-05" calcext:value-type="date">
            <text:p>2024-08-05</text:p>
          </table:table-cell>
          <table:table-cell office:value-type="string" calcext:value-type="string">
            <text:p>1:39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NhPAi8k6lug</text:p>
          </table:table-cell>
          <table:table-cell/>
          <table:table-cell table:formula="of:=&quot;['&quot; &amp; [.A418] &amp; &quot;', '&quot; &amp; YEAR([.B418]) &amp; &quot;-&quot; &amp; MONTH([.B418]) &amp; &quot;-&quot; &amp; DAY([.B418]) &amp; &quot;', '&quot; &amp; [.C418] &amp; &quot;', '&quot; &amp; [.D418] &amp; &quot;', '&quot; &amp; [.E418] &amp; &quot;', '&quot; &amp; [.F418] &amp; &quot;'],&quot;" office:value-type="string" office:string-value="['Rogue Legacy', '2024-8-5', '1:39', 'Cory, Tomar', 'NhPAi8k6lug', '']," calcext:value-type="string">
            <text:p>['Rogue Legacy', '2024-8-5', '1:39', 'Cory, Tomar', 'NhPAi8k6lug', ''],</text:p>
          </table:table-cell>
        </table:table-row>
        <table:table-row table:style-name="ro1">
          <table:table-cell office:value-type="string" calcext:value-type="string">
            <text:p>Rugrats - Adventures In Gameland</text:p>
          </table:table-cell>
          <table:table-cell office:value-type="date" office:date-value="2024-12-13" calcext:value-type="date">
            <text:p>2024-12-13</text:p>
          </table:table-cell>
          <table:table-cell office:value-type="string" calcext:value-type="string">
            <text:p>0:37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v1QyrOeACf0</text:p>
          </table:table-cell>
          <table:table-cell/>
          <table:table-cell table:formula="of:=&quot;['&quot; &amp; [.A419] &amp; &quot;', '&quot; &amp; YEAR([.B419]) &amp; &quot;-&quot; &amp; MONTH([.B419]) &amp; &quot;-&quot; &amp; DAY([.B419]) &amp; &quot;', '&quot; &amp; [.C419] &amp; &quot;', '&quot; &amp; [.D419] &amp; &quot;', '&quot; &amp; [.E419] &amp; &quot;', '&quot; &amp; [.F419] &amp; &quot;'],&quot;" office:value-type="string" office:string-value="['Rugrats - Adventures In Gameland', '2024-12-13', '0:37', 'Cory, Lyle', 'v1QyrOeACf0', '']," calcext:value-type="string">
            <text:p>['Rugrats - Adventures In Gameland', '2024-12-13', '0:37', 'Cory, Lyle', 'v1QyrOeACf0', ''],</text:p>
          </table:table-cell>
        </table:table-row>
        <table:table-row table:style-name="ro1">
          <table:table-cell office:value-type="string" calcext:value-type="string">
            <text:p>Rugrats - Search For Reptar (2014)</text:p>
          </table:table-cell>
          <table:table-cell office:value-type="date" office:date-value="2014-09-22" calcext:value-type="date">
            <text:p>2014-09-22</text:p>
          </table:table-cell>
          <table:table-cell office:value-type="string" calcext:value-type="string">
            <text:p>1:52</text:p>
          </table:table-cell>
          <table:table-cell office:value-type="string" calcext:value-type="string">
            <text:p>Cory, Niall</text:p>
          </table:table-cell>
          <table:table-cell office:value-type="string" calcext:value-type="string">
            <text:p>3uowfnbQndM</text:p>
          </table:table-cell>
          <table:table-cell/>
          <table:table-cell table:formula="of:=&quot;['&quot; &amp; [.A420] &amp; &quot;', '&quot; &amp; YEAR([.B420]) &amp; &quot;-&quot; &amp; MONTH([.B420]) &amp; &quot;-&quot; &amp; DAY([.B420]) &amp; &quot;', '&quot; &amp; [.C420] &amp; &quot;', '&quot; &amp; [.D420] &amp; &quot;', '&quot; &amp; [.E420] &amp; &quot;', '&quot; &amp; [.F420] &amp; &quot;'],&quot;" office:value-type="string" office:string-value="['Rugrats - Search For Reptar (2014)', '2014-9-22', '1:52', 'Cory, Niall', '3uowfnbQndM', '']," calcext:value-type="string">
            <text:p>['Rugrats - Search For Reptar (2014)', '2014-9-22', '1:52', 'Cory, Niall', '3uowfnbQndM', ''],</text:p>
          </table:table-cell>
        </table:table-row>
        <table:table-row table:style-name="ro1">
          <table:table-cell office:value-type="string" calcext:value-type="string">
            <text:p>Rugrats Search For Reptar (2017)</text:p>
          </table:table-cell>
          <table:table-cell office:value-type="date" office:date-value="2017-09-16" calcext:value-type="date">
            <text:p>2017-09-16</text:p>
          </table:table-cell>
          <table:table-cell office:value-type="string" calcext:value-type="string">
            <text:p>1:4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e_W8Xjztoc</text:p>
          </table:table-cell>
          <table:table-cell/>
          <table:table-cell table:formula="of:=&quot;['&quot; &amp; [.A421] &amp; &quot;', '&quot; &amp; YEAR([.B421]) &amp; &quot;-&quot; &amp; MONTH([.B421]) &amp; &quot;-&quot; &amp; DAY([.B421]) &amp; &quot;', '&quot; &amp; [.C421] &amp; &quot;', '&quot; &amp; [.D421] &amp; &quot;', '&quot; &amp; [.E421] &amp; &quot;', '&quot; &amp; [.F421] &amp; &quot;'],&quot;" office:value-type="string" office:string-value="['Rugrats Search For Reptar (2017)', '2017-9-16', '1:47', 'Dingdong, Julian', 'He_W8Xjztoc', '']," calcext:value-type="string">
            <text:p>['Rugrats Search For Reptar (2017)', '2017-9-16', '1:47', 'Dingdong, Julian', 'He_W8Xjztoc', ''],</text:p>
          </table:table-cell>
        </table:table-row>
        <table:table-row table:style-name="ro1">
          <table:table-cell office:value-type="string" calcext:value-type="string">
            <text:p>Rugrats Studio Tour</text:p>
          </table:table-cell>
          <table:table-cell office:value-type="date" office:date-value="2017-02-21" calcext:value-type="date">
            <text:p>2017-02-21</text:p>
          </table:table-cell>
          <table:table-cell office:value-type="string" calcext:value-type="string">
            <text:p>0:5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dXXfKWrvud8</text:p>
          </table:table-cell>
          <table:table-cell/>
          <table:table-cell table:formula="of:=&quot;['&quot; &amp; [.A422] &amp; &quot;', '&quot; &amp; YEAR([.B422]) &amp; &quot;-&quot; &amp; MONTH([.B422]) &amp; &quot;-&quot; &amp; DAY([.B422]) &amp; &quot;', '&quot; &amp; [.C422] &amp; &quot;', '&quot; &amp; [.D422] &amp; &quot;', '&quot; &amp; [.E422] &amp; &quot;', '&quot; &amp; [.F422] &amp; &quot;'],&quot;" office:value-type="string" office:string-value="['Rugrats Studio Tour', '2017-2-21', '0:57', 'Dingdong, Julian', 'dXXfKWrvud8', '']," calcext:value-type="string">
            <text:p>['Rugrats Studio Tour', '2017-2-21', '0:57', 'Dingdong, Julian', 'dXXfKWrvud8', ''],</text:p>
          </table:table-cell>
        </table:table-row>
        <table:table-row table:style-name="ro1">
          <table:table-cell office:value-type="string" calcext:value-type="string">
            <text:p>Runescape</text:p>
          </table:table-cell>
          <table:table-cell office:value-type="date" office:date-value="2021-09-19" calcext:value-type="date">
            <text:p>2021-09-19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imrTSVdvac</text:p>
          </table:table-cell>
          <table:table-cell/>
          <table:table-cell table:formula="of:=&quot;['&quot; &amp; [.A423] &amp; &quot;', '&quot; &amp; YEAR([.B423]) &amp; &quot;-&quot; &amp; MONTH([.B423]) &amp; &quot;-&quot; &amp; DAY([.B423]) &amp; &quot;', '&quot; &amp; [.C423] &amp; &quot;', '&quot; &amp; [.D423] &amp; &quot;', '&quot; &amp; [.E423] &amp; &quot;', '&quot; &amp; [.F423] &amp; &quot;'],&quot;" office:value-type="string" office:string-value="['Runescape', '2021-9-19', '1:01', 'Adam', 'RimrTSVdvac', '']," calcext:value-type="string">
            <text:p>['Runescape', '2021-9-19', '1:01', 'Adam', 'RimrTSVdvac', ''],</text:p>
          </table:table-cell>
        </table:table-row>
        <table:table-row table:style-name="ro1">
          <table:table-cell office:value-type="string" calcext:value-type="string">
            <text:p>Sackboy - A Big Adventure</text:p>
          </table:table-cell>
          <table:table-cell office:value-type="date" office:date-value="2020-12-02" calcext:value-type="date">
            <text:p>2020-12-02</text:p>
          </table:table-cell>
          <table:table-cell office:value-type="string" calcext:value-type="string">
            <text:p>0:4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dd9wyGDiYc0</text:p>
          </table:table-cell>
          <table:table-cell/>
          <table:table-cell table:formula="of:=&quot;['&quot; &amp; [.A424] &amp; &quot;', '&quot; &amp; YEAR([.B424]) &amp; &quot;-&quot; &amp; MONTH([.B424]) &amp; &quot;-&quot; &amp; DAY([.B424]) &amp; &quot;', '&quot; &amp; [.C424] &amp; &quot;', '&quot; &amp; [.D424] &amp; &quot;', '&quot; &amp; [.E424] &amp; &quot;', '&quot; &amp; [.F424] &amp; &quot;'],&quot;" office:value-type="string" office:string-value="['Sackboy - A Big Adventure', '2020-12-2', '0:42', 'Lyle, Tomar', 'dd9wyGDiYc0', '']," calcext:value-type="string">
            <text:p>['Sackboy - A Big Adventure', '2020-12-2', '0:42', 'Lyle, Tomar', 'dd9wyGDiYc0', ''],</text:p>
          </table:table-cell>
        </table:table-row>
        <table:table-row table:style-name="ro1">
          <table:table-cell office:value-type="string" calcext:value-type="string">
            <text:p>Samurai Jack - Battle Through Time</text:p>
          </table:table-cell>
          <table:table-cell office:value-type="date" office:date-value="2020-08-25" calcext:value-type="date">
            <text:p>2020-08-25</text:p>
          </table:table-cell>
          <table:table-cell office:value-type="string" calcext:value-type="string">
            <text:p>1:50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P8rbmiywvxE</text:p>
          </table:table-cell>
          <table:table-cell/>
          <table:table-cell table:formula="of:=&quot;['&quot; &amp; [.A425] &amp; &quot;', '&quot; &amp; YEAR([.B425]) &amp; &quot;-&quot; &amp; MONTH([.B425]) &amp; &quot;-&quot; &amp; DAY([.B425]) &amp; &quot;', '&quot; &amp; [.C425] &amp; &quot;', '&quot; &amp; [.D425] &amp; &quot;', '&quot; &amp; [.E425] &amp; &quot;', '&quot; &amp; [.F425] &amp; &quot;'],&quot;" office:value-type="string" office:string-value="['Samurai Jack - Battle Through Time', '2020-8-25', '1:50', 'Zach, Lyle', 'P8rbmiywvxE', '']," calcext:value-type="string">
            <text:p>['Samurai Jack - Battle Through Time', '2020-8-25', '1:50', 'Zach, Lyle', 'P8rbmiywvxE', ''],</text:p>
          </table:table-cell>
        </table:table-row>
        <table:table-row table:style-name="ro1">
          <table:table-cell office:value-type="string" calcext:value-type="string">
            <text:p>Santa's Vacation</text:p>
          </table:table-cell>
          <table:table-cell office:value-type="date" office:date-value="2018-12-24" calcext:value-type="date">
            <text:p>2018-12-24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U6yBlZ0mbm0</text:p>
          </table:table-cell>
          <table:table-cell/>
          <table:table-cell table:formula="of:=&quot;['&quot; &amp; [.A426] &amp; &quot;', '&quot; &amp; YEAR([.B426]) &amp; &quot;-&quot; &amp; MONTH([.B426]) &amp; &quot;-&quot; &amp; DAY([.B426]) &amp; &quot;', '&quot; &amp; [.C426] &amp; &quot;', '&quot; &amp; [.D426] &amp; &quot;', '&quot; &amp; [.E426] &amp; &quot;', '&quot; &amp; [.F426] &amp; &quot;'],&quot;" office:value-type="string" office:string-value="['Santa's Vacation', '2018-12-24', '0:11', 'Dingdong, Julian', 'U6yBlZ0mbm0', '']," calcext:value-type="string">
            <text:p>['Santa's Vacation', '2018-12-24', '0:11', 'Dingdong, Julian', 'U6yBlZ0mbm0', ''],</text:p>
          </table:table-cell>
        </table:table-row>
        <table:table-row table:style-name="ro1">
          <table:table-cell office:value-type="string" calcext:value-type="string">
            <text:p>Scary + Weird Itch.Io + Gamejolt Games</text:p>
          </table:table-cell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2:34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Lny5xDa7D4I</text:p>
          </table:table-cell>
          <table:table-cell/>
          <table:table-cell table:formula="of:=&quot;['&quot; &amp; [.A427] &amp; &quot;', '&quot; &amp; YEAR([.B427]) &amp; &quot;-&quot; &amp; MONTH([.B427]) &amp; &quot;-&quot; &amp; DAY([.B427]) &amp; &quot;', '&quot; &amp; [.C427] &amp; &quot;', '&quot; &amp; [.D427] &amp; &quot;', '&quot; &amp; [.E427] &amp; &quot;', '&quot; &amp; [.F427] &amp; &quot;'],&quot;" office:value-type="string" office:string-value="['Scary + Weird Itch.Io + Gamejolt Games', '2019-5-23', '2:34', 'Zach, Lyle, Tomar', 'Lny5xDa7D4I', '']," calcext:value-type="string">
            <text:p>['Scary + Weird Itch.Io + Gamejolt Games', '2019-5-23', '2:34', 'Zach, Lyle, Tomar', 'Lny5xDa7D4I', ''],</text:p>
          </table:table-cell>
        </table:table-row>
        <table:table-row table:style-name="ro1">
          <table:table-cell office:value-type="string" calcext:value-type="string">
            <text:p>Scary Tales</text:p>
          </table:table-cell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1:16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z4LNDK718l0</text:p>
          </table:table-cell>
          <table:table-cell/>
          <table:table-cell table:formula="of:=&quot;['&quot; &amp; [.A428] &amp; &quot;', '&quot; &amp; YEAR([.B428]) &amp; &quot;-&quot; &amp; MONTH([.B428]) &amp; &quot;-&quot; &amp; DAY([.B428]) &amp; &quot;', '&quot; &amp; [.C428] &amp; &quot;', '&quot; &amp; [.D428] &amp; &quot;', '&quot; &amp; [.E428] &amp; &quot;', '&quot; &amp; [.F428] &amp; &quot;'],&quot;" office:value-type="string" office:string-value="['Scary Tales', '2022-10-21', '1:16', 'Cory, Tomar', 'z4LNDK718l0', '']," calcext:value-type="string">
            <text:p>['Scary Tales', '2022-10-21', '1:16', 'Cory, Tomar', 'z4LNDK718l0', ''],</text:p>
          </table:table-cell>
        </table:table-row>
        <table:table-row table:style-name="ro1">
          <table:table-cell office:value-type="string" calcext:value-type="string">
            <text:p>Scary Werewolves</text:p>
          </table:table-cell>
          <table:table-cell office:value-type="date" office:date-value="2021-02-15" calcext:value-type="date">
            <text:p>2021-02-15</text:p>
          </table:table-cell>
          <table:table-cell office:value-type="string" calcext:value-type="string">
            <text:p>0:3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YrgEaFyQh2s</text:p>
          </table:table-cell>
          <table:table-cell/>
          <table:table-cell table:formula="of:=&quot;['&quot; &amp; [.A429] &amp; &quot;', '&quot; &amp; YEAR([.B429]) &amp; &quot;-&quot; &amp; MONTH([.B429]) &amp; &quot;-&quot; &amp; DAY([.B429]) &amp; &quot;', '&quot; &amp; [.C429] &amp; &quot;', '&quot; &amp; [.D429] &amp; &quot;', '&quot; &amp; [.E429] &amp; &quot;', '&quot; &amp; [.F429] &amp; &quot;'],&quot;" office:value-type="string" office:string-value="['Scary Werewolves', '2021-2-15', '0:38', 'Lyle, Tomar', 'YrgEaFyQh2s', '']," calcext:value-type="string">
            <text:p>['Scary Werewolves', '2021-2-15', '0:38', 'Lyle, Tomar', 'YrgEaFyQh2s', ''],</text:p>
          </table:table-cell>
        </table:table-row>
        <table:table-row table:style-name="ro1">
          <table:table-cell office:value-type="string" calcext:value-type="string">
            <text:p>Schedule I</text:p>
          </table:table-cell>
          <table:table-cell office:value-type="date" office:date-value="2025-04-11" calcext:value-type="date">
            <text:p>2025-04-11</text:p>
          </table:table-cell>
          <table:table-cell office:value-type="string" calcext:value-type="string">
            <text:p>2:34</text:p>
          </table:table-cell>
          <table:table-cell office:value-type="string" calcext:value-type="string">
            <text:p>Lyle, Niall</text:p>
          </table:table-cell>
          <table:table-cell office:value-type="string" calcext:value-type="string">
            <text:p>WtRCkHFNPS0</text:p>
          </table:table-cell>
          <table:table-cell/>
          <table:table-cell table:formula="of:=&quot;['&quot; &amp; [.A430] &amp; &quot;', '&quot; &amp; YEAR([.B430]) &amp; &quot;-&quot; &amp; MONTH([.B430]) &amp; &quot;-&quot; &amp; DAY([.B430]) &amp; &quot;', '&quot; &amp; [.C430] &amp; &quot;', '&quot; &amp; [.D430] &amp; &quot;', '&quot; &amp; [.E430] &amp; &quot;', '&quot; &amp; [.F430] &amp; &quot;'],&quot;" office:value-type="string" office:string-value="['Schedule I', '2025-4-11', '2:34', 'Lyle, Niall', 'WtRCkHFNPS0', '']," calcext:value-type="string">
            <text:p>['Schedule I', '2025-4-11', '2:34', 'Lyle, Niall', 'WtRCkHFNPS0', ''],</text:p>
          </table:table-cell>
        </table:table-row>
        <table:table-row table:style-name="ro1">
          <table:table-cell office:value-type="string" calcext:value-type="string">
            <text:p>Scooby-Doo For Ps2</text:p>
          </table:table-cell>
          <table:table-cell office:value-type="date" office:date-value="2024-10-19" calcext:value-type="date">
            <text:p>2024-10-19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Zach, Adam, Niall</text:p>
          </table:table-cell>
          <table:table-cell office:value-type="string" calcext:value-type="string">
            <text:p>z5ATOwvxVMo</text:p>
          </table:table-cell>
          <table:table-cell/>
          <table:table-cell table:formula="of:=&quot;['&quot; &amp; [.A431] &amp; &quot;', '&quot; &amp; YEAR([.B431]) &amp; &quot;-&quot; &amp; MONTH([.B431]) &amp; &quot;-&quot; &amp; DAY([.B431]) &amp; &quot;', '&quot; &amp; [.C431] &amp; &quot;', '&quot; &amp; [.D431] &amp; &quot;', '&quot; &amp; [.E431] &amp; &quot;', '&quot; &amp; [.F431] &amp; &quot;'],&quot;" office:value-type="string" office:string-value="['Scooby-Doo For Ps2', '2024-10-19', '0:45', 'Zach, Adam, Niall', 'z5ATOwvxVMo', '']," calcext:value-type="string">
            <text:p>['Scooby-Doo For Ps2', '2024-10-19', '0:45', 'Zach, Adam, Niall', 'z5ATOwvxVMo', ''],</text:p>
          </table:table-cell>
        </table:table-row>
        <table:table-row table:style-name="ro1">
          <table:table-cell office:value-type="string" calcext:value-type="string">
            <text:p>Search For The Chupacabra, The</text:p>
          </table:table-cell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0:1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nF6Wcojj494</text:p>
          </table:table-cell>
          <table:table-cell/>
          <table:table-cell table:formula="of:=&quot;['&quot; &amp; [.A432] &amp; &quot;', '&quot; &amp; YEAR([.B432]) &amp; &quot;-&quot; &amp; MONTH([.B432]) &amp; &quot;-&quot; &amp; DAY([.B432]) &amp; &quot;', '&quot; &amp; [.C432] &amp; &quot;', '&quot; &amp; [.D432] &amp; &quot;', '&quot; &amp; [.E432] &amp; &quot;', '&quot; &amp; [.F432] &amp; &quot;'],&quot;" office:value-type="string" office:string-value="['Search For The Chupacabra, The', '2019-6-11', '0:17', 'Lyle, Tomar', 'nF6Wcojj494', '']," calcext:value-type="string">
            <text:p>['Search For The Chupacabra, The', '2019-6-11', '0:17', 'Lyle, Tomar', 'nF6Wcojj494', ''],</text:p>
          </table:table-cell>
        </table:table-row>
        <table:table-row table:style-name="ro1">
          <table:table-cell office:value-type="string" calcext:value-type="string">
            <text:p>Secret Agent Wizard Boy</text:p>
          </table:table-cell>
          <table:table-cell office:value-type="date" office:date-value="2025-07-07" calcext:value-type="date">
            <text:p>2025-07-07</text:p>
          </table:table-cell>
          <table:table-cell office:value-type="string" calcext:value-type="string">
            <text:p>1:30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8sY2zgjKglY</text:p>
          </table:table-cell>
          <table:table-cell/>
          <table:table-cell table:formula="of:=&quot;['&quot; &amp; [.A433] &amp; &quot;', '&quot; &amp; YEAR([.B433]) &amp; &quot;-&quot; &amp; MONTH([.B433]) &amp; &quot;-&quot; &amp; DAY([.B433]) &amp; &quot;', '&quot; &amp; [.C433] &amp; &quot;', '&quot; &amp; [.D433] &amp; &quot;', '&quot; &amp; [.E433] &amp; &quot;', '&quot; &amp; [.F433] &amp; &quot;'],&quot;" office:value-type="string" office:string-value="['Secret Agent Wizard Boy', '2025-7-7', '1:30', 'Lyle, Tomar', '8sY2zgjKglY', '']," calcext:value-type="string">
            <text:p>['Secret Agent Wizard Boy', '2025-7-7', '1:30', 'Lyle, Tomar', '8sY2zgjKglY', ''],</text:p>
          </table:table-cell>
        </table:table-row>
        <table:table-row table:style-name="ro1">
          <table:table-cell office:value-type="string" calcext:value-type="string">
            <text:p>Sekiro - Shadows Die Twice</text:p>
          </table:table-cell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1:31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lPoUyPUTxmU</text:p>
          </table:table-cell>
          <table:table-cell/>
          <table:table-cell table:formula="of:=&quot;['&quot; &amp; [.A434] &amp; &quot;', '&quot; &amp; YEAR([.B434]) &amp; &quot;-&quot; &amp; MONTH([.B434]) &amp; &quot;-&quot; &amp; DAY([.B434]) &amp; &quot;', '&quot; &amp; [.C434] &amp; &quot;', '&quot; &amp; [.D434] &amp; &quot;', '&quot; &amp; [.E434] &amp; &quot;', '&quot; &amp; [.F434] &amp; &quot;'],&quot;" office:value-type="string" office:string-value="['Sekiro - Shadows Die Twice', '2019-3-25', '1:31', 'Mick, Tomar', 'lPoUyPUTxmU', '']," calcext:value-type="string">
            <text:p>['Sekiro - Shadows Die Twice', '2019-3-25', '1:31', 'Mick, Tomar', 'lPoUyPUTxmU', ''],</text:p>
          </table:table-cell>
        </table:table-row>
        <table:table-row table:style-name="ro1">
          <table:table-cell office:value-type="string" calcext:value-type="string">
            <text:p>Shadow The Hedgehog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1:18</text:p>
          </table:table-cell>
          <table:table-cell office:value-type="string" calcext:value-type="string">
            <text:p>Cory, Zach, Lyle</text:p>
          </table:table-cell>
          <table:table-cell office:value-type="string" calcext:value-type="string">
            <text:p>lmUY2RTR3aI</text:p>
          </table:table-cell>
          <table:table-cell/>
          <table:table-cell table:formula="of:=&quot;['&quot; &amp; [.A435] &amp; &quot;', '&quot; &amp; YEAR([.B435]) &amp; &quot;-&quot; &amp; MONTH([.B435]) &amp; &quot;-&quot; &amp; DAY([.B435]) &amp; &quot;', '&quot; &amp; [.C435] &amp; &quot;', '&quot; &amp; [.D435] &amp; &quot;', '&quot; &amp; [.E435] &amp; &quot;', '&quot; &amp; [.F435] &amp; &quot;'],&quot;" office:value-type="string" office:string-value="['Shadow The Hedgehog', '2022-9-27', '1:18', 'Cory, Zach, Lyle', 'lmUY2RTR3aI', '']," calcext:value-type="string">
            <text:p>['Shadow The Hedgehog', '2022-9-27', '1:18', 'Cory, Zach, Lyle', 'lmUY2RTR3aI', ''],</text:p>
          </table:table-cell>
        </table:table-row>
        <table:table-row table:style-name="ro1">
          <table:table-cell office:value-type="string" calcext:value-type="string">
            <text:p>Shantae and the Pirate's Curse</text:p>
          </table:table-cell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0:46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FuD8BMrVEO0</text:p>
          </table:table-cell>
          <table:table-cell/>
          <table:table-cell table:formula="of:=&quot;['&quot; &amp; [.A436] &amp; &quot;', '&quot; &amp; YEAR([.B436]) &amp; &quot;-&quot; &amp; MONTH([.B436]) &amp; &quot;-&quot; &amp; DAY([.B436]) &amp; &quot;', '&quot; &amp; [.C436] &amp; &quot;', '&quot; &amp; [.D436] &amp; &quot;', '&quot; &amp; [.E436] &amp; &quot;', '&quot; &amp; [.F436] &amp; &quot;'],&quot;" office:value-type="string" office:string-value="['Shantae and the Pirate's Curse', '2016-9-27', '0:46', 'Cory', 'FuD8BMrVEO0', '']," calcext:value-type="string">
            <text:p>['Shantae and the Pirate's Curse', '2016-9-27', '0:46', 'Cory', 'FuD8BMrVEO0', ''],</text:p>
          </table:table-cell>
        </table:table-row>
        <table:table-row table:style-name="ro1">
          <table:table-cell office:value-type="string" calcext:value-type="string">
            <text:p>Shenmue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2:1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5nW32uohtww</text:p>
          </table:table-cell>
          <table:table-cell office:value-type="string" calcext:value-type="string">
            <text:p>ojnTR0kx-N0</text:p>
          </table:table-cell>
          <table:table-cell table:formula="of:=&quot;['&quot; &amp; [.A437] &amp; &quot;', '&quot; &amp; YEAR([.B437]) &amp; &quot;-&quot; &amp; MONTH([.B437]) &amp; &quot;-&quot; &amp; DAY([.B437]) &amp; &quot;', '&quot; &amp; [.C437] &amp; &quot;', '&quot; &amp; [.D437] &amp; &quot;', '&quot; &amp; [.E437] &amp; &quot;', '&quot; &amp; [.F437] &amp; &quot;'],&quot;" office:value-type="string" office:string-value="['Shenmue', '2017-1-3', '2:14', 'Dingdong, Julian', '5nW32uohtww', 'ojnTR0kx-N0']," calcext:value-type="string">
            <text:p>['Shenmue', '2017-1-3', '2:14', 'Dingdong, Julian', '5nW32uohtww', 'ojnTR0kx-N0'],</text:p>
          </table:table-cell>
        </table:table-row>
        <table:table-row table:style-name="ro1">
          <table:table-cell office:value-type="string" calcext:value-type="string">
            <text:p>Shinkansen 0</text:p>
          </table:table-cell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1:0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2H5N1zuIVxg</text:p>
          </table:table-cell>
          <table:table-cell/>
          <table:table-cell table:formula="of:=&quot;['&quot; &amp; [.A438] &amp; &quot;', '&quot; &amp; YEAR([.B438]) &amp; &quot;-&quot; &amp; MONTH([.B438]) &amp; &quot;-&quot; &amp; DAY([.B438]) &amp; &quot;', '&quot; &amp; [.C438] &amp; &quot;', '&quot; &amp; [.D438] &amp; &quot;', '&quot; &amp; [.E438] &amp; &quot;', '&quot; &amp; [.F438] &amp; &quot;'],&quot;" office:value-type="string" office:string-value="['Shinkansen 0', '2025-11-3', '1:03', 'Zach, Tomar', '2H5N1zuIVxg', '']," calcext:value-type="string">
            <text:p>['Shinkansen 0', '2025-11-3', '1:03', 'Zach, Tomar', '2H5N1zuIVxg', ''],</text:p>
          </table:table-cell>
        </table:table-row>
        <table:table-row table:style-name="ro1">
          <table:table-cell office:value-type="string" calcext:value-type="string">
            <text:p>Shovel Knight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0:5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rWr2hvKmtnM</text:p>
          </table:table-cell>
          <table:table-cell/>
          <table:table-cell table:formula="of:=&quot;['&quot; &amp; [.A439] &amp; &quot;', '&quot; &amp; YEAR([.B439]) &amp; &quot;-&quot; &amp; MONTH([.B439]) &amp; &quot;-&quot; &amp; DAY([.B439]) &amp; &quot;', '&quot; &amp; [.C439] &amp; &quot;', '&quot; &amp; [.D439] &amp; &quot;', '&quot; &amp; [.E439] &amp; &quot;', '&quot; &amp; [.F439] &amp; &quot;'],&quot;" office:value-type="string" office:string-value="['Shovel Knight', '2020-6-21', '0:51', 'Lyle, Tomar', 'rWr2hvKmtnM', '']," calcext:value-type="string">
            <text:p>['Shovel Knight', '2020-6-21', '0:51', 'Lyle, Tomar', 'rWr2hvKmtnM', ''],</text:p>
          </table:table-cell>
        </table:table-row>
        <table:table-row table:style-name="ro1">
          <table:table-cell office:value-type="string" calcext:value-type="string">
            <text:p>Shrek 2</text:p>
          </table:table-cell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mzFDI1WFhwU</text:p>
          </table:table-cell>
          <table:table-cell/>
          <table:table-cell table:formula="of:=&quot;['&quot; &amp; [.A440] &amp; &quot;', '&quot; &amp; YEAR([.B440]) &amp; &quot;-&quot; &amp; MONTH([.B440]) &amp; &quot;-&quot; &amp; DAY([.B440]) &amp; &quot;', '&quot; &amp; [.C440] &amp; &quot;', '&quot; &amp; [.D440] &amp; &quot;', '&quot; &amp; [.E440] &amp; &quot;', '&quot; &amp; [.F440] &amp; &quot;'],&quot;" office:value-type="string" office:string-value="['Shrek 2', '2020-2-6', '0:23', 'Zach, Lyle', 'mzFDI1WFhwU', '']," calcext:value-type="string">
            <text:p>['Shrek 2', '2020-2-6', '0:23', 'Zach, Lyle', 'mzFDI1WFhwU', ''],</text:p>
          </table:table-cell>
        </table:table-row>
        <table:table-row table:style-name="ro1">
          <table:table-cell office:value-type="string" calcext:value-type="string">
            <text:p>Sifu</text:p>
          </table:table-cell>
          <table:table-cell office:value-type="date" office:date-value="2022-02-27" calcext:value-type="date">
            <text:p>2022-02-27</text:p>
          </table:table-cell>
          <table:table-cell office:value-type="string" calcext:value-type="string">
            <text:p>0:5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rsPjvVAFMDY</text:p>
          </table:table-cell>
          <table:table-cell/>
          <table:table-cell table:formula="of:=&quot;['&quot; &amp; [.A441] &amp; &quot;', '&quot; &amp; YEAR([.B441]) &amp; &quot;-&quot; &amp; MONTH([.B441]) &amp; &quot;-&quot; &amp; DAY([.B441]) &amp; &quot;', '&quot; &amp; [.C441] &amp; &quot;', '&quot; &amp; [.D441] &amp; &quot;', '&quot; &amp; [.E441] &amp; &quot;', '&quot; &amp; [.F441] &amp; &quot;'],&quot;" office:value-type="string" office:string-value="['Sifu', '2022-2-27', '0:52', 'Lyle, Tomar', 'rsPjvVAFMDY', '']," calcext:value-type="string">
            <text:p>['Sifu', '2022-2-27', '0:52', 'Lyle, Tomar', 'rsPjvVAFMDY', ''],</text:p>
          </table:table-cell>
        </table:table-row>
        <table:table-row table:style-name="ro1">
          <table:table-cell office:value-type="string" calcext:value-type="string">
            <text:p>Signalis</text:p>
          </table:table-cell>
          <table:table-cell office:value-type="date" office:date-value="2024-03-06" calcext:value-type="date">
            <text:p>2024-03-06</text:p>
          </table:table-cell>
          <table:table-cell office:value-type="string" calcext:value-type="string">
            <text:p>1:3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n_OGBnnfq00</text:p>
          </table:table-cell>
          <table:table-cell/>
          <table:table-cell table:formula="of:=&quot;['&quot; &amp; [.A442] &amp; &quot;', '&quot; &amp; YEAR([.B442]) &amp; &quot;-&quot; &amp; MONTH([.B442]) &amp; &quot;-&quot; &amp; DAY([.B442]) &amp; &quot;', '&quot; &amp; [.C442] &amp; &quot;', '&quot; &amp; [.D442] &amp; &quot;', '&quot; &amp; [.E442] &amp; &quot;', '&quot; &amp; [.F442] &amp; &quot;'],&quot;" office:value-type="string" office:string-value="['Signalis', '2024-3-6', '1:39', 'Lyle, Tomar', 'n_OGBnnfq00', '']," calcext:value-type="string">
            <text:p>['Signalis', '2024-3-6', '1:39', 'Lyle, Tomar', 'n_OGBnnfq00', ''],</text:p>
          </table:table-cell>
        </table:table-row>
        <table:table-row table:style-name="ro1">
          <table:table-cell office:value-type="string" calcext:value-type="string">
            <text:p>Silent Hill 2 - Ep 1</text:p>
          </table:table-cell>
          <table:table-cell office:value-type="date" office:date-value="2018-10-25" calcext:value-type="date">
            <text:p>2018-10-25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Niall, Amin</text:p>
          </table:table-cell>
          <table:table-cell office:value-type="string" calcext:value-type="string">
            <text:p>XG-5spHAdzw</text:p>
          </table:table-cell>
          <table:table-cell/>
          <table:table-cell table:formula="of:=&quot;['&quot; &amp; [.A443] &amp; &quot;', '&quot; &amp; YEAR([.B443]) &amp; &quot;-&quot; &amp; MONTH([.B443]) &amp; &quot;-&quot; &amp; DAY([.B443]) &amp; &quot;', '&quot; &amp; [.C443] &amp; &quot;', '&quot; &amp; [.D443] &amp; &quot;', '&quot; &amp; [.E443] &amp; &quot;', '&quot; &amp; [.F443] &amp; &quot;'],&quot;" office:value-type="string" office:string-value="['Silent Hill 2 - Ep 1', '2018-10-25', '0:21', 'Niall, Amin', 'XG-5spHAdzw', '']," calcext:value-type="string">
            <text:p>['Silent Hill 2 - Ep 1', '2018-10-25', '0:21', 'Niall, Amin', 'XG-5spHAdzw', ''],</text:p>
          </table:table-cell>
        </table:table-row>
        <table:table-row table:style-name="ro1">
          <table:table-cell office:value-type="string" calcext:value-type="string">
            <text:p>Silent Hill 2 - Ep 2</text:p>
          </table:table-cell>
          <table:table-cell office:value-type="date" office:date-value="2018-11-01" calcext:value-type="date">
            <text:p>2018-11-01</text:p>
          </table:table-cell>
          <table:table-cell office:value-type="string" calcext:value-type="string">
            <text:p>0:20</text:p>
          </table:table-cell>
          <table:table-cell office:value-type="string" calcext:value-type="string">
            <text:p>Niall, Amin</text:p>
          </table:table-cell>
          <table:table-cell office:value-type="string" calcext:value-type="string">
            <text:p>7SaBrOMlgXw</text:p>
          </table:table-cell>
          <table:table-cell/>
          <table:table-cell table:formula="of:=&quot;['&quot; &amp; [.A444] &amp; &quot;', '&quot; &amp; YEAR([.B444]) &amp; &quot;-&quot; &amp; MONTH([.B444]) &amp; &quot;-&quot; &amp; DAY([.B444]) &amp; &quot;', '&quot; &amp; [.C444] &amp; &quot;', '&quot; &amp; [.D444] &amp; &quot;', '&quot; &amp; [.E444] &amp; &quot;', '&quot; &amp; [.F444] &amp; &quot;'],&quot;" office:value-type="string" office:string-value="['Silent Hill 2 - Ep 2', '2018-11-1', '0:20', 'Niall, Amin', '7SaBrOMlgXw', '']," calcext:value-type="string">
            <text:p>['Silent Hill 2 - Ep 2', '2018-11-1', '0:20', 'Niall, Amin', '7SaBrOMlgXw', ''],</text:p>
          </table:table-cell>
        </table:table-row>
        <table:table-row table:style-name="ro1">
          <table:table-cell office:value-type="string" calcext:value-type="string">
            <text:p>Silent Hill 4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1:26</text:p>
          </table:table-cell>
          <table:table-cell office:value-type="string" calcext:value-type="string">
            <text:p>Dingdong, Julian, Amin</text:p>
          </table:table-cell>
          <table:table-cell office:value-type="string" calcext:value-type="string">
            <text:p>ZvIZvKgnRIA</text:p>
          </table:table-cell>
          <table:table-cell/>
          <table:table-cell table:formula="of:=&quot;['&quot; &amp; [.A445] &amp; &quot;', '&quot; &amp; YEAR([.B445]) &amp; &quot;-&quot; &amp; MONTH([.B445]) &amp; &quot;-&quot; &amp; DAY([.B445]) &amp; &quot;', '&quot; &amp; [.C445] &amp; &quot;', '&quot; &amp; [.D445] &amp; &quot;', '&quot; &amp; [.E445] &amp; &quot;', '&quot; &amp; [.F445] &amp; &quot;'],&quot;" office:value-type="string" office:string-value="['Silent Hill 4', '2017-10-19', '1:26', 'Dingdong, Julian, Amin', 'ZvIZvKgnRIA', '']," calcext:value-type="string">
            <text:p>['Silent Hill 4', '2017-10-19', '1:26', 'Dingdong, Julian, Amin', 'ZvIZvKgnRIA', ''],</text:p>
          </table:table-cell>
        </table:table-row>
        <table:table-row table:style-name="ro1">
          <table:table-cell office:value-type="string" calcext:value-type="string">
            <text:p>Simpsons Arcade Game, The</text:p>
          </table:table-cell>
          <table:table-cell office:value-type="date" office:date-value="2020-12-27" calcext:value-type="date">
            <text:p>2020-12-27</text:p>
          </table:table-cell>
          <table:table-cell office:value-type="string" calcext:value-type="string">
            <text:p>0:3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i71K4xYNDkw</text:p>
          </table:table-cell>
          <table:table-cell/>
          <table:table-cell table:formula="of:=&quot;['&quot; &amp; [.A446] &amp; &quot;', '&quot; &amp; YEAR([.B446]) &amp; &quot;-&quot; &amp; MONTH([.B446]) &amp; &quot;-&quot; &amp; DAY([.B446]) &amp; &quot;', '&quot; &amp; [.C446] &amp; &quot;', '&quot; &amp; [.D446] &amp; &quot;', '&quot; &amp; [.E446] &amp; &quot;', '&quot; &amp; [.F446] &amp; &quot;'],&quot;" office:value-type="string" office:string-value="['Simpsons Arcade Game, The', '2020-12-27', '0:39', 'Lyle, Tomar', 'i71K4xYNDkw', '']," calcext:value-type="string">
            <text:p>['Simpsons Arcade Game, The', '2020-12-27', '0:39', 'Lyle, Tomar', 'i71K4xYNDkw', ''],</text:p>
          </table:table-cell>
        </table:table-row>
        <table:table-row table:style-name="ro1">
          <table:table-cell office:value-type="string" calcext:value-type="string">
            <text:p>Simpsons Fortnite</text:p>
          </table:table-cell>
          <table:table-cell office:value-type="date" office:date-value="2025-12-29" calcext:value-type="date">
            <text:p>2025-12-29</text:p>
          </table:table-cell>
          <table:table-cell office:value-type="string" calcext:value-type="string">
            <text:p>0:44</text:p>
          </table:table-cell>
          <table:table-cell office:value-type="string" calcext:value-type="string">
            <text:p>Fakanza, Tomar, Zach</text:p>
          </table:table-cell>
          <table:table-cell office:value-type="string" calcext:value-type="string">
            <text:p>KdZWDvG9aoM</text:p>
          </table:table-cell>
          <table:table-cell/>
          <table:table-cell table:formula="of:=&quot;['&quot; &amp; [.A447] &amp; &quot;', '&quot; &amp; YEAR([.B447]) &amp; &quot;-&quot; &amp; MONTH([.B447]) &amp; &quot;-&quot; &amp; DAY([.B447]) &amp; &quot;', '&quot; &amp; [.C447] &amp; &quot;', '&quot; &amp; [.D447] &amp; &quot;', '&quot; &amp; [.E447] &amp; &quot;', '&quot; &amp; [.F447] &amp; &quot;'],&quot;" office:value-type="string" office:string-value="['Simpsons Fortnite', '2025-12-29', '0:44', 'Fakanza, Tomar, Zach', 'KdZWDvG9aoM', '']," calcext:value-type="string">
            <text:p>['Simpsons Fortnite', '2025-12-29', '0:44', 'Fakanza, Tomar, Zach', 'KdZWDvG9aoM', ''],</text:p>
          </table:table-cell>
        </table:table-row>
        <table:table-row table:style-name="ro1">
          <table:table-cell office:value-type="string" calcext:value-type="string">
            <text:p>Simpsons Hit and Run</text:p>
          </table:table-cell>
          <table:table-cell office:value-type="date" office:date-value="2017-03-19" calcext:value-type="date">
            <text:p>2017-03-19</text:p>
          </table:table-cell>
          <table:table-cell office:value-type="string" calcext:value-type="string">
            <text:p>0:36</text:p>
          </table:table-cell>
          <table:table-cell office:value-type="string" calcext:value-type="string">
            <text:p>GameGrumps Aaron, Dingdong, Julian</text:p>
          </table:table-cell>
          <table:table-cell office:value-type="string" calcext:value-type="string">
            <text:p>ACEmSDRrng4</text:p>
          </table:table-cell>
          <table:table-cell/>
          <table:table-cell table:formula="of:=&quot;['&quot; &amp; [.A448] &amp; &quot;', '&quot; &amp; YEAR([.B448]) &amp; &quot;-&quot; &amp; MONTH([.B448]) &amp; &quot;-&quot; &amp; DAY([.B448]) &amp; &quot;', '&quot; &amp; [.C448] &amp; &quot;', '&quot; &amp; [.D448] &amp; &quot;', '&quot; &amp; [.E448] &amp; &quot;', '&quot; &amp; [.F448] &amp; &quot;'],&quot;" office:value-type="string" office:string-value="['Simpsons Hit and Run', '2017-3-19', '0:36', 'GameGrumps Aaron, Dingdong, Julian', 'ACEmSDRrng4', '']," calcext:value-type="string">
            <text:p>['Simpsons Hit and Run', '2017-3-19', '0:36', 'GameGrumps Aaron, Dingdong, Julian', 'ACEmSDRrng4', ''],</text:p>
          </table:table-cell>
        </table:table-row>
        <table:table-row table:style-name="ro1">
          <table:table-cell office:value-type="string" calcext:value-type="string">
            <text:p>Simpsons, The - Bart's Nightmare</text:p>
          </table:table-cell>
          <table:table-cell office:value-type="date" office:date-value="2021-03-30" calcext:value-type="date">
            <text:p>2021-03-30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c1KWEzO2Boo</text:p>
          </table:table-cell>
          <table:table-cell/>
          <table:table-cell table:formula="of:=&quot;['&quot; &amp; [.A449] &amp; &quot;', '&quot; &amp; YEAR([.B449]) &amp; &quot;-&quot; &amp; MONTH([.B449]) &amp; &quot;-&quot; &amp; DAY([.B449]) &amp; &quot;', '&quot; &amp; [.C449] &amp; &quot;', '&quot; &amp; [.D449] &amp; &quot;', '&quot; &amp; [.E449] &amp; &quot;', '&quot; &amp; [.F449] &amp; &quot;'],&quot;" office:value-type="string" office:string-value="['Simpsons, The - Bart's Nightmare', '2021-3-30', '1:00', 'Dingdong, Julian', 'c1KWEzO2Boo', '']," calcext:value-type="string">
            <text:p>['Simpsons, The - Bart's Nightmare', '2021-3-30', '1:00', 'Dingdong, Julian', 'c1KWEzO2Boo', ''],</text:p>
          </table:table-cell>
        </table:table-row>
        <table:table-row table:style-name="ro1">
          <table:table-cell office:value-type="string" calcext:value-type="string">
            <text:p>Simpsons, The - Virtual Springfield</text:p>
          </table:table-cell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0:1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WMKinHNZBs</text:p>
          </table:table-cell>
          <table:table-cell/>
          <table:table-cell table:formula="of:=&quot;['&quot; &amp; [.A450] &amp; &quot;', '&quot; &amp; YEAR([.B450]) &amp; &quot;-&quot; &amp; MONTH([.B450]) &amp; &quot;-&quot; &amp; DAY([.B450]) &amp; &quot;', '&quot; &amp; [.C450] &amp; &quot;', '&quot; &amp; [.D450] &amp; &quot;', '&quot; &amp; [.E450] &amp; &quot;', '&quot; &amp; [.F450] &amp; &quot;'],&quot;" office:value-type="string" office:string-value="['Simpsons, The - Virtual Springfield', '2017-8-9', '0:17', 'Dingdong, Julian', 'hWMKinHNZBs', '']," calcext:value-type="string">
            <text:p>['Simpsons, The - Virtual Springfield', '2017-8-9', '0:17', 'Dingdong, Julian', 'hWMKinHNZBs', ''],</text:p>
          </table:table-cell>
        </table:table-row>
        <table:table-row table:style-name="ro1">
          <table:table-cell office:value-type="string" calcext:value-type="string">
            <text:p>Sims 3, The</text:p>
          </table:table-cell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XVBn8X8zrTw</text:p>
          </table:table-cell>
          <table:table-cell/>
          <table:table-cell table:formula="of:=&quot;['&quot; &amp; [.A451] &amp; &quot;', '&quot; &amp; YEAR([.B451]) &amp; &quot;-&quot; &amp; MONTH([.B451]) &amp; &quot;-&quot; &amp; DAY([.B451]) &amp; &quot;', '&quot; &amp; [.C451] &amp; &quot;', '&quot; &amp; [.D451] &amp; &quot;', '&quot; &amp; [.E451] &amp; &quot;', '&quot; &amp; [.F451] &amp; &quot;'],&quot;" office:value-type="string" office:string-value="['Sims 3, The', '2022-11-12', '1:00', 'Zach, Cory, Tomar', 'XVBn8X8zrTw', '']," calcext:value-type="string">
            <text:p>['Sims 3, The', '2022-11-12', '1:00', 'Zach, Cory, Tomar', 'XVBn8X8zrTw', ''],</text:p>
          </table:table-cell>
        </table:table-row>
        <table:table-row table:style-name="ro1">
          <table:table-cell office:value-type="string" calcext:value-type="string">
            <text:p>Sims, The</text:p>
          </table:table-cell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1:1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zvYSc1uvlng</text:p>
          </table:table-cell>
          <table:table-cell/>
          <table:table-cell table:formula="of:=&quot;['&quot; &amp; [.A452] &amp; &quot;', '&quot; &amp; YEAR([.B452]) &amp; &quot;-&quot; &amp; MONTH([.B452]) &amp; &quot;-&quot; &amp; DAY([.B452]) &amp; &quot;', '&quot; &amp; [.C452] &amp; &quot;', '&quot; &amp; [.D452] &amp; &quot;', '&quot; &amp; [.E452] &amp; &quot;', '&quot; &amp; [.F452] &amp; &quot;'],&quot;" office:value-type="string" office:string-value="['Sims, The', '2020-4-15', '1:18', 'Lyle, Tomar', 'zvYSc1uvlng', '']," calcext:value-type="string">
            <text:p>['Sims, The', '2020-4-15', '1:18', 'Lyle, Tomar', 'zvYSc1uvlng', ''],</text:p>
          </table:table-cell>
        </table:table-row>
        <table:table-row table:style-name="ro1">
          <table:table-cell office:value-type="string" calcext:value-type="string">
            <text:p>Siren Head Resurrection</text:p>
          </table:table-cell>
          <table:table-cell office:value-type="date" office:date-value="2024-10-21" calcext:value-type="date">
            <text:p>2024-10-21</text:p>
          </table:table-cell>
          <table:table-cell office:value-type="string" calcext:value-type="string">
            <text:p>1:15</text:p>
          </table:table-cell>
          <table:table-cell office:value-type="string" calcext:value-type="string">
            <text:p>Cory, Adam, Niall</text:p>
          </table:table-cell>
          <table:table-cell office:value-type="string" calcext:value-type="string">
            <text:p>z1KaCerCqlw</text:p>
          </table:table-cell>
          <table:table-cell/>
          <table:table-cell table:formula="of:=&quot;['&quot; &amp; [.A453] &amp; &quot;', '&quot; &amp; YEAR([.B453]) &amp; &quot;-&quot; &amp; MONTH([.B453]) &amp; &quot;-&quot; &amp; DAY([.B453]) &amp; &quot;', '&quot; &amp; [.C453] &amp; &quot;', '&quot; &amp; [.D453] &amp; &quot;', '&quot; &amp; [.E453] &amp; &quot;', '&quot; &amp; [.F453] &amp; &quot;'],&quot;" office:value-type="string" office:string-value="['Siren Head Resurrection', '2024-10-21', '1:15', 'Cory, Adam, Niall', 'z1KaCerCqlw', '']," calcext:value-type="string">
            <text:p>['Siren Head Resurrection', '2024-10-21', '1:15', 'Cory, Adam, Niall', 'z1KaCerCqlw', ''],</text:p>
          </table:table-cell>
        </table:table-row>
        <table:table-row table:style-name="ro1">
          <table:table-cell office:value-type="string" calcext:value-type="string">
            <text:p>Skinwalker Hunt</text:p>
          </table:table-cell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2:23</text:p>
          </table:table-cell>
          <table:table-cell office:value-type="string" calcext:value-type="string">
            <text:p>Zach, Cory, Tomar</text:p>
          </table:table-cell>
          <table:table-cell office:value-type="string" calcext:value-type="string">
            <text:p>HbYy_3c60xs</text:p>
          </table:table-cell>
          <table:table-cell/>
          <table:table-cell table:formula="of:=&quot;['&quot; &amp; [.A454] &amp; &quot;', '&quot; &amp; YEAR([.B454]) &amp; &quot;-&quot; &amp; MONTH([.B454]) &amp; &quot;-&quot; &amp; DAY([.B454]) &amp; &quot;', '&quot; &amp; [.C454] &amp; &quot;', '&quot; &amp; [.D454] &amp; &quot;', '&quot; &amp; [.E454] &amp; &quot;', '&quot; &amp; [.F454] &amp; &quot;'],&quot;" office:value-type="string" office:string-value="['Skinwalker Hunt', '2022-10-20', '2:23', 'Zach, Cory, Tomar', 'HbYy_3c60xs', '']," calcext:value-type="string">
            <text:p>['Skinwalker Hunt', '2022-10-20', '2:23', 'Zach, Cory, Tomar', 'HbYy_3c60xs', ''],</text:p>
          </table:table-cell>
        </table:table-row>
        <table:table-row table:style-name="ro1">
          <table:table-cell office:value-type="string" calcext:value-type="string">
            <text:p>Slam City</text:p>
          </table:table-cell>
          <table:table-cell office:value-type="date" office:date-value="2018-12-27" calcext:value-type="date">
            <text:p>2018-12-27</text:p>
          </table:table-cell>
          <table:table-cell office:value-type="string" calcext:value-type="string">
            <text:p>0:2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b9h6Sm5_Djg</text:p>
          </table:table-cell>
          <table:table-cell/>
          <table:table-cell table:formula="of:=&quot;['&quot; &amp; [.A455] &amp; &quot;', '&quot; &amp; YEAR([.B455]) &amp; &quot;-&quot; &amp; MONTH([.B455]) &amp; &quot;-&quot; &amp; DAY([.B455]) &amp; &quot;', '&quot; &amp; [.C455] &amp; &quot;', '&quot; &amp; [.D455] &amp; &quot;', '&quot; &amp; [.E455] &amp; &quot;', '&quot; &amp; [.F455] &amp; &quot;'],&quot;" office:value-type="string" office:string-value="['Slam City', '2018-12-27', '0:22', 'Dingdong, Julian', 'b9h6Sm5_Djg', '']," calcext:value-type="string">
            <text:p>['Slam City', '2018-12-27', '0:22', 'Dingdong, Julian', 'b9h6Sm5_Djg', ''],</text:p>
          </table:table-cell>
        </table:table-row>
        <table:table-row table:style-name="ro1">
          <table:table-cell office:value-type="string" calcext:value-type="string">
            <text:p>Slender The Arrival</text:p>
          </table:table-cell>
          <table:table-cell office:value-type="date" office:date-value="2018-10-20" calcext:value-type="date">
            <text:p>2018-10-20</text:p>
          </table:table-cell>
          <table:table-cell office:value-type="string" calcext:value-type="string">
            <text:p>1:3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-s1h1X7oOIM</text:p>
          </table:table-cell>
          <table:table-cell/>
          <table:table-cell table:formula="of:=&quot;['&quot; &amp; [.A456] &amp; &quot;', '&quot; &amp; YEAR([.B456]) &amp; &quot;-&quot; &amp; MONTH([.B456]) &amp; &quot;-&quot; &amp; DAY([.B456]) &amp; &quot;', '&quot; &amp; [.C456] &amp; &quot;', '&quot; &amp; [.D456] &amp; &quot;', '&quot; &amp; [.E456] &amp; &quot;', '&quot; &amp; [.F456] &amp; &quot;'],&quot;" office:value-type="string" office:string-value="['Slender The Arrival', '2018-10-20', '1:33', 'Zach, Tomar', '-s1h1X7oOIM', '']," calcext:value-type="string">
            <text:p>['Slender The Arrival', '2018-10-20', '1:33', 'Zach, Tomar', '-s1h1X7oOIM', ''],</text:p>
          </table:table-cell>
        </table:table-row>
        <table:table-row table:style-name="ro1">
          <table:table-cell office:value-type="string" calcext:value-type="string">
            <text:p>Slightly Artistic - Volume 1 (Episodes 1 - 6)</text:p>
          </table:table-cell>
          <table:table-cell office:value-type="date" office:date-value="2018-06-16" calcext:value-type="date">
            <text:p>2018-06-16</text:p>
          </table:table-cell>
          <table:table-cell office:value-type="string" calcext:value-type="string">
            <text:p>3:18</text:p>
          </table:table-cell>
          <table:table-cell office:value-type="string" calcext:value-type="string">
            <text:p>Cory, Dave, Jeff</text:p>
          </table:table-cell>
          <table:table-cell office:value-type="string" calcext:value-type="string">
            <text:p>2-IzkJQtlkU</text:p>
          </table:table-cell>
          <table:table-cell/>
          <table:table-cell table:formula="of:=&quot;['&quot; &amp; [.A457] &amp; &quot;', '&quot; &amp; YEAR([.B457]) &amp; &quot;-&quot; &amp; MONTH([.B457]) &amp; &quot;-&quot; &amp; DAY([.B457]) &amp; &quot;', '&quot; &amp; [.C457] &amp; &quot;', '&quot; &amp; [.D457] &amp; &quot;', '&quot; &amp; [.E457] &amp; &quot;', '&quot; &amp; [.F457] &amp; &quot;'],&quot;" office:value-type="string" office:string-value="['Slightly Artistic - Volume 1 (Episodes 1 - 6)', '2018-6-16', '3:18', 'Cory, Dave, Jeff', '2-IzkJQtlkU', '']," calcext:value-type="string">
            <text:p>['Slightly Artistic - Volume 1 (Episodes 1 - 6)', '2018-6-16', '3:18', 'Cory, Dave, Jeff', '2-IzkJQtlkU', ''],</text:p>
          </table:table-cell>
        </table:table-row>
        <table:table-row table:style-name="ro1">
          <table:table-cell office:value-type="string" calcext:value-type="string">
            <text:p>Sly Cooper And The Thievius Raccoonus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0:54</text:p>
          </table:table-cell>
          <table:table-cell office:value-type="string" calcext:value-type="string">
            <text:p>Adam, Lyle</text:p>
          </table:table-cell>
          <table:table-cell office:value-type="string" calcext:value-type="string">
            <text:p>xJL7acR9yTE</text:p>
          </table:table-cell>
          <table:table-cell/>
          <table:table-cell table:formula="of:=&quot;['&quot; &amp; [.A458] &amp; &quot;', '&quot; &amp; YEAR([.B458]) &amp; &quot;-&quot; &amp; MONTH([.B458]) &amp; &quot;-&quot; &amp; DAY([.B458]) &amp; &quot;', '&quot; &amp; [.C458] &amp; &quot;', '&quot; &amp; [.D458] &amp; &quot;', '&quot; &amp; [.E458] &amp; &quot;', '&quot; &amp; [.F458] &amp; &quot;'],&quot;" office:value-type="string" office:string-value="['Sly Cooper And The Thievius Raccoonus', '2023-3-10', '0:54', 'Adam, Lyle', 'xJL7acR9yTE', '']," calcext:value-type="string">
            <text:p>['Sly Cooper And The Thievius Raccoonus', '2023-3-10', '0:54', 'Adam, Lyle', 'xJL7acR9yTE', ''],</text:p>
          </table:table-cell>
        </table:table-row>
        <table:table-row table:style-name="ro1">
          <table:table-cell office:value-type="string" calcext:value-type="string">
            <text:p>Snowboard Kids 2</text:p>
          </table:table-cell>
          <table:table-cell office:value-type="date" office:date-value="2017-12-22" calcext:value-type="date">
            <text:p>2017-12-22</text:p>
          </table:table-cell>
          <table:table-cell office:value-type="string" calcext:value-type="string">
            <text:p>0:2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l5npn-zKMpM</text:p>
          </table:table-cell>
          <table:table-cell/>
          <table:table-cell table:formula="of:=&quot;['&quot; &amp; [.A459] &amp; &quot;', '&quot; &amp; YEAR([.B459]) &amp; &quot;-&quot; &amp; MONTH([.B459]) &amp; &quot;-&quot; &amp; DAY([.B459]) &amp; &quot;', '&quot; &amp; [.C459] &amp; &quot;', '&quot; &amp; [.D459] &amp; &quot;', '&quot; &amp; [.E459] &amp; &quot;', '&quot; &amp; [.F459] &amp; &quot;'],&quot;" office:value-type="string" office:string-value="['Snowboard Kids 2', '2017-12-22', '0:22', 'Dingdong, Julian', 'l5npn-zKMpM', '']," calcext:value-type="string">
            <text:p>['Snowboard Kids 2', '2017-12-22', '0:22', 'Dingdong, Julian', 'l5npn-zKMpM', ''],</text:p>
          </table:table-cell>
        </table:table-row>
        <table:table-row table:style-name="ro1">
          <table:table-cell office:value-type="string" calcext:value-type="string">
            <text:p>Sonic 3D Blast</text:p>
          </table:table-cell>
          <table:table-cell office:value-type="date" office:date-value="2024-12-24" calcext:value-type="date">
            <text:p>2024-12-24</text:p>
          </table:table-cell>
          <table:table-cell office:value-type="string" calcext:value-type="string">
            <text:p>0:56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JxvALY74Sro</text:p>
          </table:table-cell>
          <table:table-cell/>
          <table:table-cell table:formula="of:=&quot;['&quot; &amp; [.A460] &amp; &quot;', '&quot; &amp; YEAR([.B460]) &amp; &quot;-&quot; &amp; MONTH([.B460]) &amp; &quot;-&quot; &amp; DAY([.B460]) &amp; &quot;', '&quot; &amp; [.C460] &amp; &quot;', '&quot; &amp; [.D460] &amp; &quot;', '&quot; &amp; [.E460] &amp; &quot;', '&quot; &amp; [.F460] &amp; &quot;'],&quot;" office:value-type="string" office:string-value="['Sonic 3D Blast', '2024-12-24', '0:56', 'Lyle, Cory', 'JxvALY74Sro', '']," calcext:value-type="string">
            <text:p>['Sonic 3D Blast', '2024-12-24', '0:56', 'Lyle, Cory', 'JxvALY74Sro', ''],</text:p>
          </table:table-cell>
        </table:table-row>
        <table:table-row table:style-name="ro1">
          <table:table-cell office:value-type="string" calcext:value-type="string">
            <text:p>Sonic Advance</text:p>
          </table:table-cell>
          <table:table-cell office:value-type="date" office:date-value="2022-06-26" calcext:value-type="date">
            <text:p>2022-06-26</text:p>
          </table:table-cell>
          <table:table-cell office:value-type="string" calcext:value-type="string">
            <text:p>0:59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lcceY-QRuCU</text:p>
          </table:table-cell>
          <table:table-cell/>
          <table:table-cell table:formula="of:=&quot;['&quot; &amp; [.A461] &amp; &quot;', '&quot; &amp; YEAR([.B461]) &amp; &quot;-&quot; &amp; MONTH([.B461]) &amp; &quot;-&quot; &amp; DAY([.B461]) &amp; &quot;', '&quot; &amp; [.C461] &amp; &quot;', '&quot; &amp; [.D461] &amp; &quot;', '&quot; &amp; [.E461] &amp; &quot;', '&quot; &amp; [.F461] &amp; &quot;'],&quot;" office:value-type="string" office:string-value="['Sonic Advance', '2022-6-26', '0:59', 'Lyle, Cory', 'lcceY-QRuCU', '']," calcext:value-type="string">
            <text:p>['Sonic Advance', '2022-6-26', '0:59', 'Lyle, Cory', 'lcceY-QRuCU', ''],</text:p>
          </table:table-cell>
        </table:table-row>
        <table:table-row table:style-name="ro1">
          <table:table-cell office:value-type="string" calcext:value-type="string">
            <text:p>Sonic Advance 2</text:p>
          </table:table-cell>
          <table:table-cell office:value-type="date" office:date-value="2022-11-30" calcext:value-type="date">
            <text:p>2022-11-30</text:p>
          </table:table-cell>
          <table:table-cell office:value-type="string" calcext:value-type="string">
            <text:p>1:27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bzsQfmcLtms</text:p>
          </table:table-cell>
          <table:table-cell/>
          <table:table-cell table:formula="of:=&quot;['&quot; &amp; [.A462] &amp; &quot;', '&quot; &amp; YEAR([.B462]) &amp; &quot;-&quot; &amp; MONTH([.B462]) &amp; &quot;-&quot; &amp; DAY([.B462]) &amp; &quot;', '&quot; &amp; [.C462] &amp; &quot;', '&quot; &amp; [.D462] &amp; &quot;', '&quot; &amp; [.E462] &amp; &quot;', '&quot; &amp; [.F462] &amp; &quot;'],&quot;" office:value-type="string" office:string-value="['Sonic Advance 2', '2022-11-30', '1:27', 'Lyle, Cory', 'bzsQfmcLtms', '']," calcext:value-type="string">
            <text:p>['Sonic Advance 2', '2022-11-30', '1:27', 'Lyle, Cory', 'bzsQfmcLtms', ''],</text:p>
          </table:table-cell>
        </table:table-row>
        <table:table-row table:style-name="ro1">
          <table:table-cell office:value-type="string" calcext:value-type="string">
            <text:p>Sonic Adventure</text:p>
          </table:table-cell>
          <table:table-cell office:value-type="date" office:date-value="2017-05-23" calcext:value-type="date">
            <text:p>2017-05-23</text:p>
          </table:table-cell>
          <table:table-cell office:value-type="string" calcext:value-type="string">
            <text:p>2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R9qdZNZPbXY</text:p>
          </table:table-cell>
          <table:table-cell/>
          <table:table-cell table:formula="of:=&quot;['&quot; &amp; [.A463] &amp; &quot;', '&quot; &amp; YEAR([.B463]) &amp; &quot;-&quot; &amp; MONTH([.B463]) &amp; &quot;-&quot; &amp; DAY([.B463]) &amp; &quot;', '&quot; &amp; [.C463] &amp; &quot;', '&quot; &amp; [.D463] &amp; &quot;', '&quot; &amp; [.E463] &amp; &quot;', '&quot; &amp; [.F463] &amp; &quot;'],&quot;" office:value-type="string" office:string-value="['Sonic Adventure', '2017-5-23', '2:10', 'Dingdong, Julian', 'R9qdZNZPbXY', '']," calcext:value-type="string">
            <text:p>['Sonic Adventure', '2017-5-23', '2:10', 'Dingdong, Julian', 'R9qdZNZPbXY', ''],</text:p>
          </table:table-cell>
        </table:table-row>
        <table:table-row table:style-name="ro1">
          <table:table-cell office:value-type="string" calcext:value-type="string">
            <text:p>Sonic Adventure 2 (2019) - Ep 1</text:p>
          </table:table-cell>
          <table:table-cell office:value-type="date" office:date-value="2019-05-02" calcext:value-type="date">
            <text:p>2019-05-02</text:p>
          </table:table-cell>
          <table:table-cell office:value-type="string" calcext:value-type="string">
            <text:p>0:19</text:p>
          </table:table-cell>
          <table:table-cell office:value-type="string" calcext:value-type="string">
            <text:p>Jeff, Cory</text:p>
          </table:table-cell>
          <table:table-cell office:value-type="string" calcext:value-type="string">
            <text:p>BqJloslWuFk</text:p>
          </table:table-cell>
          <table:table-cell/>
          <table:table-cell table:formula="of:=&quot;['&quot; &amp; [.A464] &amp; &quot;', '&quot; &amp; YEAR([.B464]) &amp; &quot;-&quot; &amp; MONTH([.B464]) &amp; &quot;-&quot; &amp; DAY([.B464]) &amp; &quot;', '&quot; &amp; [.C464] &amp; &quot;', '&quot; &amp; [.D464] &amp; &quot;', '&quot; &amp; [.E464] &amp; &quot;', '&quot; &amp; [.F464] &amp; &quot;'],&quot;" office:value-type="string" office:string-value="['Sonic Adventure 2 (2019) - Ep 1', '2019-5-2', '0:19', 'Jeff, Cory', 'BqJloslWuFk', '']," calcext:value-type="string">
            <text:p>['Sonic Adventure 2 (2019) - Ep 1', '2019-5-2', '0:19', 'Jeff, Cory', 'BqJloslWuFk', ''],</text:p>
          </table:table-cell>
        </table:table-row>
        <table:table-row table:style-name="ro1">
          <table:table-cell office:value-type="string" calcext:value-type="string">
            <text:p>Sonic Adventure 2 (2019) - Ep 2</text:p>
          </table:table-cell>
          <table:table-cell office:value-type="date" office:date-value="2019-05-03" calcext:value-type="date">
            <text:p>2019-05-03</text:p>
          </table:table-cell>
          <table:table-cell office:value-type="string" calcext:value-type="string">
            <text:p>0:32</text:p>
          </table:table-cell>
          <table:table-cell office:value-type="string" calcext:value-type="string">
            <text:p>Jeff, Cory</text:p>
          </table:table-cell>
          <table:table-cell office:value-type="string" calcext:value-type="string">
            <text:p>gFlfTWUQKkM</text:p>
          </table:table-cell>
          <table:table-cell/>
          <table:table-cell table:formula="of:=&quot;['&quot; &amp; [.A465] &amp; &quot;', '&quot; &amp; YEAR([.B465]) &amp; &quot;-&quot; &amp; MONTH([.B465]) &amp; &quot;-&quot; &amp; DAY([.B465]) &amp; &quot;', '&quot; &amp; [.C465] &amp; &quot;', '&quot; &amp; [.D465] &amp; &quot;', '&quot; &amp; [.E465] &amp; &quot;', '&quot; &amp; [.F465] &amp; &quot;'],&quot;" office:value-type="string" office:string-value="['Sonic Adventure 2 (2019) - Ep 2', '2019-5-3', '0:32', 'Jeff, Cory', 'gFlfTWUQKkM', '']," calcext:value-type="string">
            <text:p>['Sonic Adventure 2 (2019) - Ep 2', '2019-5-3', '0:32', 'Jeff, Cory', 'gFlfTWUQKkM', ''],</text:p>
          </table:table-cell>
        </table:table-row>
        <table:table-row table:style-name="ro1">
          <table:table-cell office:value-type="string" calcext:value-type="string">
            <text:p>Sonic Adventure 2 Battle</text:p>
          </table:table-cell>
          <table:table-cell office:value-type="date" office:date-value="2016-08-25" calcext:value-type="date">
            <text:p>2016-08-25</text:p>
          </table:table-cell>
          <table:table-cell office:value-type="string" calcext:value-type="string">
            <text:p>1:07</text:p>
          </table:table-cell>
          <table:table-cell office:value-type="string" calcext:value-type="string">
            <text:p>Dingdong, Julian, Matt</text:p>
          </table:table-cell>
          <table:table-cell office:value-type="string" calcext:value-type="string">
            <text:p>smNWhTWgKho</text:p>
          </table:table-cell>
          <table:table-cell/>
          <table:table-cell table:formula="of:=&quot;['&quot; &amp; [.A466] &amp; &quot;', '&quot; &amp; YEAR([.B466]) &amp; &quot;-&quot; &amp; MONTH([.B466]) &amp; &quot;-&quot; &amp; DAY([.B466]) &amp; &quot;', '&quot; &amp; [.C466] &amp; &quot;', '&quot; &amp; [.D466] &amp; &quot;', '&quot; &amp; [.E466] &amp; &quot;', '&quot; &amp; [.F466] &amp; &quot;'],&quot;" office:value-type="string" office:string-value="['Sonic Adventure 2 Battle', '2016-8-25', '1:07', 'Dingdong, Julian, Matt', 'smNWhTWgKho', '']," calcext:value-type="string">
            <text:p>['Sonic Adventure 2 Battle', '2016-8-25', '1:07', 'Dingdong, Julian, Matt', 'smNWhTWgKho', ''],</text:p>
          </table:table-cell>
        </table:table-row>
        <table:table-row table:style-name="ro1">
          <table:table-cell office:value-type="string" calcext:value-type="string">
            <text:p>Sonic Adventure 2 Randomizer (With Mods!)</text:p>
          </table:table-cell>
          <table:table-cell office:value-type="date" office:date-value="2024-12-10" calcext:value-type="date">
            <text:p>2024-12-10</text:p>
          </table:table-cell>
          <table:table-cell office:value-type="string" calcext:value-type="string">
            <text:p>0:53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sAnSxjaPj0o</text:p>
          </table:table-cell>
          <table:table-cell/>
          <table:table-cell table:formula="of:=&quot;['&quot; &amp; [.A467] &amp; &quot;', '&quot; &amp; YEAR([.B467]) &amp; &quot;-&quot; &amp; MONTH([.B467]) &amp; &quot;-&quot; &amp; DAY([.B467]) &amp; &quot;', '&quot; &amp; [.C467] &amp; &quot;', '&quot; &amp; [.D467] &amp; &quot;', '&quot; &amp; [.E467] &amp; &quot;', '&quot; &amp; [.F467] &amp; &quot;'],&quot;" office:value-type="string" office:string-value="['Sonic Adventure 2 Randomizer (With Mods!)', '2024-12-10', '0:53', 'Cory, Lyle', 'sAnSxjaPj0o', '']," calcext:value-type="string">
            <text:p>['Sonic Adventure 2 Randomizer (With Mods!)', '2024-12-10', '0:53', 'Cory, Lyle', 'sAnSxjaPj0o', ''],</text:p>
          </table:table-cell>
        </table:table-row>
        <table:table-row table:style-name="ro1">
          <table:table-cell office:value-type="string" calcext:value-type="string">
            <text:p>Sonic CD</text:p>
          </table:table-cell>
          <table:table-cell office:value-type="date" office:date-value="2024-12-17" calcext:value-type="date">
            <text:p>2024-12-17</text:p>
          </table:table-cell>
          <table:table-cell office:value-type="string" calcext:value-type="string">
            <text:p>0:52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FvhJmHvnP7c</text:p>
          </table:table-cell>
          <table:table-cell/>
          <table:table-cell table:formula="of:=&quot;['&quot; &amp; [.A468] &amp; &quot;', '&quot; &amp; YEAR([.B468]) &amp; &quot;-&quot; &amp; MONTH([.B468]) &amp; &quot;-&quot; &amp; DAY([.B468]) &amp; &quot;', '&quot; &amp; [.C468] &amp; &quot;', '&quot; &amp; [.D468] &amp; &quot;', '&quot; &amp; [.E468] &amp; &quot;', '&quot; &amp; [.F468] &amp; &quot;'],&quot;" office:value-type="string" office:string-value="['Sonic CD', '2024-12-17', '0:52', 'Cory, Lyle', 'FvhJmHvnP7c', '']," calcext:value-type="string">
            <text:p>['Sonic CD', '2024-12-17', '0:52', 'Cory, Lyle', 'FvhJmHvnP7c', ''],</text:p>
          </table:table-cell>
        </table:table-row>
        <table:table-row table:style-name="ro1">
          <table:table-cell office:value-type="string" calcext:value-type="string">
            <text:p>Sonic Forces</text:p>
          </table:table-cell>
          <table:table-cell office:value-type="date" office:date-value="2024-02-16" calcext:value-type="date">
            <text:p>2024-02-16</text:p>
          </table:table-cell>
          <table:table-cell office:value-type="string" calcext:value-type="string">
            <text:p>2:39</text:p>
          </table:table-cell>
          <table:table-cell office:value-type="string" calcext:value-type="string">
            <text:p>Cory, Adam</text:p>
          </table:table-cell>
          <table:table-cell office:value-type="string" calcext:value-type="string">
            <text:p>WJ7oWiPEphA</text:p>
          </table:table-cell>
          <table:table-cell/>
          <table:table-cell table:formula="of:=&quot;['&quot; &amp; [.A469] &amp; &quot;', '&quot; &amp; YEAR([.B469]) &amp; &quot;-&quot; &amp; MONTH([.B469]) &amp; &quot;-&quot; &amp; DAY([.B469]) &amp; &quot;', '&quot; &amp; [.C469] &amp; &quot;', '&quot; &amp; [.D469] &amp; &quot;', '&quot; &amp; [.E469] &amp; &quot;', '&quot; &amp; [.F469] &amp; &quot;'],&quot;" office:value-type="string" office:string-value="['Sonic Forces', '2024-2-16', '2:39', 'Cory, Adam', 'WJ7oWiPEphA', '']," calcext:value-type="string">
            <text:p>['Sonic Forces', '2024-2-16', '2:39', 'Cory, Adam', 'WJ7oWiPEphA', ''],</text:p>
          </table:table-cell>
        </table:table-row>
        <table:table-row table:style-name="ro1">
          <table:table-cell office:value-type="string" calcext:value-type="string">
            <text:p>Sonic Frontiers</text:p>
          </table:table-cell>
          <table:table-cell office:value-type="date" office:date-value="2023-07-12" calcext:value-type="date">
            <text:p>2023-07-12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No_o8J8IjWw</text:p>
          </table:table-cell>
          <table:table-cell/>
          <table:table-cell table:formula="of:=&quot;['&quot; &amp; [.A470] &amp; &quot;', '&quot; &amp; YEAR([.B470]) &amp; &quot;-&quot; &amp; MONTH([.B470]) &amp; &quot;-&quot; &amp; DAY([.B470]) &amp; &quot;', '&quot; &amp; [.C470] &amp; &quot;', '&quot; &amp; [.D470] &amp; &quot;', '&quot; &amp; [.E470] &amp; &quot;', '&quot; &amp; [.F470] &amp; &quot;'],&quot;" office:value-type="string" office:string-value="['Sonic Frontiers', '2023-7-12', '9:30', 'Cory, Lyle', 'No_o8J8IjWw', '']," calcext:value-type="string">
            <text:p>['Sonic Frontiers', '2023-7-12', '9:30', 'Cory, Lyle', 'No_o8J8IjWw', ''],</text:p>
          </table:table-cell>
        </table:table-row>
        <table:table-row table:style-name="ro1">
          <table:table-cell office:value-type="string" calcext:value-type="string">
            <text:p>Sonic Generations</text:p>
          </table:table-cell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2:38</text:p>
          </table:table-cell>
          <table:table-cell office:value-type="string" calcext:value-type="string">
            <text:p>Cory, Zach, Lyle</text:p>
          </table:table-cell>
          <table:table-cell office:value-type="string" calcext:value-type="string">
            <text:p>ihw5rZ-7HcA</text:p>
          </table:table-cell>
          <table:table-cell/>
          <table:table-cell table:formula="of:=&quot;['&quot; &amp; [.A471] &amp; &quot;', '&quot; &amp; YEAR([.B471]) &amp; &quot;-&quot; &amp; MONTH([.B471]) &amp; &quot;-&quot; &amp; DAY([.B471]) &amp; &quot;', '&quot; &amp; [.C471] &amp; &quot;', '&quot; &amp; [.D471] &amp; &quot;', '&quot; &amp; [.E471] &amp; &quot;', '&quot; &amp; [.F471] &amp; &quot;'],&quot;" office:value-type="string" office:string-value="['Sonic Generations', '2022-10-1', '2:38', 'Cory, Zach, Lyle', 'ihw5rZ-7HcA', '']," calcext:value-type="string">
            <text:p>['Sonic Generations', '2022-10-1', '2:38', 'Cory, Zach, Lyle', 'ihw5rZ-7HcA', ''],</text:p>
          </table:table-cell>
        </table:table-row>
        <table:table-row table:style-name="ro1">
          <table:table-cell office:value-type="string" calcext:value-type="string">
            <text:p>Sonic Heroes</text:p>
          </table:table-cell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Cory, Zach</text:p>
          </table:table-cell>
          <table:table-cell office:value-type="string" calcext:value-type="string">
            <text:p>bOlO9nT0Zbk</text:p>
          </table:table-cell>
          <table:table-cell/>
          <table:table-cell table:formula="of:=&quot;['&quot; &amp; [.A472] &amp; &quot;', '&quot; &amp; YEAR([.B472]) &amp; &quot;-&quot; &amp; MONTH([.B472]) &amp; &quot;-&quot; &amp; DAY([.B472]) &amp; &quot;', '&quot; &amp; [.C472] &amp; &quot;', '&quot; &amp; [.D472] &amp; &quot;', '&quot; &amp; [.E472] &amp; &quot;', '&quot; &amp; [.F472] &amp; &quot;'],&quot;" office:value-type="string" office:string-value="['Sonic Heroes', '2022-4-19', '9:26', 'Cory, Zach', 'bOlO9nT0Zbk', '']," calcext:value-type="string">
            <text:p>['Sonic Heroes', '2022-4-19', '9:26', 'Cory, Zach', 'bOlO9nT0Zbk', ''],</text:p>
          </table:table-cell>
        </table:table-row>
        <table:table-row table:style-name="ro1">
          <table:table-cell office:value-type="string" calcext:value-type="string">
            <text:p>Sonic Robo Blast 2</text:p>
          </table:table-cell>
          <table:table-cell office:value-type="date" office:date-value="2021-07-23" calcext:value-type="date">
            <text:p>2021-07-23</text:p>
          </table:table-cell>
          <table:table-cell office:value-type="string" calcext:value-type="string">
            <text:p>1:0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T9lKLVEgjg0</text:p>
          </table:table-cell>
          <table:table-cell/>
          <table:table-cell table:formula="of:=&quot;['&quot; &amp; [.A473] &amp; &quot;', '&quot; &amp; YEAR([.B473]) &amp; &quot;-&quot; &amp; MONTH([.B473]) &amp; &quot;-&quot; &amp; DAY([.B473]) &amp; &quot;', '&quot; &amp; [.C473] &amp; &quot;', '&quot; &amp; [.D473] &amp; &quot;', '&quot; &amp; [.E473] &amp; &quot;', '&quot; &amp; [.F473] &amp; &quot;'],&quot;" office:value-type="string" office:string-value="['Sonic Robo Blast 2', '2021-7-23', '1:03', 'Dingdong, Julian', 'T9lKLVEgjg0', '']," calcext:value-type="string">
            <text:p>['Sonic Robo Blast 2', '2021-7-23', '1:03', 'Dingdong, Julian', 'T9lKLVEgjg0', ''],</text:p>
          </table:table-cell>
        </table:table-row>
        <table:table-row table:style-name="ro1">
          <table:table-cell office:value-type="string" calcext:value-type="string">
            <text:p>Sonic Shuffle</text:p>
          </table:table-cell>
          <table:table-cell office:value-type="date" office:date-value="2017-03-21" calcext:value-type="date">
            <text:p>2017-03-21</text:p>
          </table:table-cell>
          <table:table-cell office:value-type="string" calcext:value-type="string">
            <text:p>0:58</text:p>
          </table:table-cell>
          <table:table-cell office:value-type="string" calcext:value-type="string">
            <text:p>GameGrumps Aaron, Dingdong, Julian</text:p>
          </table:table-cell>
          <table:table-cell office:value-type="string" calcext:value-type="string">
            <text:p>tQ3JhtJsgkM</text:p>
          </table:table-cell>
          <table:table-cell/>
          <table:table-cell table:formula="of:=&quot;['&quot; &amp; [.A474] &amp; &quot;', '&quot; &amp; YEAR([.B474]) &amp; &quot;-&quot; &amp; MONTH([.B474]) &amp; &quot;-&quot; &amp; DAY([.B474]) &amp; &quot;', '&quot; &amp; [.C474] &amp; &quot;', '&quot; &amp; [.D474] &amp; &quot;', '&quot; &amp; [.E474] &amp; &quot;', '&quot; &amp; [.F474] &amp; &quot;'],&quot;" office:value-type="string" office:string-value="['Sonic Shuffle', '2017-3-21', '0:58', 'GameGrumps Aaron, Dingdong, Julian', 'tQ3JhtJsgkM', '']," calcext:value-type="string">
            <text:p>['Sonic Shuffle', '2017-3-21', '0:58', 'GameGrumps Aaron, Dingdong, Julian', 'tQ3JhtJsgkM', ''],</text:p>
          </table:table-cell>
        </table:table-row>
        <table:table-row table:style-name="ro1">
          <table:table-cell office:value-type="string" calcext:value-type="string">
            <text:p>Sonic Superstars</text:p>
          </table:table-cell>
          <table:table-cell office:value-type="date" office:date-value="2024-05-28" calcext:value-type="date">
            <text:p>2024-05-28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Cory, Lyle, Tomar</text:p>
          </table:table-cell>
          <table:table-cell office:value-type="string" calcext:value-type="string">
            <text:p>EA5_OypM1YA</text:p>
          </table:table-cell>
          <table:table-cell/>
          <table:table-cell table:formula="of:=&quot;['&quot; &amp; [.A475] &amp; &quot;', '&quot; &amp; YEAR([.B475]) &amp; &quot;-&quot; &amp; MONTH([.B475]) &amp; &quot;-&quot; &amp; DAY([.B475]) &amp; &quot;', '&quot; &amp; [.C475] &amp; &quot;', '&quot; &amp; [.D475] &amp; &quot;', '&quot; &amp; [.E475] &amp; &quot;', '&quot; &amp; [.F475] &amp; &quot;'],&quot;" office:value-type="string" office:string-value="['Sonic Superstars', '2024-5-28', '0:50', 'Cory, Lyle, Tomar', 'EA5_OypM1YA', '']," calcext:value-type="string">
            <text:p>['Sonic Superstars', '2024-5-28', '0:50', 'Cory, Lyle, Tomar', 'EA5_OypM1YA', ''],</text:p>
          </table:table-cell>
        </table:table-row>
        <table:table-row table:style-name="ro1">
          <table:table-cell office:value-type="string" calcext:value-type="string">
            <text:p>Sonic The Hedgehog</text:p>
          </table:table-cell>
          <table:table-cell office:value-type="date" office:date-value="2018-11-08" calcext:value-type="date">
            <text:p>2018-11-08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si-mdZTQBAg</text:p>
          </table:table-cell>
          <table:table-cell/>
          <table:table-cell table:formula="of:=&quot;['&quot; &amp; [.A476] &amp; &quot;', '&quot; &amp; YEAR([.B476]) &amp; &quot;-&quot; &amp; MONTH([.B476]) &amp; &quot;-&quot; &amp; DAY([.B476]) &amp; &quot;', '&quot; &amp; [.C476] &amp; &quot;', '&quot; &amp; [.D476] &amp; &quot;', '&quot; &amp; [.E476] &amp; &quot;', '&quot; &amp; [.F476] &amp; &quot;'],&quot;" office:value-type="string" office:string-value="['Sonic The Hedgehog', '2018-11-8', '0:43', 'Zach, Tomar', 'si-mdZTQBAg', '']," calcext:value-type="string">
            <text:p>['Sonic The Hedgehog', '2018-11-8', '0:43', 'Zach, Tomar', 'si-mdZTQBAg', ''],</text:p>
          </table:table-cell>
        </table:table-row>
        <table:table-row table:style-name="ro1">
          <table:table-cell office:value-type="string" calcext:value-type="string">
            <text:p>Sonic The Hedgehog 2</text:p>
          </table:table-cell>
          <table:table-cell office:value-type="date" office:date-value="2020-02-23" calcext:value-type="date">
            <text:p>2020-02-23</text:p>
          </table:table-cell>
          <table:table-cell office:value-type="string" calcext:value-type="string">
            <text:p>0:58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l0_gNptNHOI</text:p>
          </table:table-cell>
          <table:table-cell/>
          <table:table-cell table:formula="of:=&quot;['&quot; &amp; [.A477] &amp; &quot;', '&quot; &amp; YEAR([.B477]) &amp; &quot;-&quot; &amp; MONTH([.B477]) &amp; &quot;-&quot; &amp; DAY([.B477]) &amp; &quot;', '&quot; &amp; [.C477] &amp; &quot;', '&quot; &amp; [.D477] &amp; &quot;', '&quot; &amp; [.E477] &amp; &quot;', '&quot; &amp; [.F477] &amp; &quot;'],&quot;" office:value-type="string" office:string-value="['Sonic The Hedgehog 2', '2020-2-23', '0:58', 'Cory, Lyle', 'l0_gNptNHOI', '']," calcext:value-type="string">
            <text:p>['Sonic The Hedgehog 2', '2020-2-23', '0:58', 'Cory, Lyle', 'l0_gNptNHOI', ''],</text:p>
          </table:table-cell>
        </table:table-row>
        <table:table-row table:style-name="ro1">
          <table:table-cell office:value-type="string" calcext:value-type="string">
            <text:p>Sonic The Hedgehog 3 And Knuckles</text:p>
          </table:table-cell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2:06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4mx5CC3MjX0</text:p>
          </table:table-cell>
          <table:table-cell/>
          <table:table-cell table:formula="of:=&quot;['&quot; &amp; [.A478] &amp; &quot;', '&quot; &amp; YEAR([.B478]) &amp; &quot;-&quot; &amp; MONTH([.B478]) &amp; &quot;-&quot; &amp; DAY([.B478]) &amp; &quot;', '&quot; &amp; [.C478] &amp; &quot;', '&quot; &amp; [.D478] &amp; &quot;', '&quot; &amp; [.E478] &amp; &quot;', '&quot; &amp; [.F478] &amp; &quot;'],&quot;" office:value-type="string" office:string-value="['Sonic The Hedgehog 3 And Knuckles', '2020-3-18', '2:06', 'Cory, Tomar', '4mx5CC3MjX0', '']," calcext:value-type="string">
            <text:p>['Sonic The Hedgehog 3 And Knuckles', '2020-3-18', '2:06', 'Cory, Tomar', '4mx5CC3MjX0', ''],</text:p>
          </table:table-cell>
        </table:table-row>
        <table:table-row table:style-name="ro1">
          <table:table-cell office:value-type="string" calcext:value-type="string">
            <text:p>Sonic Unleashed</text:p>
          </table:table-cell>
          <table:table-cell office:value-type="date" office:date-value="2025-03-10" calcext:value-type="date">
            <text:p>2025-03-10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JOwKSGixEic</text:p>
          </table:table-cell>
          <table:table-cell/>
          <table:table-cell table:formula="of:=&quot;['&quot; &amp; [.A479] &amp; &quot;', '&quot; &amp; YEAR([.B479]) &amp; &quot;-&quot; &amp; MONTH([.B479]) &amp; &quot;-&quot; &amp; DAY([.B479]) &amp; &quot;', '&quot; &amp; [.C479] &amp; &quot;', '&quot; &amp; [.D479] &amp; &quot;', '&quot; &amp; [.E479] &amp; &quot;', '&quot; &amp; [.F479] &amp; &quot;'],&quot;" office:value-type="string" office:string-value="['Sonic Unleashed', '2025-3-10', '5:55', 'Cory, Dave', 'JOwKSGixEic', '']," calcext:value-type="string">
            <text:p>['Sonic Unleashed', '2025-3-10', '5:55', 'Cory, Dave', 'JOwKSGixEic', ''],</text:p>
          </table:table-cell>
        </table:table-row>
        <table:table-row table:style-name="ro1">
          <table:table-cell office:value-type="string" calcext:value-type="string">
            <text:p>Sonic X Shadow Generations</text:p>
          </table:table-cell>
          <table:table-cell office:value-type="date" office:date-value="2025-06-17" calcext:value-type="date">
            <text:p>2025-06-17</text:p>
          </table:table-cell>
          <table:table-cell office:value-type="string" calcext:value-type="string">
            <text:p>2:5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6aKXHyFTs4Y</text:p>
          </table:table-cell>
          <table:table-cell/>
          <table:table-cell table:formula="of:=&quot;['&quot; &amp; [.A480] &amp; &quot;', '&quot; &amp; YEAR([.B480]) &amp; &quot;-&quot; &amp; MONTH([.B480]) &amp; &quot;-&quot; &amp; DAY([.B480]) &amp; &quot;', '&quot; &amp; [.C480] &amp; &quot;', '&quot; &amp; [.D480] &amp; &quot;', '&quot; &amp; [.E480] &amp; &quot;', '&quot; &amp; [.F480] &amp; &quot;'],&quot;" office:value-type="string" office:string-value="['Sonic X Shadow Generations', '2025-6-17', '2:55', 'Cory, Dave', '6aKXHyFTs4Y', '']," calcext:value-type="string">
            <text:p>['Sonic X Shadow Generations', '2025-6-17', '2:55', 'Cory, Dave', '6aKXHyFTs4Y', ''],</text:p>
          </table:table-cell>
        </table:table-row>
        <table:table-row table:style-name="ro1">
          <table:table-cell office:value-type="string" calcext:value-type="string">
            <text:p>Space Station 13 (2016)</text:p>
          </table:table-cell>
          <table:table-cell office:value-type="date" office:date-value="2016-12-01" calcext:value-type="date">
            <text:p>2016-12-01</text:p>
          </table:table-cell>
          <table:table-cell office:value-type="string" calcext:value-type="string">
            <text:p>0: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PNUT4SqbHdc</text:p>
          </table:table-cell>
          <table:table-cell/>
          <table:table-cell table:formula="of:=&quot;['&quot; &amp; [.A481] &amp; &quot;', '&quot; &amp; YEAR([.B481]) &amp; &quot;-&quot; &amp; MONTH([.B481]) &amp; &quot;-&quot; &amp; DAY([.B481]) &amp; &quot;', '&quot; &amp; [.C481] &amp; &quot;', '&quot; &amp; [.D481] &amp; &quot;', '&quot; &amp; [.E481] &amp; &quot;', '&quot; &amp; [.F481] &amp; &quot;'],&quot;" office:value-type="string" office:string-value="['Space Station 13 (2016)', '2016-12-1', '0:08', 'Solo', 'PNUT4SqbHdc', '']," calcext:value-type="string">
            <text:p>['Space Station 13 (2016)', '2016-12-1', '0:08', 'Solo', 'PNUT4SqbHdc', ''],</text:p>
          </table:table-cell>
        </table:table-row>
        <table:table-row table:style-name="ro1">
          <table:table-cell office:value-type="string" calcext:value-type="string">
            <text:p>Space Station 13 (2019)</text:p>
          </table:table-cell>
          <table:table-cell office:value-type="date" office:date-value="2019-04-29" calcext:value-type="date">
            <text:p>2019-04-29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haZ6mWxjlZo</text:p>
          </table:table-cell>
          <table:table-cell/>
          <table:table-cell table:formula="of:=&quot;['&quot; &amp; [.A482] &amp; &quot;', '&quot; &amp; YEAR([.B482]) &amp; &quot;-&quot; &amp; MONTH([.B482]) &amp; &quot;-&quot; &amp; DAY([.B482]) &amp; &quot;', '&quot; &amp; [.C482] &amp; &quot;', '&quot; &amp; [.D482] &amp; &quot;', '&quot; &amp; [.E482] &amp; &quot;', '&quot; &amp; [.F482] &amp; &quot;'],&quot;" office:value-type="string" office:string-value="['Space Station 13 (2019)', '2019-4-29', '0:24', 'Mick, Tomar', 'haZ6mWxjlZo', '']," calcext:value-type="string">
            <text:p>['Space Station 13 (2019)', '2019-4-29', '0:24', 'Mick, Tomar', 'haZ6mWxjlZo', ''],</text:p>
          </table:table-cell>
        </table:table-row>
        <table:table-row table:style-name="ro1">
          <table:table-cell office:value-type="string" calcext:value-type="string">
            <text:p>Spark The Electric Jester 2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0:1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xWGuwNKJcq4</text:p>
          </table:table-cell>
          <table:table-cell/>
          <table:table-cell table:formula="of:=&quot;['&quot; &amp; [.A483] &amp; &quot;', '&quot; &amp; YEAR([.B483]) &amp; &quot;-&quot; &amp; MONTH([.B483]) &amp; &quot;-&quot; &amp; DAY([.B483]) &amp; &quot;', '&quot; &amp; [.C483] &amp; &quot;', '&quot; &amp; [.D483] &amp; &quot;', '&quot; &amp; [.E483] &amp; &quot;', '&quot; &amp; [.F483] &amp; &quot;'],&quot;" office:value-type="string" office:string-value="['Spark The Electric Jester 2', '2019-8-1', '0:19', 'Lyle, Tomar', 'xWGuwNKJcq4', '']," calcext:value-type="string">
            <text:p>['Spark The Electric Jester 2', '2019-8-1', '0:19', 'Lyle, Tomar', 'xWGuwNKJcq4', ''],</text:p>
          </table:table-cell>
        </table:table-row>
        <table:table-row table:style-name="ro1">
          <table:table-cell office:value-type="string" calcext:value-type="string">
            <text:p>Sparkster</text:p>
          </table:table-cell>
          <table:table-cell office:value-type="date" office:date-value="2018-08-23" calcext:value-type="date">
            <text:p>2018-08-23</text:p>
          </table:table-cell>
          <table:table-cell office:value-type="string" calcext:value-type="string">
            <text:p>0:15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tMk17IgZiS4</text:p>
          </table:table-cell>
          <table:table-cell/>
          <table:table-cell table:formula="of:=&quot;['&quot; &amp; [.A484] &amp; &quot;', '&quot; &amp; YEAR([.B484]) &amp; &quot;-&quot; &amp; MONTH([.B484]) &amp; &quot;-&quot; &amp; DAY([.B484]) &amp; &quot;', '&quot; &amp; [.C484] &amp; &quot;', '&quot; &amp; [.D484] &amp; &quot;', '&quot; &amp; [.E484] &amp; &quot;', '&quot; &amp; [.F484] &amp; &quot;'],&quot;" office:value-type="string" office:string-value="['Sparkster', '2018-8-23', '0:15', 'Zach, Lyle', 'tMk17IgZiS4', '']," calcext:value-type="string">
            <text:p>['Sparkster', '2018-8-23', '0:15', 'Zach, Lyle', 'tMk17IgZiS4', ''],</text:p>
          </table:table-cell>
        </table:table-row>
        <table:table-row table:style-name="ro1">
          <table:table-cell office:value-type="string" calcext:value-type="string">
            <text:p>Speed Racer - Ep 1</text:p>
          </table:table-cell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qva4OFxa-mE</text:p>
          </table:table-cell>
          <table:table-cell/>
          <table:table-cell table:formula="of:=&quot;['&quot; &amp; [.A485] &amp; &quot;', '&quot; &amp; YEAR([.B485]) &amp; &quot;-&quot; &amp; MONTH([.B485]) &amp; &quot;-&quot; &amp; DAY([.B485]) &amp; &quot;', '&quot; &amp; [.C485] &amp; &quot;', '&quot; &amp; [.D485] &amp; &quot;', '&quot; &amp; [.E485] &amp; &quot;', '&quot; &amp; [.F485] &amp; &quot;'],&quot;" office:value-type="string" office:string-value="['Speed Racer - Ep 1', '2017-7-26', '0:10', 'Dingdong, Julian', 'qva4OFxa-mE', '']," calcext:value-type="string">
            <text:p>['Speed Racer - Ep 1', '2017-7-26', '0:10', 'Dingdong, Julian', 'qva4OFxa-mE', ''],</text:p>
          </table:table-cell>
        </table:table-row>
        <table:table-row table:style-name="ro1">
          <table:table-cell office:value-type="string" calcext:value-type="string">
            <text:p>Speed Racer - Ep 2</text:p>
          </table:table-cell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t4MJ2Xug1Qo</text:p>
          </table:table-cell>
          <table:table-cell/>
          <table:table-cell table:formula="of:=&quot;['&quot; &amp; [.A486] &amp; &quot;', '&quot; &amp; YEAR([.B486]) &amp; &quot;-&quot; &amp; MONTH([.B486]) &amp; &quot;-&quot; &amp; DAY([.B486]) &amp; &quot;', '&quot; &amp; [.C486] &amp; &quot;', '&quot; &amp; [.D486] &amp; &quot;', '&quot; &amp; [.E486] &amp; &quot;', '&quot; &amp; [.F486] &amp; &quot;'],&quot;" office:value-type="string" office:string-value="['Speed Racer - Ep 2', '2017-7-27', '0:10', 'Dingdong, Julian', 't4MJ2Xug1Qo', '']," calcext:value-type="string">
            <text:p>['Speed Racer - Ep 2', '2017-7-27', '0:10', 'Dingdong, Julian', 't4MJ2Xug1Qo', ''],</text:p>
          </table:table-cell>
        </table:table-row>
        <table:table-row table:style-name="ro1">
          <table:table-cell office:value-type="string" calcext:value-type="string">
            <text:p>Spider-Man 2 (2014)</text:p>
          </table:table-cell>
          <table:table-cell office:value-type="date" office:date-value="2014-11-08" calcext:value-type="date">
            <text:p>2014-11-08</text:p>
          </table:table-cell>
          <table:table-cell office:value-type="string" calcext:value-type="string">
            <text:p>0:46</text:p>
          </table:table-cell>
          <table:table-cell office:value-type="string" calcext:value-type="string">
            <text:p>Zach, Cory</text:p>
          </table:table-cell>
          <table:table-cell office:value-type="string" calcext:value-type="string">
            <text:p>DqAam41Qau0</text:p>
          </table:table-cell>
          <table:table-cell/>
          <table:table-cell table:formula="of:=&quot;['&quot; &amp; [.A487] &amp; &quot;', '&quot; &amp; YEAR([.B487]) &amp; &quot;-&quot; &amp; MONTH([.B487]) &amp; &quot;-&quot; &amp; DAY([.B487]) &amp; &quot;', '&quot; &amp; [.C487] &amp; &quot;', '&quot; &amp; [.D487] &amp; &quot;', '&quot; &amp; [.E487] &amp; &quot;', '&quot; &amp; [.F487] &amp; &quot;'],&quot;" office:value-type="string" office:string-value="['Spider-Man 2 (2014)', '2014-11-8', '0:46', 'Zach, Cory', 'DqAam41Qau0', '']," calcext:value-type="string">
            <text:p>['Spider-Man 2 (2014)', '2014-11-8', '0:46', 'Zach, Cory', 'DqAam41Qau0', ''],</text:p>
          </table:table-cell>
        </table:table-row>
        <table:table-row table:style-name="ro1">
          <table:table-cell office:value-type="string" calcext:value-type="string">
            <text:p>Spider-Man 2 (2018)</text:p>
          </table:table-cell>
          <table:table-cell office:value-type="date" office:date-value="2018-07-22" calcext:value-type="date">
            <text:p>2018-07-22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LI9iladWxjw</text:p>
          </table:table-cell>
          <table:table-cell/>
          <table:table-cell table:formula="of:=&quot;['&quot; &amp; [.A488] &amp; &quot;', '&quot; &amp; YEAR([.B488]) &amp; &quot;-&quot; &amp; MONTH([.B488]) &amp; &quot;-&quot; &amp; DAY([.B488]) &amp; &quot;', '&quot; &amp; [.C488] &amp; &quot;', '&quot; &amp; [.D488] &amp; &quot;', '&quot; &amp; [.E488] &amp; &quot;', '&quot; &amp; [.F488] &amp; &quot;'],&quot;" office:value-type="string" office:string-value="['Spider-Man 2 (2018)', '2018-7-22', '3:41', 'Zach, Lyle', 'LI9iladWxjw', '']," calcext:value-type="string">
            <text:p>['Spider-Man 2 (2018)', '2018-7-22', '3:41', 'Zach, Lyle', 'LI9iladWxjw', ''],</text:p>
          </table:table-cell>
        </table:table-row>
        <table:table-row table:style-name="ro1">
          <table:table-cell office:value-type="string" calcext:value-type="string">
            <text:p>Spongebob Squarepants - Battle For Bikini Bottom - Rehydrated</text:p>
          </table:table-cell>
          <table:table-cell office:value-type="date" office:date-value="2020-08-31" calcext:value-type="date">
            <text:p>2020-08-31</text:p>
          </table:table-cell>
          <table:table-cell office:value-type="string" calcext:value-type="string">
            <text:p>0:31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9X5kQub0_A8</text:p>
          </table:table-cell>
          <table:table-cell/>
          <table:table-cell table:formula="of:=&quot;['&quot; &amp; [.A489] &amp; &quot;', '&quot; &amp; YEAR([.B489]) &amp; &quot;-&quot; &amp; MONTH([.B489]) &amp; &quot;-&quot; &amp; DAY([.B489]) &amp; &quot;', '&quot; &amp; [.C489] &amp; &quot;', '&quot; &amp; [.D489] &amp; &quot;', '&quot; &amp; [.E489] &amp; &quot;', '&quot; &amp; [.F489] &amp; &quot;'],&quot;" office:value-type="string" office:string-value="['Spongebob Squarepants - Battle For Bikini Bottom - Rehydrated', '2020-8-31', '0:31', 'Zach, Lyle', '9X5kQub0_A8', '']," calcext:value-type="string">
            <text:p>['Spongebob Squarepants - Battle For Bikini Bottom - Rehydrated', '2020-8-31', '0:31', 'Zach, Lyle', '9X5kQub0_A8', ''],</text:p>
          </table:table-cell>
        </table:table-row>
        <table:table-row table:style-name="ro1">
          <table:table-cell office:value-type="string" calcext:value-type="string">
            <text:p>Spooky MS-DOS Games</text:p>
          </table:table-cell>
          <table:table-cell office:value-type="date" office:date-value="2023-10-29" calcext:value-type="date">
            <text:p>2023-10-29</text:p>
          </table:table-cell>
          <table:table-cell office:value-type="string" calcext:value-type="string">
            <text:p>0:36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qwYwpmiukls</text:p>
          </table:table-cell>
          <table:table-cell/>
          <table:table-cell table:formula="of:=&quot;['&quot; &amp; [.A490] &amp; &quot;', '&quot; &amp; YEAR([.B490]) &amp; &quot;-&quot; &amp; MONTH([.B490]) &amp; &quot;-&quot; &amp; DAY([.B490]) &amp; &quot;', '&quot; &amp; [.C490] &amp; &quot;', '&quot; &amp; [.D490] &amp; &quot;', '&quot; &amp; [.E490] &amp; &quot;', '&quot; &amp; [.F490] &amp; &quot;'],&quot;" office:value-type="string" office:string-value="['Spooky MS-DOS Games', '2023-10-29', '0:36', 'Cory, Tomar', 'qwYwpmiukls', '']," calcext:value-type="string">
            <text:p>['Spooky MS-DOS Games', '2023-10-29', '0:36', 'Cory, Tomar', 'qwYwpmiukls', ''],</text:p>
          </table:table-cell>
        </table:table-row>
        <table:table-row table:style-name="ro1">
          <table:table-cell office:value-type="string" calcext:value-type="string">
            <text:p>Spooky's Jump Scare Mansion</text:p>
          </table:table-cell>
          <table:table-cell office:value-type="date" office:date-value="2019-11-11" calcext:value-type="date">
            <text:p>2019-11-11</text:p>
          </table:table-cell>
          <table:table-cell office:value-type="string" calcext:value-type="string">
            <text:p>1:4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sbwI9Vq_bNE</text:p>
          </table:table-cell>
          <table:table-cell/>
          <table:table-cell table:formula="of:=&quot;['&quot; &amp; [.A491] &amp; &quot;', '&quot; &amp; YEAR([.B491]) &amp; &quot;-&quot; &amp; MONTH([.B491]) &amp; &quot;-&quot; &amp; DAY([.B491]) &amp; &quot;', '&quot; &amp; [.C491] &amp; &quot;', '&quot; &amp; [.D491] &amp; &quot;', '&quot; &amp; [.E491] &amp; &quot;', '&quot; &amp; [.F491] &amp; &quot;'],&quot;" office:value-type="string" office:string-value="['Spooky's Jump Scare Mansion', '2019-11-11', '1:45', 'Cory, Dave', 'sbwI9Vq_bNE', '']," calcext:value-type="string">
            <text:p>['Spooky's Jump Scare Mansion', '2019-11-11', '1:45', 'Cory, Dave', 'sbwI9Vq_bNE', ''],</text:p>
          </table:table-cell>
        </table:table-row>
        <table:table-row table:style-name="ro1">
          <table:table-cell office:value-type="string" calcext:value-type="string">
            <text:p>Spooky's Jump Scare Mansion - HD Renovation</text:p>
          </table:table-cell>
          <table:table-cell office:value-type="date" office:date-value="2020-10-21" calcext:value-type="date">
            <text:p>2020-10-21</text:p>
          </table:table-cell>
          <table:table-cell office:value-type="string" calcext:value-type="string">
            <text:p>2:39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I-i7jKXf86I</text:p>
          </table:table-cell>
          <table:table-cell/>
          <table:table-cell table:formula="of:=&quot;['&quot; &amp; [.A492] &amp; &quot;', '&quot; &amp; YEAR([.B492]) &amp; &quot;-&quot; &amp; MONTH([.B492]) &amp; &quot;-&quot; &amp; DAY([.B492]) &amp; &quot;', '&quot; &amp; [.C492] &amp; &quot;', '&quot; &amp; [.D492] &amp; &quot;', '&quot; &amp; [.E492] &amp; &quot;', '&quot; &amp; [.F492] &amp; &quot;'],&quot;" office:value-type="string" office:string-value="['Spooky's Jump Scare Mansion - HD Renovation', '2020-10-21', '2:39', 'Zach, Tomar', 'I-i7jKXf86I', '']," calcext:value-type="string">
            <text:p>['Spooky's Jump Scare Mansion - HD Renovation', '2020-10-21', '2:39', 'Zach, Tomar', 'I-i7jKXf86I', ''],</text:p>
          </table:table-cell>
        </table:table-row>
        <table:table-row table:style-name="ro1">
          <table:table-cell office:value-type="string" calcext:value-type="string">
            <text:p>Spyro The Dragon Games</text:p>
          </table:table-cell>
          <table:table-cell office:value-type="date" office:date-value="2017-05-20" calcext:value-type="date">
            <text:p>2017-05-20</text:p>
          </table:table-cell>
          <table:table-cell office:value-type="string" calcext:value-type="string">
            <text:p>1:07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6yLb_yx_Tpc</text:p>
          </table:table-cell>
          <table:table-cell/>
          <table:table-cell table:formula="of:=&quot;['&quot; &amp; [.A493] &amp; &quot;', '&quot; &amp; YEAR([.B493]) &amp; &quot;-&quot; &amp; MONTH([.B493]) &amp; &quot;-&quot; &amp; DAY([.B493]) &amp; &quot;', '&quot; &amp; [.C493] &amp; &quot;', '&quot; &amp; [.D493] &amp; &quot;', '&quot; &amp; [.E493] &amp; &quot;', '&quot; &amp; [.F493] &amp; &quot;'],&quot;" office:value-type="string" office:string-value="['Spyro The Dragon Games', '2017-5-20', '1:07', 'Dingdong, Julian', '6yLb_yx_Tpc', '']," calcext:value-type="string">
            <text:p>['Spyro The Dragon Games', '2017-5-20', '1:07', 'Dingdong, Julian', '6yLb_yx_Tpc', ''],</text:p>
          </table:table-cell>
        </table:table-row>
        <table:table-row table:style-name="ro1">
          <table:table-cell office:value-type="string" calcext:value-type="string">
            <text:p>Star Trek - Bridge Crew</text:p>
          </table:table-cell>
          <table:table-cell office:value-type="date" office:date-value="2017-06-05" calcext:value-type="date">
            <text:p>2017-06-05</text:p>
          </table:table-cell>
          <table:table-cell office:value-type="string" calcext:value-type="string">
            <text:p>0:1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lYTv4zlFHDE</text:p>
          </table:table-cell>
          <table:table-cell/>
          <table:table-cell table:formula="of:=&quot;['&quot; &amp; [.A494] &amp; &quot;', '&quot; &amp; YEAR([.B494]) &amp; &quot;-&quot; &amp; MONTH([.B494]) &amp; &quot;-&quot; &amp; DAY([.B494]) &amp; &quot;', '&quot; &amp; [.C494] &amp; &quot;', '&quot; &amp; [.D494] &amp; &quot;', '&quot; &amp; [.E494] &amp; &quot;', '&quot; &amp; [.F494] &amp; &quot;'],&quot;" office:value-type="string" office:string-value="['Star Trek - Bridge Crew', '2017-6-5', '0:14', 'Solo', 'lYTv4zlFHDE', '']," calcext:value-type="string">
            <text:p>['Star Trek - Bridge Crew', '2017-6-5', '0:14', 'Solo', 'lYTv4zlFHDE', ''],</text:p>
          </table:table-cell>
        </table:table-row>
        <table:table-row table:style-name="ro1">
          <table:table-cell office:value-type="string" calcext:value-type="string">
            <text:p>Star Wars - Obi-Wan</text:p>
          </table:table-cell>
          <table:table-cell office:value-type="date" office:date-value="2017-12-04" calcext:value-type="date">
            <text:p>2017-12-04</text:p>
          </table:table-cell>
          <table:table-cell office:value-type="string" calcext:value-type="string">
            <text:p>0:3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PvryRCf0-eE</text:p>
          </table:table-cell>
          <table:table-cell/>
          <table:table-cell table:formula="of:=&quot;['&quot; &amp; [.A495] &amp; &quot;', '&quot; &amp; YEAR([.B495]) &amp; &quot;-&quot; &amp; MONTH([.B495]) &amp; &quot;-&quot; &amp; DAY([.B495]) &amp; &quot;', '&quot; &amp; [.C495] &amp; &quot;', '&quot; &amp; [.D495] &amp; &quot;', '&quot; &amp; [.E495] &amp; &quot;', '&quot; &amp; [.F495] &amp; &quot;'],&quot;" office:value-type="string" office:string-value="['Star Wars - Obi-Wan', '2017-12-4', '0:34', 'Dingdong, Julian', 'PvryRCf0-eE', '']," calcext:value-type="string">
            <text:p>['Star Wars - Obi-Wan', '2017-12-4', '0:34', 'Dingdong, Julian', 'PvryRCf0-eE', ''],</text:p>
          </table:table-cell>
        </table:table-row>
        <table:table-row table:style-name="ro1">
          <table:table-cell office:value-type="string" calcext:value-type="string">
            <text:p>Starfield</text:p>
          </table:table-cell>
          <table:table-cell office:value-type="date" office:date-value="2023-12-14" calcext:value-type="date">
            <text:p>2023-12-14</text:p>
          </table:table-cell>
          <table:table-cell office:value-type="string" calcext:value-type="string">
            <text:p>0:5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G6HkQ_ufIDY</text:p>
          </table:table-cell>
          <table:table-cell/>
          <table:table-cell table:formula="of:=&quot;['&quot; &amp; [.A496] &amp; &quot;', '&quot; &amp; YEAR([.B496]) &amp; &quot;-&quot; &amp; MONTH([.B496]) &amp; &quot;-&quot; &amp; DAY([.B496]) &amp; &quot;', '&quot; &amp; [.C496] &amp; &quot;', '&quot; &amp; [.D496] &amp; &quot;', '&quot; &amp; [.E496] &amp; &quot;', '&quot; &amp; [.F496] &amp; &quot;'],&quot;" office:value-type="string" office:string-value="['Starfield', '2023-12-14', '0:59', 'Cory, Dave', 'G6HkQ_ufIDY', '']," calcext:value-type="string">
            <text:p>['Starfield', '2023-12-14', '0:59', 'Cory, Dave', 'G6HkQ_ufIDY', ''],</text:p>
          </table:table-cell>
        </table:table-row>
        <table:table-row table:style-name="ro1">
          <table:table-cell office:value-type="string" calcext:value-type="string">
            <text:p>Starship Troopers</text:p>
          </table:table-cell>
          <table:table-cell office:value-type="date" office:date-value="2023-07-06" calcext:value-type="date">
            <text:p>2023-07-06</text:p>
          </table:table-cell>
          <table:table-cell office:value-type="string" calcext:value-type="string">
            <text:p>0:1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vhezTd99Ftg</text:p>
          </table:table-cell>
          <table:table-cell/>
          <table:table-cell table:formula="of:=&quot;['&quot; &amp; [.A497] &amp; &quot;', '&quot; &amp; YEAR([.B497]) &amp; &quot;-&quot; &amp; MONTH([.B497]) &amp; &quot;-&quot; &amp; DAY([.B497]) &amp; &quot;', '&quot; &amp; [.C497] &amp; &quot;', '&quot; &amp; [.D497] &amp; &quot;', '&quot; &amp; [.E497] &amp; &quot;', '&quot; &amp; [.F497] &amp; &quot;'],&quot;" office:value-type="string" office:string-value="['Starship Troopers', '2023-7-6', '0:19', 'Lyle, Tomar', 'vhezTd99Ftg', '']," calcext:value-type="string">
            <text:p>['Starship Troopers', '2023-7-6', '0:19', 'Lyle, Tomar', 'vhezTd99Ftg', ''],</text:p>
          </table:table-cell>
        </table:table-row>
        <table:table-row table:style-name="ro1">
          <table:table-cell office:value-type="string" calcext:value-type="string">
            <text:p>State of Decay 2</text:p>
          </table:table-cell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0:34</text:p>
          </table:table-cell>
          <table:table-cell office:value-type="string" calcext:value-type="string">
            <text:p>Zach, Tomar, Adam</text:p>
          </table:table-cell>
          <table:table-cell office:value-type="string" calcext:value-type="string">
            <text:p>BqHFZKL2BRA</text:p>
          </table:table-cell>
          <table:table-cell/>
          <table:table-cell table:formula="of:=&quot;['&quot; &amp; [.A498] &amp; &quot;', '&quot; &amp; YEAR([.B498]) &amp; &quot;-&quot; &amp; MONTH([.B498]) &amp; &quot;-&quot; &amp; DAY([.B498]) &amp; &quot;', '&quot; &amp; [.C498] &amp; &quot;', '&quot; &amp; [.D498] &amp; &quot;', '&quot; &amp; [.E498] &amp; &quot;', '&quot; &amp; [.F498] &amp; &quot;'],&quot;" office:value-type="string" office:string-value="['State of Decay 2', '2025-10-20', '0:34', 'Zach, Tomar, Adam', 'BqHFZKL2BRA', '']," calcext:value-type="string">
            <text:p>['State of Decay 2', '2025-10-20', '0:34', 'Zach, Tomar, Adam', 'BqHFZKL2BRA', ''],</text:p>
          </table:table-cell>
        </table:table-row>
        <table:table-row table:style-name="ro1">
          <table:table-cell office:value-type="string" calcext:value-type="string">
            <text:p>Strange Itch.io Platforming Games</text:p>
          </table:table-cell>
          <table:table-cell office:value-type="date" office:date-value="2021-06-24" calcext:value-type="date">
            <text:p>2021-06-24</text:p>
          </table:table-cell>
          <table:table-cell office:value-type="string" calcext:value-type="string">
            <text:p>0:22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Fwo4lwqfZw4</text:p>
          </table:table-cell>
          <table:table-cell/>
          <table:table-cell table:formula="of:=&quot;['&quot; &amp; [.A499] &amp; &quot;', '&quot; &amp; YEAR([.B499]) &amp; &quot;-&quot; &amp; MONTH([.B499]) &amp; &quot;-&quot; &amp; DAY([.B499]) &amp; &quot;', '&quot; &amp; [.C499] &amp; &quot;', '&quot; &amp; [.D499] &amp; &quot;', '&quot; &amp; [.E499] &amp; &quot;', '&quot; &amp; [.F499] &amp; &quot;'],&quot;" office:value-type="string" office:string-value="['Strange Itch.io Platforming Games', '2021-6-24', '0:22', 'Zach, Tomar', 'Fwo4lwqfZw4', '']," calcext:value-type="string">
            <text:p>['Strange Itch.io Platforming Games', '2021-6-24', '0:22', 'Zach, Tomar', 'Fwo4lwqfZw4', ''],</text:p>
          </table:table-cell>
        </table:table-row>
        <table:table-row table:style-name="ro1">
          <table:table-cell office:value-type="string" calcext:value-type="string">
            <text:p>Street Fighter 3rd Strike</text:p>
          </table:table-cell>
          <table:table-cell office:value-type="date" office:date-value="2025-09-05" calcext:value-type="date">
            <text:p>2025-09-05</text:p>
          </table:table-cell>
          <table:table-cell office:value-type="string" calcext:value-type="string">
            <text:p>1:3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iN3ObCmfuk</text:p>
          </table:table-cell>
          <table:table-cell/>
          <table:table-cell table:formula="of:=&quot;['&quot; &amp; [.A500] &amp; &quot;', '&quot; &amp; YEAR([.B500]) &amp; &quot;-&quot; &amp; MONTH([.B500]) &amp; &quot;-&quot; &amp; DAY([.B500]) &amp; &quot;', '&quot; &amp; [.C500] &amp; &quot;', '&quot; &amp; [.D500] &amp; &quot;', '&quot; &amp; [.E500] &amp; &quot;', '&quot; &amp; [.F500] &amp; &quot;'],&quot;" office:value-type="string" office:string-value="['Street Fighter 3rd Strike', '2025-9-5', '1:30', 'Dave', 'uiN3ObCmfuk', '']," calcext:value-type="string">
            <text:p>['Street Fighter 3rd Strike', '2025-9-5', '1:30', 'Dave', 'uiN3ObCmfuk', ''],</text:p>
          </table:table-cell>
        </table:table-row>
        <table:table-row table:style-name="ro1">
          <table:table-cell office:value-type="string" calcext:value-type="string">
            <text:p>Street Fighter 6</text:p>
          </table:table-cell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u-ZCNPFOLn8</text:p>
          </table:table-cell>
          <table:table-cell/>
          <table:table-cell table:formula="of:=&quot;['&quot; &amp; [.A501] &amp; &quot;', '&quot; &amp; YEAR([.B501]) &amp; &quot;-&quot; &amp; MONTH([.B501]) &amp; &quot;-&quot; &amp; DAY([.B501]) &amp; &quot;', '&quot; &amp; [.C501] &amp; &quot;', '&quot; &amp; [.D501] &amp; &quot;', '&quot; &amp; [.E501] &amp; &quot;', '&quot; &amp; [.F501] &amp; &quot;'],&quot;" office:value-type="string" office:string-value="['Street Fighter 6', '2023-6-21', '1:00', 'Cory, Tomar', 'u-ZCNPFOLn8', '']," calcext:value-type="string">
            <text:p>['Street Fighter 6', '2023-6-21', '1:00', 'Cory, Tomar', 'u-ZCNPFOLn8', ''],</text:p>
          </table:table-cell>
        </table:table-row>
        <table:table-row table:style-name="ro1">
          <table:table-cell office:value-type="string" calcext:value-type="string">
            <text:p>Streets Of Fury</text:p>
          </table:table-cell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0:15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Kd2_zkUGtCY</text:p>
          </table:table-cell>
          <table:table-cell/>
          <table:table-cell table:formula="of:=&quot;['&quot; &amp; [.A502] &amp; &quot;', '&quot; &amp; YEAR([.B502]) &amp; &quot;-&quot; &amp; MONTH([.B502]) &amp; &quot;-&quot; &amp; DAY([.B502]) &amp; &quot;', '&quot; &amp; [.C502] &amp; &quot;', '&quot; &amp; [.D502] &amp; &quot;', '&quot; &amp; [.E502] &amp; &quot;', '&quot; &amp; [.F502] &amp; &quot;'],&quot;" office:value-type="string" office:string-value="['Streets Of Fury', '2018-1-29', '0:15', 'Dingdong, Julian', 'Kd2_zkUGtCY', '']," calcext:value-type="string">
            <text:p>['Streets Of Fury', '2018-1-29', '0:15', 'Dingdong, Julian', 'Kd2_zkUGtCY', ''],</text:p>
          </table:table-cell>
        </table:table-row>
        <table:table-row table:style-name="ro1">
          <table:table-cell office:value-type="string" calcext:value-type="string">
            <text:p>Stuart Little</text:p>
          </table:table-cell>
          <table:table-cell office:value-type="date" office:date-value="2020-11-02" calcext:value-type="date">
            <text:p>2020-11-02</text:p>
          </table:table-cell>
          <table:table-cell office:value-type="string" calcext:value-type="string">
            <text:p>0:36</text:p>
          </table:table-cell>
          <table:table-cell office:value-type="string" calcext:value-type="string">
            <text:p>Dingdong, Sonny</text:p>
          </table:table-cell>
          <table:table-cell office:value-type="string" calcext:value-type="string">
            <text:p>XU2hbYlnaGs</text:p>
          </table:table-cell>
          <table:table-cell/>
          <table:table-cell table:formula="of:=&quot;['&quot; &amp; [.A503] &amp; &quot;', '&quot; &amp; YEAR([.B503]) &amp; &quot;-&quot; &amp; MONTH([.B503]) &amp; &quot;-&quot; &amp; DAY([.B503]) &amp; &quot;', '&quot; &amp; [.C503] &amp; &quot;', '&quot; &amp; [.D503] &amp; &quot;', '&quot; &amp; [.E503] &amp; &quot;', '&quot; &amp; [.F503] &amp; &quot;'],&quot;" office:value-type="string" office:string-value="['Stuart Little', '2020-11-2', '0:36', 'Dingdong, Sonny', 'XU2hbYlnaGs', '']," calcext:value-type="string">
            <text:p>['Stuart Little', '2020-11-2', '0:36', 'Dingdong, Sonny', 'XU2hbYlnaGs', ''],</text:p>
          </table:table-cell>
        </table:table-row>
        <table:table-row table:style-name="ro1">
          <table:table-cell office:value-type="string" calcext:value-type="string">
            <text:p>Super Magnetic Neo</text:p>
          </table:table-cell>
          <table:table-cell office:value-type="date" office:date-value="2017-08-26" calcext:value-type="date">
            <text:p>2017-08-26</text:p>
          </table:table-cell>
          <table:table-cell office:value-type="string" calcext:value-type="string">
            <text:p>0:4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upTRvTVl6-M</text:p>
          </table:table-cell>
          <table:table-cell/>
          <table:table-cell table:formula="of:=&quot;['&quot; &amp; [.A504] &amp; &quot;', '&quot; &amp; YEAR([.B504]) &amp; &quot;-&quot; &amp; MONTH([.B504]) &amp; &quot;-&quot; &amp; DAY([.B504]) &amp; &quot;', '&quot; &amp; [.C504] &amp; &quot;', '&quot; &amp; [.D504] &amp; &quot;', '&quot; &amp; [.E504] &amp; &quot;', '&quot; &amp; [.F504] &amp; &quot;'],&quot;" office:value-type="string" office:string-value="['Super Magnetic Neo', '2017-8-26', '0:41', 'Dingdong, Julian', 'upTRvTVl6-M', '']," calcext:value-type="string">
            <text:p>['Super Magnetic Neo', '2017-8-26', '0:41', 'Dingdong, Julian', 'upTRvTVl6-M', ''],</text:p>
          </table:table-cell>
        </table:table-row>
        <table:table-row table:style-name="ro1">
          <table:table-cell office:value-type="string" calcext:value-type="string">
            <text:p>Super Mario 3D Land</text:p>
          </table:table-cell>
          <table:table-cell office:value-type="date" office:date-value="2024-11-24" calcext:value-type="date">
            <text:p>2024-11-24</text:p>
          </table:table-cell>
          <table:table-cell office:value-type="string" calcext:value-type="string">
            <text:p>2:06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MM2tYtfTrGU</text:p>
          </table:table-cell>
          <table:table-cell/>
          <table:table-cell table:formula="of:=&quot;['&quot; &amp; [.A505] &amp; &quot;', '&quot; &amp; YEAR([.B505]) &amp; &quot;-&quot; &amp; MONTH([.B505]) &amp; &quot;-&quot; &amp; DAY([.B505]) &amp; &quot;', '&quot; &amp; [.C505] &amp; &quot;', '&quot; &amp; [.D505] &amp; &quot;', '&quot; &amp; [.E505] &amp; &quot;', '&quot; &amp; [.F505] &amp; &quot;'],&quot;" office:value-type="string" office:string-value="['Super Mario 3D Land', '2024-11-24', '2:06', 'Cory, Dave', 'MM2tYtfTrGU', '']," calcext:value-type="string">
            <text:p>['Super Mario 3D Land', '2024-11-24', '2:06', 'Cory, Dave', 'MM2tYtfTrGU', ''],</text:p>
          </table:table-cell>
        </table:table-row>
        <table:table-row table:style-name="ro1">
          <table:table-cell office:value-type="string" calcext:value-type="string">
            <text:p>Super Mario 3D World</text:p>
          </table:table-cell>
          <table:table-cell office:value-type="date" office:date-value="2021-02-24" calcext:value-type="date">
            <text:p>2021-02-24</text:p>
          </table:table-cell>
          <table:table-cell office:value-type="string" calcext:value-type="string">
            <text:p>1:2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FrmkWoAby-M</text:p>
          </table:table-cell>
          <table:table-cell/>
          <table:table-cell table:formula="of:=&quot;['&quot; &amp; [.A506] &amp; &quot;', '&quot; &amp; YEAR([.B506]) &amp; &quot;-&quot; &amp; MONTH([.B506]) &amp; &quot;-&quot; &amp; DAY([.B506]) &amp; &quot;', '&quot; &amp; [.C506] &amp; &quot;', '&quot; &amp; [.D506] &amp; &quot;', '&quot; &amp; [.E506] &amp; &quot;', '&quot; &amp; [.F506] &amp; &quot;'],&quot;" office:value-type="string" office:string-value="['Super Mario 3D World', '2021-2-24', '1:27', 'Lyle, Tomar', 'FrmkWoAby-M', '']," calcext:value-type="string">
            <text:p>['Super Mario 3D World', '2021-2-24', '1:27', 'Lyle, Tomar', 'FrmkWoAby-M', ''],</text:p>
          </table:table-cell>
        </table:table-row>
        <table:table-row table:style-name="ro1">
          <table:table-cell office:value-type="string" calcext:value-type="string">
            <text:p>Super Mario 63 (Newgrounds Flash Game)</text:p>
          </table:table-cell>
          <table:table-cell office:value-type="date" office:date-value="2024-12-15" calcext:value-type="date">
            <text:p>2024-12-15</text:p>
          </table:table-cell>
          <table:table-cell office:value-type="string" calcext:value-type="string">
            <text:p>0:42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AWXBmzLHLug</text:p>
          </table:table-cell>
          <table:table-cell/>
          <table:table-cell table:formula="of:=&quot;['&quot; &amp; [.A507] &amp; &quot;', '&quot; &amp; YEAR([.B507]) &amp; &quot;-&quot; &amp; MONTH([.B507]) &amp; &quot;-&quot; &amp; DAY([.B507]) &amp; &quot;', '&quot; &amp; [.C507] &amp; &quot;', '&quot; &amp; [.D507] &amp; &quot;', '&quot; &amp; [.E507] &amp; &quot;', '&quot; &amp; [.F507] &amp; &quot;'],&quot;" office:value-type="string" office:string-value="['Super Mario 63 (Newgrounds Flash Game)', '2024-12-15', '0:42', 'Cory, Dave', 'AWXBmzLHLug', '']," calcext:value-type="string">
            <text:p>['Super Mario 63 (Newgrounds Flash Game)', '2024-12-15', '0:42', 'Cory, Dave', 'AWXBmzLHLug', ''],</text:p>
          </table:table-cell>
        </table:table-row>
        <table:table-row table:style-name="ro1">
          <table:table-cell office:value-type="string" calcext:value-type="string">
            <text:p>Super Mario 64</text:p>
          </table:table-cell>
          <table:table-cell office:value-type="date" office:date-value="2017-06-09" calcext:value-type="date">
            <text:p>2017-06-09</text:p>
          </table:table-cell>
          <table:table-cell office:value-type="string" calcext:value-type="string">
            <text:p>1:59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B40JPf2Ck8E</text:p>
          </table:table-cell>
          <table:table-cell/>
          <table:table-cell table:formula="of:=&quot;['&quot; &amp; [.A508] &amp; &quot;', '&quot; &amp; YEAR([.B508]) &amp; &quot;-&quot; &amp; MONTH([.B508]) &amp; &quot;-&quot; &amp; DAY([.B508]) &amp; &quot;', '&quot; &amp; [.C508] &amp; &quot;', '&quot; &amp; [.D508] &amp; &quot;', '&quot; &amp; [.E508] &amp; &quot;', '&quot; &amp; [.F508] &amp; &quot;'],&quot;" office:value-type="string" office:string-value="['Super Mario 64', '2017-6-9', '1:59', 'Dingdong, Julian', 'B40JPf2Ck8E', '']," calcext:value-type="string">
            <text:p>['Super Mario 64', '2017-6-9', '1:59', 'Dingdong, Julian', 'B40JPf2Ck8E', ''],</text:p>
          </table:table-cell>
        </table:table-row>
        <table:table-row table:style-name="ro1">
          <table:table-cell office:value-type="string" calcext:value-type="string">
            <text:p>Super Mario 64 Multiplayer</text:p>
          </table:table-cell>
          <table:table-cell office:value-type="date" office:date-value="2016-04-17" calcext:value-type="date">
            <text:p>2016-04-17</text:p>
          </table:table-cell>
          <table:table-cell office:value-type="string" calcext:value-type="string">
            <text:p>1:11</text:p>
          </table:table-cell>
          <table:table-cell office:value-type="string" calcext:value-type="string">
            <text:p>Dingdong</text:p>
          </table:table-cell>
          <table:table-cell office:value-type="string" calcext:value-type="string">
            <text:p>R_gdKYKkQ3Q</text:p>
          </table:table-cell>
          <table:table-cell/>
          <table:table-cell table:formula="of:=&quot;['&quot; &amp; [.A509] &amp; &quot;', '&quot; &amp; YEAR([.B509]) &amp; &quot;-&quot; &amp; MONTH([.B509]) &amp; &quot;-&quot; &amp; DAY([.B509]) &amp; &quot;', '&quot; &amp; [.C509] &amp; &quot;', '&quot; &amp; [.D509] &amp; &quot;', '&quot; &amp; [.E509] &amp; &quot;', '&quot; &amp; [.F509] &amp; &quot;'],&quot;" office:value-type="string" office:string-value="['Super Mario 64 Multiplayer', '2016-4-17', '1:11', 'Dingdong', 'R_gdKYKkQ3Q', '']," calcext:value-type="string">
            <text:p>['Super Mario 64 Multiplayer', '2016-4-17', '1:11', 'Dingdong', 'R_gdKYKkQ3Q', ''],</text:p>
          </table:table-cell>
        </table:table-row>
        <table:table-row table:style-name="ro1">
          <table:table-cell office:value-type="string" calcext:value-type="string">
            <text:p>Super Mario Bros - The Lost Levels</text:p>
          </table:table-cell>
          <table:table-cell office:value-type="date" office:date-value="2025-06-05" calcext:value-type="date">
            <text:p>2025-06-05</text:p>
          </table:table-cell>
          <table:table-cell office:value-type="string" calcext:value-type="string">
            <text:p>2:0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V-R-o8xo1MY</text:p>
          </table:table-cell>
          <table:table-cell/>
          <table:table-cell table:formula="of:=&quot;['&quot; &amp; [.A510] &amp; &quot;', '&quot; &amp; YEAR([.B510]) &amp; &quot;-&quot; &amp; MONTH([.B510]) &amp; &quot;-&quot; &amp; DAY([.B510]) &amp; &quot;', '&quot; &amp; [.C510] &amp; &quot;', '&quot; &amp; [.D510] &amp; &quot;', '&quot; &amp; [.E510] &amp; &quot;', '&quot; &amp; [.F510] &amp; &quot;'],&quot;" office:value-type="string" office:string-value="['Super Mario Bros - The Lost Levels', '2025-6-5', '2:05', 'Cory, Dave', 'V-R-o8xo1MY', '']," calcext:value-type="string">
            <text:p>['Super Mario Bros - The Lost Levels', '2025-6-5', '2:05', 'Cory, Dave', 'V-R-o8xo1MY', ''],</text:p>
          </table:table-cell>
        </table:table-row>
        <table:table-row table:style-name="ro1">
          <table:table-cell office:value-type="string" calcext:value-type="string">
            <text:p>Super Mario Bros (2018)</text:p>
          </table:table-cell>
          <table:table-cell office:value-type="date" office:date-value="2018-06-12" calcext:value-type="date">
            <text:p>2018-06-12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nSxitW4f2no</text:p>
          </table:table-cell>
          <table:table-cell/>
          <table:table-cell table:formula="of:=&quot;['&quot; &amp; [.A511] &amp; &quot;', '&quot; &amp; YEAR([.B511]) &amp; &quot;-&quot; &amp; MONTH([.B511]) &amp; &quot;-&quot; &amp; DAY([.B511]) &amp; &quot;', '&quot; &amp; [.C511] &amp; &quot;', '&quot; &amp; [.D511] &amp; &quot;', '&quot; &amp; [.E511] &amp; &quot;', '&quot; &amp; [.F511] &amp; &quot;'],&quot;" office:value-type="string" office:string-value="['Super Mario Bros (2018)', '2018-6-12', '0:25', 'Zach, Lyle', 'nSxitW4f2no', '']," calcext:value-type="string">
            <text:p>['Super Mario Bros (2018)', '2018-6-12', '0:25', 'Zach, Lyle', 'nSxitW4f2no', ''],</text:p>
          </table:table-cell>
        </table:table-row>
        <table:table-row table:style-name="ro1">
          <table:table-cell office:value-type="string" calcext:value-type="string">
            <text:p>Super Mario Bros (2025)</text:p>
          </table:table-cell>
          <table:table-cell office:value-type="date" office:date-value="2025-05-30" calcext:value-type="date">
            <text:p>2025-05-30</text:p>
          </table:table-cell>
          <table:table-cell office:value-type="string" calcext:value-type="string">
            <text:p>0:49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YmPsC6Ckuvs</text:p>
          </table:table-cell>
          <table:table-cell/>
          <table:table-cell table:formula="of:=&quot;['&quot; &amp; [.A512] &amp; &quot;', '&quot; &amp; YEAR([.B512]) &amp; &quot;-&quot; &amp; MONTH([.B512]) &amp; &quot;-&quot; &amp; DAY([.B512]) &amp; &quot;', '&quot; &amp; [.C512] &amp; &quot;', '&quot; &amp; [.D512] &amp; &quot;', '&quot; &amp; [.E512] &amp; &quot;', '&quot; &amp; [.F512] &amp; &quot;'],&quot;" office:value-type="string" office:string-value="['Super Mario Bros (2025)', '2025-5-30', '0:49', 'Cory, Dave', 'YmPsC6Ckuvs', '']," calcext:value-type="string">
            <text:p>['Super Mario Bros (2025)', '2025-5-30', '0:49', 'Cory, Dave', 'YmPsC6Ckuvs', ''],</text:p>
          </table:table-cell>
        </table:table-row>
        <table:table-row table:style-name="ro1">
          <table:table-cell office:value-type="string" calcext:value-type="string">
            <text:p>Super Mario Bros 2</text:p>
          </table:table-cell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0:28</text:p>
          </table:table-cell>
          <table:table-cell office:value-type="string" calcext:value-type="string">
            <text:p>Zach, Tomar, Adam P</text:p>
          </table:table-cell>
          <table:table-cell office:value-type="string" calcext:value-type="string">
            <text:p>2xRatyi6bu4</text:p>
          </table:table-cell>
          <table:table-cell/>
          <table:table-cell table:formula="of:=&quot;['&quot; &amp; [.A513] &amp; &quot;', '&quot; &amp; YEAR([.B513]) &amp; &quot;-&quot; &amp; MONTH([.B513]) &amp; &quot;-&quot; &amp; DAY([.B513]) &amp; &quot;', '&quot; &amp; [.C513] &amp; &quot;', '&quot; &amp; [.D513] &amp; &quot;', '&quot; &amp; [.E513] &amp; &quot;', '&quot; &amp; [.F513] &amp; &quot;'],&quot;" office:value-type="string" office:string-value="['Super Mario Bros 2', '2022-12-21', '0:28', 'Zach, Tomar, Adam P', '2xRatyi6bu4', '']," calcext:value-type="string">
            <text:p>['Super Mario Bros 2', '2022-12-21', '0:28', 'Zach, Tomar, Adam P', '2xRatyi6bu4', ''],</text:p>
          </table:table-cell>
        </table:table-row>
        <table:table-row table:style-name="ro1">
          <table:table-cell office:value-type="string" calcext:value-type="string">
            <text:p>Super Mario Bros 3</text:p>
          </table:table-cell>
          <table:table-cell office:value-type="date" office:date-value="2018-08-19" calcext:value-type="date">
            <text:p>2018-08-19</text:p>
          </table:table-cell>
          <table:table-cell office:value-type="string" calcext:value-type="string">
            <text:p>1:52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b-3x_Sxchw0</text:p>
          </table:table-cell>
          <table:table-cell/>
          <table:table-cell table:formula="of:=&quot;['&quot; &amp; [.A514] &amp; &quot;', '&quot; &amp; YEAR([.B514]) &amp; &quot;-&quot; &amp; MONTH([.B514]) &amp; &quot;-&quot; &amp; DAY([.B514]) &amp; &quot;', '&quot; &amp; [.C514] &amp; &quot;', '&quot; &amp; [.D514] &amp; &quot;', '&quot; &amp; [.E514] &amp; &quot;', '&quot; &amp; [.F514] &amp; &quot;'],&quot;" office:value-type="string" office:string-value="['Super Mario Bros 3', '2018-8-19', '1:52', 'Zach, Lyle', 'b-3x_Sxchw0', '']," calcext:value-type="string">
            <text:p>['Super Mario Bros 3', '2018-8-19', '1:52', 'Zach, Lyle', 'b-3x_Sxchw0', ''],</text:p>
          </table:table-cell>
        </table:table-row>
        <table:table-row table:style-name="ro1">
          <table:table-cell office:value-type="string" calcext:value-type="string">
            <text:p>Super Mario Galaxy</text:p>
          </table:table-cell>
          <table:table-cell office:value-type="date" office:date-value="2020-09-26" calcext:value-type="date">
            <text:p>2020-09-26</text:p>
          </table:table-cell>
          <table:table-cell office:value-type="string" calcext:value-type="string">
            <text:p>2:0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h4a2Ko5dpYQ</text:p>
          </table:table-cell>
          <table:table-cell/>
          <table:table-cell table:formula="of:=&quot;['&quot; &amp; [.A515] &amp; &quot;', '&quot; &amp; YEAR([.B515]) &amp; &quot;-&quot; &amp; MONTH([.B515]) &amp; &quot;-&quot; &amp; DAY([.B515]) &amp; &quot;', '&quot; &amp; [.C515] &amp; &quot;', '&quot; &amp; [.D515] &amp; &quot;', '&quot; &amp; [.E515] &amp; &quot;', '&quot; &amp; [.F515] &amp; &quot;'],&quot;" office:value-type="string" office:string-value="['Super Mario Galaxy', '2020-9-26', '2:05', 'Lyle, Tomar', 'h4a2Ko5dpYQ', '']," calcext:value-type="string">
            <text:p>['Super Mario Galaxy', '2020-9-26', '2:05', 'Lyle, Tomar', 'h4a2Ko5dpYQ', ''],</text:p>
          </table:table-cell>
        </table:table-row>
        <table:table-row table:style-name="ro1">
          <table:table-cell office:value-type="string" calcext:value-type="string">
            <text:p>Super Mario Land 2</text:p>
          </table:table-cell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1:30</text:p>
          </table:table-cell>
          <table:table-cell office:value-type="string" calcext:value-type="string">
            <text:p>Zach, Cory, Adam P</text:p>
          </table:table-cell>
          <table:table-cell office:value-type="string" calcext:value-type="string">
            <text:p>wdtKAXj4Vrk</text:p>
          </table:table-cell>
          <table:table-cell/>
          <table:table-cell table:formula="of:=&quot;['&quot; &amp; [.A516] &amp; &quot;', '&quot; &amp; YEAR([.B516]) &amp; &quot;-&quot; &amp; MONTH([.B516]) &amp; &quot;-&quot; &amp; DAY([.B516]) &amp; &quot;', '&quot; &amp; [.C516] &amp; &quot;', '&quot; &amp; [.D516] &amp; &quot;', '&quot; &amp; [.E516] &amp; &quot;', '&quot; &amp; [.F516] &amp; &quot;'],&quot;" office:value-type="string" office:string-value="['Super Mario Land 2', '2022-11-28', '1:30', 'Zach, Cory, Adam P', 'wdtKAXj4Vrk', '']," calcext:value-type="string">
            <text:p>['Super Mario Land 2', '2022-11-28', '1:30', 'Zach, Cory, Adam P', 'wdtKAXj4Vrk', ''],</text:p>
          </table:table-cell>
        </table:table-row>
        <table:table-row table:style-name="ro1">
          <table:table-cell office:value-type="string" calcext:value-type="string">
            <text:p>Super Mario Maker 2</text:p>
          </table:table-cell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1:2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dMlyw1SCHhs</text:p>
          </table:table-cell>
          <table:table-cell/>
          <table:table-cell table:formula="of:=&quot;['&quot; &amp; [.A517] &amp; &quot;', '&quot; &amp; YEAR([.B517]) &amp; &quot;-&quot; &amp; MONTH([.B517]) &amp; &quot;-&quot; &amp; DAY([.B517]) &amp; &quot;', '&quot; &amp; [.C517] &amp; &quot;', '&quot; &amp; [.D517] &amp; &quot;', '&quot; &amp; [.E517] &amp; &quot;', '&quot; &amp; [.F517] &amp; &quot;'],&quot;" office:value-type="string" office:string-value="['Super Mario Maker 2', '2019-6-28', '1:24', 'Lyle, Tomar', 'dMlyw1SCHhs', '']," calcext:value-type="string">
            <text:p>['Super Mario Maker 2', '2019-6-28', '1:24', 'Lyle, Tomar', 'dMlyw1SCHhs', ''],</text:p>
          </table:table-cell>
        </table:table-row>
        <table:table-row table:style-name="ro1">
          <table:table-cell office:value-type="string" calcext:value-type="string">
            <text:p>Super Mario Odyssey</text:p>
          </table:table-cell>
          <table:table-cell office:value-type="date" office:date-value="2017-11-04" calcext:value-type="date">
            <text:p>2017-11-04</text:p>
          </table:table-cell>
          <table:table-cell office:value-type="string" calcext:value-type="string">
            <text:p>3:5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T95Wv8IE4Dk</text:p>
          </table:table-cell>
          <table:table-cell/>
          <table:table-cell table:formula="of:=&quot;['&quot; &amp; [.A518] &amp; &quot;', '&quot; &amp; YEAR([.B518]) &amp; &quot;-&quot; &amp; MONTH([.B518]) &amp; &quot;-&quot; &amp; DAY([.B518]) &amp; &quot;', '&quot; &amp; [.C518] &amp; &quot;', '&quot; &amp; [.D518] &amp; &quot;', '&quot; &amp; [.E518] &amp; &quot;', '&quot; &amp; [.F518] &amp; &quot;'],&quot;" office:value-type="string" office:string-value="['Super Mario Odyssey', '2017-11-4', '3:53', 'Dingdong, Julian', 'T95Wv8IE4Dk', '']," calcext:value-type="string">
            <text:p>['Super Mario Odyssey', '2017-11-4', '3:53', 'Dingdong, Julian', 'T95Wv8IE4Dk', ''],</text:p>
          </table:table-cell>
        </table:table-row>
        <table:table-row table:style-name="ro1">
          <table:table-cell office:value-type="string" calcext:value-type="string">
            <text:p>Super Mario Sunshine</text:p>
          </table:table-cell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2:20</text:p>
          </table:table-cell>
          <table:table-cell office:value-type="string" calcext:value-type="string">
            <text:p>Dingdong, Julian, Amin</text:p>
          </table:table-cell>
          <table:table-cell office:value-type="string" calcext:value-type="string">
            <text:p>XFnhlstlqbs</text:p>
          </table:table-cell>
          <table:table-cell/>
          <table:table-cell table:formula="of:=&quot;['&quot; &amp; [.A519] &amp; &quot;', '&quot; &amp; YEAR([.B519]) &amp; &quot;-&quot; &amp; MONTH([.B519]) &amp; &quot;-&quot; &amp; DAY([.B519]) &amp; &quot;', '&quot; &amp; [.C519] &amp; &quot;', '&quot; &amp; [.D519] &amp; &quot;', '&quot; &amp; [.E519] &amp; &quot;', '&quot; &amp; [.F519] &amp; &quot;'],&quot;" office:value-type="string" office:string-value="['Super Mario Sunshine', '2017-9-7', '2:20', 'Dingdong, Julian, Amin', 'XFnhlstlqbs', '']," calcext:value-type="string">
            <text:p>['Super Mario Sunshine', '2017-9-7', '2:20', 'Dingdong, Julian, Amin', 'XFnhlstlqbs', ''],</text:p>
          </table:table-cell>
        </table:table-row>
        <table:table-row table:style-name="ro1">
          <table:table-cell office:value-type="string" calcext:value-type="string">
            <text:p>Super Mario World</text:p>
          </table:table-cell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2:37</text:p>
          </table:table-cell>
          <table:table-cell office:value-type="string" calcext:value-type="string">
            <text:p>Cory, Tomar, Zach</text:p>
          </table:table-cell>
          <table:table-cell office:value-type="string" calcext:value-type="string">
            <text:p>QAExj5xwwYQ</text:p>
          </table:table-cell>
          <table:table-cell/>
          <table:table-cell table:formula="of:=&quot;['&quot; &amp; [.A520] &amp; &quot;', '&quot; &amp; YEAR([.B520]) &amp; &quot;-&quot; &amp; MONTH([.B520]) &amp; &quot;-&quot; &amp; DAY([.B520]) &amp; &quot;', '&quot; &amp; [.C520] &amp; &quot;', '&quot; &amp; [.D520] &amp; &quot;', '&quot; &amp; [.E520] &amp; &quot;', '&quot; &amp; [.F520] &amp; &quot;'],&quot;" office:value-type="string" office:string-value="['Super Mario World', '2022-5-12', '2:37', 'Cory, Tomar, Zach', 'QAExj5xwwYQ', '']," calcext:value-type="string">
            <text:p>['Super Mario World', '2022-5-12', '2:37', 'Cory, Tomar, Zach', 'QAExj5xwwYQ', ''],</text:p>
          </table:table-cell>
        </table:table-row>
        <table:table-row table:style-name="ro1">
          <table:table-cell office:value-type="string" calcext:value-type="string">
            <text:p>Super Mario World (2017) - Ep 1</text:p>
          </table:table-cell>
          <table:table-cell office:value-type="date" office:date-value="2017-10-01" calcext:value-type="date">
            <text:p>2017-10-01</text:p>
          </table:table-cell>
          <table:table-cell office:value-type="string" calcext:value-type="string">
            <text:p>0:19</text:p>
          </table:table-cell>
          <table:table-cell office:value-type="string" calcext:value-type="string">
            <text:p>Dingdong, Julian, Lyle</text:p>
          </table:table-cell>
          <table:table-cell office:value-type="string" calcext:value-type="string">
            <text:p>cX5g2-6Jgaw</text:p>
          </table:table-cell>
          <table:table-cell/>
          <table:table-cell table:formula="of:=&quot;['&quot; &amp; [.A521] &amp; &quot;', '&quot; &amp; YEAR([.B521]) &amp; &quot;-&quot; &amp; MONTH([.B521]) &amp; &quot;-&quot; &amp; DAY([.B521]) &amp; &quot;', '&quot; &amp; [.C521] &amp; &quot;', '&quot; &amp; [.D521] &amp; &quot;', '&quot; &amp; [.E521] &amp; &quot;', '&quot; &amp; [.F521] &amp; &quot;'],&quot;" office:value-type="string" office:string-value="['Super Mario World (2017) - Ep 1', '2017-10-1', '0:19', 'Dingdong, Julian, Lyle', 'cX5g2-6Jgaw', '']," calcext:value-type="string">
            <text:p>['Super Mario World (2017) - Ep 1', '2017-10-1', '0:19', 'Dingdong, Julian, Lyle', 'cX5g2-6Jgaw', ''],</text:p>
          </table:table-cell>
        </table:table-row>
        <table:table-row table:style-name="ro1">
          <table:table-cell office:value-type="string" calcext:value-type="string">
            <text:p>Super Mario World 2 - Yoshi's Island</text:p>
          </table:table-cell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1:29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U6pHyKlTtTY</text:p>
          </table:table-cell>
          <table:table-cell/>
          <table:table-cell table:formula="of:=&quot;['&quot; &amp; [.A522] &amp; &quot;', '&quot; &amp; YEAR([.B522]) &amp; &quot;-&quot; &amp; MONTH([.B522]) &amp; &quot;-&quot; &amp; DAY([.B522]) &amp; &quot;', '&quot; &amp; [.C522] &amp; &quot;', '&quot; &amp; [.D522] &amp; &quot;', '&quot; &amp; [.E522] &amp; &quot;', '&quot; &amp; [.F522] &amp; &quot;'],&quot;" office:value-type="string" office:string-value="['Super Mario World 2 - Yoshi's Island', '2022-12-23', '1:29', 'Zach, Lyle, Tomar', 'U6pHyKlTtTY', '']," calcext:value-type="string">
            <text:p>['Super Mario World 2 - Yoshi's Island', '2022-12-23', '1:29', 'Zach, Lyle, Tomar', 'U6pHyKlTtTY', ''],</text:p>
          </table:table-cell>
        </table:table-row>
        <table:table-row table:style-name="ro1">
          <table:table-cell office:value-type="string" calcext:value-type="string">
            <text:p>Super Monkey Ball</text:p>
          </table:table-cell>
          <table:table-cell office:value-type="date" office:date-value="2017-03-31" calcext:value-type="date">
            <text:p>2017-03-31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JBdHqDywOKo</text:p>
          </table:table-cell>
          <table:table-cell/>
          <table:table-cell table:formula="of:=&quot;['&quot; &amp; [.A523] &amp; &quot;', '&quot; &amp; YEAR([.B523]) &amp; &quot;-&quot; &amp; MONTH([.B523]) &amp; &quot;-&quot; &amp; DAY([.B523]) &amp; &quot;', '&quot; &amp; [.C523] &amp; &quot;', '&quot; &amp; [.D523] &amp; &quot;', '&quot; &amp; [.E523] &amp; &quot;', '&quot; &amp; [.F523] &amp; &quot;'],&quot;" office:value-type="string" office:string-value="['Super Monkey Ball', '2017-3-31', '0:43', 'Dingdong, Julian', 'JBdHqDywOKo', '']," calcext:value-type="string">
            <text:p>['Super Monkey Ball', '2017-3-31', '0:43', 'Dingdong, Julian', 'JBdHqDywOKo', ''],</text:p>
          </table:table-cell>
        </table:table-row>
        <table:table-row table:style-name="ro1">
          <table:table-cell office:value-type="string" calcext:value-type="string">
            <text:p>Super Punch-Out!!</text:p>
          </table:table-cell>
          <table:table-cell office:value-type="date" office:date-value="2019-02-09" calcext:value-type="date">
            <text:p>2019-02-09</text:p>
          </table:table-cell>
          <table:table-cell office:value-type="string" calcext:value-type="string">
            <text:p>0:29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k9d6oM-gHFs</text:p>
          </table:table-cell>
          <table:table-cell/>
          <table:table-cell table:formula="of:=&quot;['&quot; &amp; [.A524] &amp; &quot;', '&quot; &amp; YEAR([.B524]) &amp; &quot;-&quot; &amp; MONTH([.B524]) &amp; &quot;-&quot; &amp; DAY([.B524]) &amp; &quot;', '&quot; &amp; [.C524] &amp; &quot;', '&quot; &amp; [.D524] &amp; &quot;', '&quot; &amp; [.E524] &amp; &quot;', '&quot; &amp; [.F524] &amp; &quot;'],&quot;" office:value-type="string" office:string-value="['Super Punch-Out!!', '2019-2-9', '0:29', 'Mick, Tomar', 'k9d6oM-gHFs', '']," calcext:value-type="string">
            <text:p>['Super Punch-Out!!', '2019-2-9', '0:29', 'Mick, Tomar', 'k9d6oM-gHFs', ''],</text:p>
          </table:table-cell>
        </table:table-row>
        <table:table-row table:style-name="ro1">
          <table:table-cell office:value-type="string" calcext:value-type="string">
            <text:p>Super Smash Bros Melee</text:p>
          </table:table-cell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Dave, Cory</text:p>
          </table:table-cell>
          <table:table-cell office:value-type="string" calcext:value-type="string">
            <text:p>uQEcZHWgl5E</text:p>
          </table:table-cell>
          <table:table-cell/>
          <table:table-cell table:formula="of:=&quot;['&quot; &amp; [.A525] &amp; &quot;', '&quot; &amp; YEAR([.B525]) &amp; &quot;-&quot; &amp; MONTH([.B525]) &amp; &quot;-&quot; &amp; DAY([.B525]) &amp; &quot;', '&quot; &amp; [.C525] &amp; &quot;', '&quot; &amp; [.D525] &amp; &quot;', '&quot; &amp; [.E525] &amp; &quot;', '&quot; &amp; [.F525] &amp; &quot;'],&quot;" office:value-type="string" office:string-value="['Super Smash Bros Melee', '2025-11-3', '2:32', 'Dave, Cory', 'uQEcZHWgl5E', '']," calcext:value-type="string">
            <text:p>['Super Smash Bros Melee', '2025-11-3', '2:32', 'Dave, Cory', 'uQEcZHWgl5E', ''],</text:p>
          </table:table-cell>
        </table:table-row>
        <table:table-row table:style-name="ro1">
          <table:table-cell office:value-type="string" calcext:value-type="string">
            <text:p>Super Smash Bros. Ultimate</text:p>
          </table:table-cell>
          <table:table-cell office:value-type="date" office:date-value="2021-02-21" calcext:value-type="date">
            <text:p>2021-02-21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vQ2ij7yYPK0</text:p>
          </table:table-cell>
          <table:table-cell/>
          <table:table-cell table:formula="of:=&quot;['&quot; &amp; [.A526] &amp; &quot;', '&quot; &amp; YEAR([.B526]) &amp; &quot;-&quot; &amp; MONTH([.B526]) &amp; &quot;-&quot; &amp; DAY([.B526]) &amp; &quot;', '&quot; &amp; [.C526] &amp; &quot;', '&quot; &amp; [.D526] &amp; &quot;', '&quot; &amp; [.E526] &amp; &quot;', '&quot; &amp; [.F526] &amp; &quot;'],&quot;" office:value-type="string" office:string-value="['Super Smash Bros. Ultimate', '2021-2-21', '2:32', 'Lyle, Tomar', 'vQ2ij7yYPK0', '']," calcext:value-type="string">
            <text:p>['Super Smash Bros. Ultimate', '2021-2-21', '2:32', 'Lyle, Tomar', 'vQ2ij7yYPK0', ''],</text:p>
          </table:table-cell>
        </table:table-row>
        <table:table-row table:style-name="ro1">
          <table:table-cell office:value-type="string" calcext:value-type="string">
            <text:p>Superliminal</text:p>
          </table:table-cell>
          <table:table-cell office:value-type="date" office:date-value="2020-11-09" calcext:value-type="date">
            <text:p>2020-11-09</text:p>
          </table:table-cell>
          <table:table-cell office:value-type="string" calcext:value-type="string">
            <text:p>0:48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2LF-7QhS8Jw</text:p>
          </table:table-cell>
          <table:table-cell/>
          <table:table-cell table:formula="of:=&quot;['&quot; &amp; [.A527] &amp; &quot;', '&quot; &amp; YEAR([.B527]) &amp; &quot;-&quot; &amp; MONTH([.B527]) &amp; &quot;-&quot; &amp; DAY([.B527]) &amp; &quot;', '&quot; &amp; [.C527] &amp; &quot;', '&quot; &amp; [.D527] &amp; &quot;', '&quot; &amp; [.E527] &amp; &quot;', '&quot; &amp; [.F527] &amp; &quot;'],&quot;" office:value-type="string" office:string-value="['Superliminal', '2020-11-9', '0:48', 'Lyle, Tomar', '2LF-7QhS8Jw', '']," calcext:value-type="string">
            <text:p>['Superliminal', '2020-11-9', '0:48', 'Lyle, Tomar', '2LF-7QhS8Jw', ''],</text:p>
          </table:table-cell>
        </table:table-row>
        <table:table-row table:style-name="ro1">
          <table:table-cell office:value-type="string" calcext:value-type="string">
            <text:p>T.O.M.E</text:p>
          </table:table-cell>
          <table:table-cell office:value-type="date" office:date-value="2021-11-21" calcext:value-type="date">
            <text:p>2021-11-21</text:p>
          </table:table-cell>
          <table:table-cell office:value-type="string" calcext:value-type="string">
            <text:p>0:51</text:p>
          </table:table-cell>
          <table:table-cell office:value-type="string" calcext:value-type="string">
            <text:p>Kirbopher, Tomar</text:p>
          </table:table-cell>
          <table:table-cell office:value-type="string" calcext:value-type="string">
            <text:p>xjl5VgJCzpU</text:p>
          </table:table-cell>
          <table:table-cell/>
          <table:table-cell table:formula="of:=&quot;['&quot; &amp; [.A528] &amp; &quot;', '&quot; &amp; YEAR([.B528]) &amp; &quot;-&quot; &amp; MONTH([.B528]) &amp; &quot;-&quot; &amp; DAY([.B528]) &amp; &quot;', '&quot; &amp; [.C528] &amp; &quot;', '&quot; &amp; [.D528] &amp; &quot;', '&quot; &amp; [.E528] &amp; &quot;', '&quot; &amp; [.F528] &amp; &quot;'],&quot;" office:value-type="string" office:string-value="['T.O.M.E', '2021-11-21', '0:51', 'Kirbopher, Tomar', 'xjl5VgJCzpU', '']," calcext:value-type="string">
            <text:p>['T.O.M.E', '2021-11-21', '0:51', 'Kirbopher, Tomar', 'xjl5VgJCzpU', ''],</text:p>
          </table:table-cell>
        </table:table-row>
        <table:table-row table:style-name="ro1">
          <table:table-cell office:value-type="string" calcext:value-type="string">
            <text:p>Tai Fu</text:p>
          </table:table-cell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1:1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9z87oAEOA34</text:p>
          </table:table-cell>
          <table:table-cell/>
          <table:table-cell table:formula="of:=&quot;['&quot; &amp; [.A529] &amp; &quot;', '&quot; &amp; YEAR([.B529]) &amp; &quot;-&quot; &amp; MONTH([.B529]) &amp; &quot;-&quot; &amp; DAY([.B529]) &amp; &quot;', '&quot; &amp; [.C529] &amp; &quot;', '&quot; &amp; [.D529] &amp; &quot;', '&quot; &amp; [.E529] &amp; &quot;', '&quot; &amp; [.F529] &amp; &quot;'],&quot;" office:value-type="string" office:string-value="['Tai Fu', '2022-2-1', '1:19', 'Lyle, Tomar', '9z87oAEOA34', '']," calcext:value-type="string">
            <text:p>['Tai Fu', '2022-2-1', '1:19', 'Lyle, Tomar', '9z87oAEOA34', ''],</text:p>
          </table:table-cell>
        </table:table-row>
        <table:table-row table:style-name="ro1">
          <table:table-cell office:value-type="string" calcext:value-type="string">
            <text:p>Tarzan</text:p>
          </table:table-cell>
          <table:table-cell office:value-type="date" office:date-value="2018-08-04" calcext:value-type="date">
            <text:p>2018-08-04</text:p>
          </table:table-cell>
          <table:table-cell office:value-type="string" calcext:value-type="string">
            <text:p>0:26</text:p>
          </table:table-cell>
          <table:table-cell office:value-type="string" calcext:value-type="string">
            <text:p>Dingdong, Amin</text:p>
          </table:table-cell>
          <table:table-cell office:value-type="string" calcext:value-type="string">
            <text:p>cTWGCsb9GJY</text:p>
          </table:table-cell>
          <table:table-cell/>
          <table:table-cell table:formula="of:=&quot;['&quot; &amp; [.A530] &amp; &quot;', '&quot; &amp; YEAR([.B530]) &amp; &quot;-&quot; &amp; MONTH([.B530]) &amp; &quot;-&quot; &amp; DAY([.B530]) &amp; &quot;', '&quot; &amp; [.C530] &amp; &quot;', '&quot; &amp; [.D530] &amp; &quot;', '&quot; &amp; [.E530] &amp; &quot;', '&quot; &amp; [.F530] &amp; &quot;'],&quot;" office:value-type="string" office:string-value="['Tarzan', '2018-8-4', '0:26', 'Dingdong, Amin', 'cTWGCsb9GJY', '']," calcext:value-type="string">
            <text:p>['Tarzan', '2018-8-4', '0:26', 'Dingdong, Amin', 'cTWGCsb9GJY', ''],</text:p>
          </table:table-cell>
        </table:table-row>
        <table:table-row table:style-name="ro1">
          <table:table-cell office:value-type="string" calcext:value-type="string">
            <text:p>Taz Mania - Ep 1</text:p>
          </table:table-cell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jtTSUJf-NQg</text:p>
          </table:table-cell>
          <table:table-cell/>
          <table:table-cell table:formula="of:=&quot;['&quot; &amp; [.A531] &amp; &quot;', '&quot; &amp; YEAR([.B531]) &amp; &quot;-&quot; &amp; MONTH([.B531]) &amp; &quot;-&quot; &amp; DAY([.B531]) &amp; &quot;', '&quot; &amp; [.C531] &amp; &quot;', '&quot; &amp; [.D531] &amp; &quot;', '&quot; &amp; [.E531] &amp; &quot;', '&quot; &amp; [.F531] &amp; &quot;'],&quot;" office:value-type="string" office:string-value="['Taz Mania - Ep 1', '2017-8-7', '0:10', 'Dingdong, Julian', 'jtTSUJf-NQg', '']," calcext:value-type="string">
            <text:p>['Taz Mania - Ep 1', '2017-8-7', '0:10', 'Dingdong, Julian', 'jtTSUJf-NQg', ''],</text:p>
          </table:table-cell>
        </table:table-row>
        <table:table-row table:style-name="ro1">
          <table:table-cell office:value-type="string" calcext:value-type="string">
            <text:p>Taz Mania - Ep 2</text:p>
          </table:table-cell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0:14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yV_2ltPeDWI</text:p>
          </table:table-cell>
          <table:table-cell/>
          <table:table-cell table:formula="of:=&quot;['&quot; &amp; [.A532] &amp; &quot;', '&quot; &amp; YEAR([.B532]) &amp; &quot;-&quot; &amp; MONTH([.B532]) &amp; &quot;-&quot; &amp; DAY([.B532]) &amp; &quot;', '&quot; &amp; [.C532] &amp; &quot;', '&quot; &amp; [.D532] &amp; &quot;', '&quot; &amp; [.E532] &amp; &quot;', '&quot; &amp; [.F532] &amp; &quot;'],&quot;" office:value-type="string" office:string-value="['Taz Mania - Ep 2', '2017-8-8', '0:14', 'Dingdong, Julian', 'yV_2ltPeDWI', '']," calcext:value-type="string">
            <text:p>['Taz Mania - Ep 2', '2017-8-8', '0:14', 'Dingdong, Julian', 'yV_2ltPeDWI', ''],</text:p>
          </table:table-cell>
        </table:table-row>
        <table:table-row table:style-name="ro1">
          <table:table-cell office:value-type="string" calcext:value-type="string">
            <text:p>Teardown</text:p>
          </table:table-cell>
          <table:table-cell office:value-type="date" office:date-value="2020-11-06" calcext:value-type="date">
            <text:p>2020-11-06</text:p>
          </table:table-cell>
          <table:table-cell office:value-type="string" calcext:value-type="string">
            <text:p>0:3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Fno6W4DeTgU</text:p>
          </table:table-cell>
          <table:table-cell/>
          <table:table-cell table:formula="of:=&quot;['&quot; &amp; [.A533] &amp; &quot;', '&quot; &amp; YEAR([.B533]) &amp; &quot;-&quot; &amp; MONTH([.B533]) &amp; &quot;-&quot; &amp; DAY([.B533]) &amp; &quot;', '&quot; &amp; [.C533] &amp; &quot;', '&quot; &amp; [.D533] &amp; &quot;', '&quot; &amp; [.E533] &amp; &quot;', '&quot; &amp; [.F533] &amp; &quot;'],&quot;" office:value-type="string" office:string-value="['Teardown', '2020-11-6', '0:31', 'Zach, Tomar', 'Fno6W4DeTgU', '']," calcext:value-type="string">
            <text:p>['Teardown', '2020-11-6', '0:31', 'Zach, Tomar', 'Fno6W4DeTgU', ''],</text:p>
          </table:table-cell>
        </table:table-row>
        <table:table-row table:style-name="ro1">
          <table:table-cell office:value-type="string" calcext:value-type="string">
            <text:p>Teardown With Mods</text:p>
          </table:table-cell>
          <table:table-cell office:value-type="date" office:date-value="2023-04-06" calcext:value-type="date">
            <text:p>2023-04-06</text:p>
          </table:table-cell>
          <table:table-cell office:value-type="string" calcext:value-type="string">
            <text:p>1:19</text:p>
          </table:table-cell>
          <table:table-cell office:value-type="string" calcext:value-type="string">
            <text:p>Adam, Lyle, Tomar</text:p>
          </table:table-cell>
          <table:table-cell office:value-type="string" calcext:value-type="string">
            <text:p>-z14DnFKPcg</text:p>
          </table:table-cell>
          <table:table-cell/>
          <table:table-cell table:formula="of:=&quot;['&quot; &amp; [.A534] &amp; &quot;', '&quot; &amp; YEAR([.B534]) &amp; &quot;-&quot; &amp; MONTH([.B534]) &amp; &quot;-&quot; &amp; DAY([.B534]) &amp; &quot;', '&quot; &amp; [.C534] &amp; &quot;', '&quot; &amp; [.D534] &amp; &quot;', '&quot; &amp; [.E534] &amp; &quot;', '&quot; &amp; [.F534] &amp; &quot;'],&quot;" office:value-type="string" office:string-value="['Teardown With Mods', '2023-4-6', '1:19', 'Adam, Lyle, Tomar', '-z14DnFKPcg', '']," calcext:value-type="string">
            <text:p>['Teardown With Mods', '2023-4-6', '1:19', 'Adam, Lyle, Tomar', '-z14DnFKPcg', ''],</text:p>
          </table:table-cell>
        </table:table-row>
        <table:table-row table:style-name="ro1">
          <table:table-cell office:value-type="string" calcext:value-type="string">
            <text:p>Terrible Turkish Game On Steam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0:32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38YLcu_KJCY</text:p>
          </table:table-cell>
          <table:table-cell/>
          <table:table-cell table:formula="of:=&quot;['&quot; &amp; [.A535] &amp; &quot;', '&quot; &amp; YEAR([.B535]) &amp; &quot;-&quot; &amp; MONTH([.B535]) &amp; &quot;-&quot; &amp; DAY([.B535]) &amp; &quot;', '&quot; &amp; [.C535] &amp; &quot;', '&quot; &amp; [.D535] &amp; &quot;', '&quot; &amp; [.E535] &amp; &quot;', '&quot; &amp; [.F535] &amp; &quot;'],&quot;" office:value-type="string" office:string-value="['Terrible Turkish Game On Steam', '2019-5-31', '0:32', 'Zach, Tomar', '38YLcu_KJCY', '']," calcext:value-type="string">
            <text:p>['Terrible Turkish Game On Steam', '2019-5-31', '0:32', 'Zach, Tomar', '38YLcu_KJCY', ''],</text:p>
          </table:table-cell>
        </table:table-row>
        <table:table-row table:style-name="ro1">
          <table:table-cell office:value-type="string" calcext:value-type="string">
            <text:p>Tetris</text:p>
          </table:table-cell>
          <table:table-cell office:value-type="date" office:date-value="2018-03-07" calcext:value-type="date">
            <text:p>2018-03-07</text:p>
          </table:table-cell>
          <table:table-cell office:value-type="string" calcext:value-type="string">
            <text:p>0:10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W8csMHJpV7U</text:p>
          </table:table-cell>
          <table:table-cell/>
          <table:table-cell table:formula="of:=&quot;['&quot; &amp; [.A536] &amp; &quot;', '&quot; &amp; YEAR([.B536]) &amp; &quot;-&quot; &amp; MONTH([.B536]) &amp; &quot;-&quot; &amp; DAY([.B536]) &amp; &quot;', '&quot; &amp; [.C536] &amp; &quot;', '&quot; &amp; [.D536] &amp; &quot;', '&quot; &amp; [.E536] &amp; &quot;', '&quot; &amp; [.F536] &amp; &quot;'],&quot;" office:value-type="string" office:string-value="['Tetris', '2018-3-7', '0:10', 'Zach, Lyle', 'W8csMHJpV7U', '']," calcext:value-type="string">
            <text:p>['Tetris', '2018-3-7', '0:10', 'Zach, Lyle', 'W8csMHJpV7U', ''],</text:p>
          </table:table-cell>
        </table:table-row>
        <table:table-row table:style-name="ro1">
          <table:table-cell office:value-type="string" calcext:value-type="string">
            <text:p>That Which Gave Chase</text:p>
          </table:table-cell>
          <table:table-cell office:value-type="date" office:date-value="2023-10-25" calcext:value-type="date">
            <text:p>2023-10-25</text:p>
          </table:table-cell>
          <table:table-cell office:value-type="string" calcext:value-type="string">
            <text:p>0:5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1C4kVuITXW0</text:p>
          </table:table-cell>
          <table:table-cell/>
          <table:table-cell table:formula="of:=&quot;['&quot; &amp; [.A537] &amp; &quot;', '&quot; &amp; YEAR([.B537]) &amp; &quot;-&quot; &amp; MONTH([.B537]) &amp; &quot;-&quot; &amp; DAY([.B537]) &amp; &quot;', '&quot; &amp; [.C537] &amp; &quot;', '&quot; &amp; [.D537] &amp; &quot;', '&quot; &amp; [.E537] &amp; &quot;', '&quot; &amp; [.F537] &amp; &quot;'],&quot;" office:value-type="string" office:string-value="['That Which Gave Chase', '2023-10-25', '0:51', 'Zach, Tomar', '1C4kVuITXW0', '']," calcext:value-type="string">
            <text:p>['That Which Gave Chase', '2023-10-25', '0:51', 'Zach, Tomar', '1C4kVuITXW0', ''],</text:p>
          </table:table-cell>
        </table:table-row>
        <table:table-row table:style-name="ro1">
          <table:table-cell office:value-type="string" calcext:value-type="string">
            <text:p>The Greatest Horror Game</text:p>
          </table:table-cell>
          <table:table-cell office:value-type="date" office:date-value="2018-10-22" calcext:value-type="date">
            <text:p>2018-10-22</text:p>
          </table:table-cell>
          <table:table-cell office:value-type="string" calcext:value-type="string">
            <text:p>0:12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6re_JsANXsQ</text:p>
          </table:table-cell>
          <table:table-cell/>
          <table:table-cell table:formula="of:=&quot;['&quot; &amp; [.A538] &amp; &quot;', '&quot; &amp; YEAR([.B538]) &amp; &quot;-&quot; &amp; MONTH([.B538]) &amp; &quot;-&quot; &amp; DAY([.B538]) &amp; &quot;', '&quot; &amp; [.C538] &amp; &quot;', '&quot; &amp; [.D538] &amp; &quot;', '&quot; &amp; [.E538] &amp; &quot;', '&quot; &amp; [.F538] &amp; &quot;'],&quot;" office:value-type="string" office:string-value="['The Greatest Horror Game', '2018-10-22', '0:12', 'Zach, Tomar', '6re_JsANXsQ', '']," calcext:value-type="string">
            <text:p>['The Greatest Horror Game', '2018-10-22', '0:12', 'Zach, Tomar', '6re_JsANXsQ', ''],</text:p>
          </table:table-cell>
        </table:table-row>
        <table:table-row table:style-name="ro1">
          <table:table-cell office:value-type="string" calcext:value-type="string">
            <text:p>The Man In The Park</text:p>
          </table:table-cell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0:04</text:p>
          </table:table-cell>
          <table:table-cell office:value-type="string" calcext:value-type="string">
            <text:p>Cory, Zach</text:p>
          </table:table-cell>
          <table:table-cell office:value-type="string" calcext:value-type="string">
            <text:p>t6eTvkLsEkI</text:p>
          </table:table-cell>
          <table:table-cell/>
          <table:table-cell table:formula="of:=&quot;['&quot; &amp; [.A539] &amp; &quot;', '&quot; &amp; YEAR([.B539]) &amp; &quot;-&quot; &amp; MONTH([.B539]) &amp; &quot;-&quot; &amp; DAY([.B539]) &amp; &quot;', '&quot; &amp; [.C539] &amp; &quot;', '&quot; &amp; [.D539] &amp; &quot;', '&quot; &amp; [.E539] &amp; &quot;', '&quot; &amp; [.F539] &amp; &quot;'],&quot;" office:value-type="string" office:string-value="['The Man In The Park', '2022-10-26', '0:04', 'Cory, Zach', 't6eTvkLsEkI', '']," calcext:value-type="string">
            <text:p>['The Man In The Park', '2022-10-26', '0:04', 'Cory, Zach', 't6eTvkLsEkI', ''],</text:p>
          </table:table-cell>
        </table:table-row>
        <table:table-row table:style-name="ro1">
          <table:table-cell office:value-type="string" calcext:value-type="string">
            <text:p>The Skeleton Game</text:p>
          </table:table-cell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0:19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UI21TSMjcuo</text:p>
          </table:table-cell>
          <table:table-cell/>
          <table:table-cell table:formula="of:=&quot;['&quot; &amp; [.A540] &amp; &quot;', '&quot; &amp; YEAR([.B540]) &amp; &quot;-&quot; &amp; MONTH([.B540]) &amp; &quot;-&quot; &amp; DAY([.B540]) &amp; &quot;', '&quot; &amp; [.C540] &amp; &quot;', '&quot; &amp; [.D540] &amp; &quot;', '&quot; &amp; [.E540] &amp; &quot;', '&quot; &amp; [.F540] &amp; &quot;'],&quot;" office:value-type="string" office:string-value="['The Skeleton Game', '2019-10-27', '0:19', 'Zach, Tomar', 'UI21TSMjcuo', '']," calcext:value-type="string">
            <text:p>['The Skeleton Game', '2019-10-27', '0:19', 'Zach, Tomar', 'UI21TSMjcuo', ''],</text:p>
          </table:table-cell>
        </table:table-row>
        <table:table-row table:style-name="ro1">
          <table:table-cell office:value-type="string" calcext:value-type="string">
            <text:p>The Worst Game We've Ever Played</text:p>
          </table:table-cell>
          <table:table-cell office:value-type="date" office:date-value="2019-05-27" calcext:value-type="date">
            <text:p>2019-05-27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0HscBfQSsJc</text:p>
          </table:table-cell>
          <table:table-cell/>
          <table:table-cell table:formula="of:=&quot;['&quot; &amp; [.A541] &amp; &quot;', '&quot; &amp; YEAR([.B541]) &amp; &quot;-&quot; &amp; MONTH([.B541]) &amp; &quot;-&quot; &amp; DAY([.B541]) &amp; &quot;', '&quot; &amp; [.C541] &amp; &quot;', '&quot; &amp; [.D541] &amp; &quot;', '&quot; &amp; [.E541] &amp; &quot;', '&quot; &amp; [.F541] &amp; &quot;'],&quot;" office:value-type="string" office:string-value="['The Worst Game We've Ever Played', '2019-5-27', '0:23', 'Zach, Tomar', '0HscBfQSsJc', '']," calcext:value-type="string">
            <text:p>['The Worst Game We've Ever Played', '2019-5-27', '0:23', 'Zach, Tomar', '0HscBfQSsJc', ''],</text:p>
          </table:table-cell>
        </table:table-row>
        <table:table-row table:style-name="ro1">
          <table:table-cell office:value-type="string" calcext:value-type="string">
            <text:p>Titanfall 2</text:p>
          </table:table-cell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2:51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_ricmX6SKrs</text:p>
          </table:table-cell>
          <table:table-cell/>
          <table:table-cell table:formula="of:=&quot;['&quot; &amp; [.A542] &amp; &quot;', '&quot; &amp; YEAR([.B542]) &amp; &quot;-&quot; &amp; MONTH([.B542]) &amp; &quot;-&quot; &amp; DAY([.B542]) &amp; &quot;', '&quot; &amp; [.C542] &amp; &quot;', '&quot; &amp; [.D542] &amp; &quot;', '&quot; &amp; [.E542] &amp; &quot;', '&quot; &amp; [.F542] &amp; &quot;'],&quot;" office:value-type="string" office:string-value="['Titanfall 2', '2020-2-22', '2:51', 'Cory, Lyle', '_ricmX6SKrs', '']," calcext:value-type="string">
            <text:p>['Titanfall 2', '2020-2-22', '2:51', 'Cory, Lyle', '_ricmX6SKrs', ''],</text:p>
          </table:table-cell>
        </table:table-row>
        <table:table-row table:style-name="ro1">
          <table:table-cell office:value-type="string" calcext:value-type="string">
            <text:p>Tom And Jerry</text:p>
          </table:table-cell>
          <table:table-cell office:value-type="date" office:date-value="2018-08-20" calcext:value-type="date">
            <text:p>2018-08-20</text:p>
          </table:table-cell>
          <table:table-cell office:value-type="string" calcext:value-type="string">
            <text:p>0:27</text:p>
          </table:table-cell>
          <table:table-cell office:value-type="string" calcext:value-type="string">
            <text:p>Zach, Michael</text:p>
          </table:table-cell>
          <table:table-cell office:value-type="string" calcext:value-type="string">
            <text:p>GmWJY_g-A7I</text:p>
          </table:table-cell>
          <table:table-cell/>
          <table:table-cell table:formula="of:=&quot;['&quot; &amp; [.A543] &amp; &quot;', '&quot; &amp; YEAR([.B543]) &amp; &quot;-&quot; &amp; MONTH([.B543]) &amp; &quot;-&quot; &amp; DAY([.B543]) &amp; &quot;', '&quot; &amp; [.C543] &amp; &quot;', '&quot; &amp; [.D543] &amp; &quot;', '&quot; &amp; [.E543] &amp; &quot;', '&quot; &amp; [.F543] &amp; &quot;'],&quot;" office:value-type="string" office:string-value="['Tom And Jerry', '2018-8-20', '0:27', 'Zach, Michael', 'GmWJY_g-A7I', '']," calcext:value-type="string">
            <text:p>['Tom And Jerry', '2018-8-20', '0:27', 'Zach, Michael', 'GmWJY_g-A7I', ''],</text:p>
          </table:table-cell>
        </table:table-row>
        <table:table-row table:style-name="ro1">
          <table:table-cell office:value-type="string" calcext:value-type="string">
            <text:p>Tomb Raider I-III Remastered</text:p>
          </table:table-cell>
          <table:table-cell office:value-type="date" office:date-value="2024-09-09" calcext:value-type="date">
            <text:p>2024-09-09</text:p>
          </table:table-cell>
          <table:table-cell office:value-type="string" calcext:value-type="string">
            <text:p>2:01</text:p>
          </table:table-cell>
          <table:table-cell office:value-type="string" calcext:value-type="string">
            <text:p>Cory, Paddy</text:p>
          </table:table-cell>
          <table:table-cell office:value-type="string" calcext:value-type="string">
            <text:p>nGrUamSzKh4</text:p>
          </table:table-cell>
          <table:table-cell/>
          <table:table-cell table:formula="of:=&quot;['&quot; &amp; [.A544] &amp; &quot;', '&quot; &amp; YEAR([.B544]) &amp; &quot;-&quot; &amp; MONTH([.B544]) &amp; &quot;-&quot; &amp; DAY([.B544]) &amp; &quot;', '&quot; &amp; [.C544] &amp; &quot;', '&quot; &amp; [.D544] &amp; &quot;', '&quot; &amp; [.E544] &amp; &quot;', '&quot; &amp; [.F544] &amp; &quot;'],&quot;" office:value-type="string" office:string-value="['Tomb Raider I-III Remastered', '2024-9-9', '2:01', 'Cory, Paddy', 'nGrUamSzKh4', '']," calcext:value-type="string">
            <text:p>['Tomb Raider I-III Remastered', '2024-9-9', '2:01', 'Cory, Paddy', 'nGrUamSzKh4', ''],</text:p>
          </table:table-cell>
        </table:table-row>
        <table:table-row table:style-name="ro1">
          <table:table-cell office:value-type="string" calcext:value-type="string">
            <text:p>Tomb Raider Remake</text:p>
          </table:table-cell>
          <table:table-cell office:value-type="date" office:date-value="2016-08-23" calcext:value-type="date">
            <text:p>2016-08-23</text:p>
          </table:table-cell>
          <table:table-cell office:value-type="string" calcext:value-type="string">
            <text:p>0:49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Km7o-QKUxek</text:p>
          </table:table-cell>
          <table:table-cell/>
          <table:table-cell table:formula="of:=&quot;['&quot; &amp; [.A545] &amp; &quot;', '&quot; &amp; YEAR([.B545]) &amp; &quot;-&quot; &amp; MONTH([.B545]) &amp; &quot;-&quot; &amp; DAY([.B545]) &amp; &quot;', '&quot; &amp; [.C545] &amp; &quot;', '&quot; &amp; [.D545] &amp; &quot;', '&quot; &amp; [.E545] &amp; &quot;', '&quot; &amp; [.F545] &amp; &quot;'],&quot;" office:value-type="string" office:string-value="['Tomb Raider Remake', '2016-8-23', '0:49', 'Dingdong, Julian', 'Km7o-QKUxek', '']," calcext:value-type="string">
            <text:p>['Tomb Raider Remake', '2016-8-23', '0:49', 'Dingdong, Julian', 'Km7o-QKUxek', ''],</text:p>
          </table:table-cell>
        </table:table-row>
        <table:table-row table:style-name="ro1">
          <table:table-cell office:value-type="string" calcext:value-type="string">
            <text:p>Tomba</text:p>
          </table:table-cell>
          <table:table-cell office:value-type="date" office:date-value="2018-03-14" calcext:value-type="date">
            <text:p>2018-03-14</text:p>
          </table:table-cell>
          <table:table-cell office:value-type="string" calcext:value-type="string">
            <text:p>0:3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A5Ums0YtmxQ</text:p>
          </table:table-cell>
          <table:table-cell/>
          <table:table-cell table:formula="of:=&quot;['&quot; &amp; [.A546] &amp; &quot;', '&quot; &amp; YEAR([.B546]) &amp; &quot;-&quot; &amp; MONTH([.B546]) &amp; &quot;-&quot; &amp; DAY([.B546]) &amp; &quot;', '&quot; &amp; [.C546] &amp; &quot;', '&quot; &amp; [.D546] &amp; &quot;', '&quot; &amp; [.E546] &amp; &quot;', '&quot; &amp; [.F546] &amp; &quot;'],&quot;" office:value-type="string" office:string-value="['Tomba', '2018-3-14', '0:33', 'Zach, Lyle', 'A5Ums0YtmxQ', '']," calcext:value-type="string">
            <text:p>['Tomba', '2018-3-14', '0:33', 'Zach, Lyle', 'A5Ums0YtmxQ', ''],</text:p>
          </table:table-cell>
        </table:table-row>
        <table:table-row table:style-name="ro1">
          <table:table-cell office:value-type="string" calcext:value-type="string">
            <text:p>Tomodachi Life (Volume 1)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:15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ih-PpXXxpOI</text:p>
          </table:table-cell>
          <table:table-cell/>
          <table:table-cell table:formula="of:=&quot;['&quot; &amp; [.A547] &amp; &quot;', '&quot; &amp; YEAR([.B547]) &amp; &quot;-&quot; &amp; MONTH([.B547]) &amp; &quot;-&quot; &amp; DAY([.B547]) &amp; &quot;', '&quot; &amp; [.C547] &amp; &quot;', '&quot; &amp; [.D547] &amp; &quot;', '&quot; &amp; [.E547] &amp; &quot;', '&quot; &amp; [.F547] &amp; &quot;'],&quot;" office:value-type="string" office:string-value="['Tomodachi Life (Volume 1)', '2024-5-31', '1:15', 'Cory, Dave', 'ih-PpXXxpOI', '']," calcext:value-type="string">
            <text:p>['Tomodachi Life (Volume 1)', '2024-5-31', '1:15', 'Cory, Dave', 'ih-PpXXxpOI', ''],</text:p>
          </table:table-cell>
        </table:table-row>
        <table:table-row table:style-name="ro1">
          <table:table-cell office:value-type="string" calcext:value-type="string">
            <text:p>Tomodachi Life (Volume 2)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:38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g0K7kl5froY</text:p>
          </table:table-cell>
          <table:table-cell/>
          <table:table-cell table:formula="of:=&quot;['&quot; &amp; [.A548] &amp; &quot;', '&quot; &amp; YEAR([.B548]) &amp; &quot;-&quot; &amp; MONTH([.B548]) &amp; &quot;-&quot; &amp; DAY([.B548]) &amp; &quot;', '&quot; &amp; [.C548] &amp; &quot;', '&quot; &amp; [.D548] &amp; &quot;', '&quot; &amp; [.E548] &amp; &quot;', '&quot; &amp; [.F548] &amp; &quot;'],&quot;" office:value-type="string" office:string-value="['Tomodachi Life (Volume 2)', '2024-5-31', '1:38', 'Cory, Dave', 'g0K7kl5froY', '']," calcext:value-type="string">
            <text:p>['Tomodachi Life (Volume 2)', '2024-5-31', '1:38', 'Cory, Dave', 'g0K7kl5froY', ''],</text:p>
          </table:table-cell>
        </table:table-row>
        <table:table-row table:style-name="ro1">
          <table:table-cell office:value-type="string" calcext:value-type="string">
            <text:p>Toontown Rewritten</text:p>
          </table:table-cell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Cory, Adam, Tomar</text:p>
          </table:table-cell>
          <table:table-cell office:value-type="string" calcext:value-type="string">
            <text:p>613CIZTuUvw</text:p>
          </table:table-cell>
          <table:table-cell/>
          <table:table-cell table:formula="of:=&quot;['&quot; &amp; [.A549] &amp; &quot;', '&quot; &amp; YEAR([.B549]) &amp; &quot;-&quot; &amp; MONTH([.B549]) &amp; &quot;-&quot; &amp; DAY([.B549]) &amp; &quot;', '&quot; &amp; [.C549] &amp; &quot;', '&quot; &amp; [.D549] &amp; &quot;', '&quot; &amp; [.E549] &amp; &quot;', '&quot; &amp; [.F549] &amp; &quot;'],&quot;" office:value-type="string" office:string-value="['Toontown Rewritten', '2022-12-14', '0:45', 'Cory, Adam, Tomar', '613CIZTuUvw', '']," calcext:value-type="string">
            <text:p>['Toontown Rewritten', '2022-12-14', '0:45', 'Cory, Adam, Tomar', '613CIZTuUvw', ''],</text:p>
          </table:table-cell>
        </table:table-row>
        <table:table-row table:style-name="ro1">
          <table:table-cell office:value-type="string" calcext:value-type="string">
            <text:p>Tormented Souls</text:p>
          </table:table-cell>
          <table:table-cell office:value-type="date" office:date-value="2021-10-21" calcext:value-type="date">
            <text:p>2021-10-21</text:p>
          </table:table-cell>
          <table:table-cell office:value-type="string" calcext:value-type="string">
            <text:p>0:3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PNRga3Thliw</text:p>
          </table:table-cell>
          <table:table-cell/>
          <table:table-cell table:formula="of:=&quot;['&quot; &amp; [.A550] &amp; &quot;', '&quot; &amp; YEAR([.B550]) &amp; &quot;-&quot; &amp; MONTH([.B550]) &amp; &quot;-&quot; &amp; DAY([.B550]) &amp; &quot;', '&quot; &amp; [.C550] &amp; &quot;', '&quot; &amp; [.D550] &amp; &quot;', '&quot; &amp; [.E550] &amp; &quot;', '&quot; &amp; [.F550] &amp; &quot;'],&quot;" office:value-type="string" office:string-value="['Tormented Souls', '2021-10-21', '0:37', 'Lyle, Tomar', 'PNRga3Thliw', '']," calcext:value-type="string">
            <text:p>['Tormented Souls', '2021-10-21', '0:37', 'Lyle, Tomar', 'PNRga3Thliw', ''],</text:p>
          </table:table-cell>
        </table:table-row>
        <table:table-row table:style-name="ro1">
          <table:table-cell office:value-type="string" calcext:value-type="string">
            <text:p>Totally Accurate Battle Simulator (TABS)</text:p>
          </table:table-cell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0:32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mJ66SiXxW-w</text:p>
          </table:table-cell>
          <table:table-cell/>
          <table:table-cell table:formula="of:=&quot;['&quot; &amp; [.A551] &amp; &quot;', '&quot; &amp; YEAR([.B551]) &amp; &quot;-&quot; &amp; MONTH([.B551]) &amp; &quot;-&quot; &amp; DAY([.B551]) &amp; &quot;', '&quot; &amp; [.C551] &amp; &quot;', '&quot; &amp; [.D551] &amp; &quot;', '&quot; &amp; [.E551] &amp; &quot;', '&quot; &amp; [.F551] &amp; &quot;'],&quot;" office:value-type="string" office:string-value="['Totally Accurate Battle Simulator (TABS)', '2020-6-29', '0:32', 'Lyle, Tomar', 'mJ66SiXxW-w', '']," calcext:value-type="string">
            <text:p>['Totally Accurate Battle Simulator (TABS)', '2020-6-29', '0:32', 'Lyle, Tomar', 'mJ66SiXxW-w', ''],</text:p>
          </table:table-cell>
        </table:table-row>
        <table:table-row table:style-name="ro1">
          <table:table-cell office:value-type="string" calcext:value-type="string">
            <text:p>Totally Accurate Battlegrounds (TABG)</text:p>
          </table:table-cell>
          <table:table-cell office:value-type="date" office:date-value="2018-06-06" calcext:value-type="date">
            <text:p>2018-06-06</text:p>
          </table:table-cell>
          <table:table-cell office:value-type="string" calcext:value-type="string">
            <text:p>0:44</text:p>
          </table:table-cell>
          <table:table-cell office:value-type="string" calcext:value-type="string">
            <text:p>Zach, Dingdong</text:p>
          </table:table-cell>
          <table:table-cell office:value-type="string" calcext:value-type="string">
            <text:p>CLB0PbtNtP8</text:p>
          </table:table-cell>
          <table:table-cell/>
          <table:table-cell table:formula="of:=&quot;['&quot; &amp; [.A552] &amp; &quot;', '&quot; &amp; YEAR([.B552]) &amp; &quot;-&quot; &amp; MONTH([.B552]) &amp; &quot;-&quot; &amp; DAY([.B552]) &amp; &quot;', '&quot; &amp; [.C552] &amp; &quot;', '&quot; &amp; [.D552] &amp; &quot;', '&quot; &amp; [.E552] &amp; &quot;', '&quot; &amp; [.F552] &amp; &quot;'],&quot;" office:value-type="string" office:string-value="['Totally Accurate Battlegrounds (TABG)', '2018-6-6', '0:44', 'Zach, Dingdong', 'CLB0PbtNtP8', '']," calcext:value-type="string">
            <text:p>['Totally Accurate Battlegrounds (TABG)', '2018-6-6', '0:44', 'Zach, Dingdong', 'CLB0PbtNtP8', ''],</text:p>
          </table:table-cell>
        </table:table-row>
        <table:table-row table:style-name="ro1">
          <table:table-cell office:value-type="string" calcext:value-type="string">
            <text:p>Toy Story</text:p>
          </table:table-cell>
          <table:table-cell office:value-type="date" office:date-value="2018-08-21" calcext:value-type="date">
            <text:p>2018-08-21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U3wCjW1Oups</text:p>
          </table:table-cell>
          <table:table-cell/>
          <table:table-cell table:formula="of:=&quot;['&quot; &amp; [.A553] &amp; &quot;', '&quot; &amp; YEAR([.B553]) &amp; &quot;-&quot; &amp; MONTH([.B553]) &amp; &quot;-&quot; &amp; DAY([.B553]) &amp; &quot;', '&quot; &amp; [.C553] &amp; &quot;', '&quot; &amp; [.D553] &amp; &quot;', '&quot; &amp; [.E553] &amp; &quot;', '&quot; &amp; [.F553] &amp; &quot;'],&quot;" office:value-type="string" office:string-value="['Toy Story', '2018-8-21', '0:23', 'Zach, Lyle', 'U3wCjW1Oups', '']," calcext:value-type="string">
            <text:p>['Toy Story', '2018-8-21', '0:23', 'Zach, Lyle', 'U3wCjW1Oups', ''],</text:p>
          </table:table-cell>
        </table:table-row>
        <table:table-row table:style-name="ro1">
          <table:table-cell office:value-type="string" calcext:value-type="string">
            <text:p>Tribes - Vengeance</text:p>
          </table:table-cell>
          <table:table-cell office:value-type="date" office:date-value="2020-03-08" calcext:value-type="date">
            <text:p>2020-03-08</text:p>
          </table:table-cell>
          <table:table-cell office:value-type="string" calcext:value-type="string">
            <text:p>0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Z5a9naYMmwU</text:p>
          </table:table-cell>
          <table:table-cell/>
          <table:table-cell table:formula="of:=&quot;['&quot; &amp; [.A554] &amp; &quot;', '&quot; &amp; YEAR([.B554]) &amp; &quot;-&quot; &amp; MONTH([.B554]) &amp; &quot;-&quot; &amp; DAY([.B554]) &amp; &quot;', '&quot; &amp; [.C554] &amp; &quot;', '&quot; &amp; [.D554] &amp; &quot;', '&quot; &amp; [.E554] &amp; &quot;', '&quot; &amp; [.F554] &amp; &quot;'],&quot;" office:value-type="string" office:string-value="['Tribes - Vengeance', '2020-3-8', '0:26', 'Lyle, Tomar', 'Z5a9naYMmwU', '']," calcext:value-type="string">
            <text:p>['Tribes - Vengeance', '2020-3-8', '0:26', 'Lyle, Tomar', 'Z5a9naYMmwU', ''],</text:p>
          </table:table-cell>
        </table:table-row>
        <table:table-row table:style-name="ro1">
          <table:table-cell office:value-type="string" calcext:value-type="string">
            <text:p>Truly Epic Dragon's Tale</text:p>
          </table:table-cell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0:17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hKHSvHYgyAo</text:p>
          </table:table-cell>
          <table:table-cell/>
          <table:table-cell table:formula="of:=&quot;['&quot; &amp; [.A555] &amp; &quot;', '&quot; &amp; YEAR([.B555]) &amp; &quot;-&quot; &amp; MONTH([.B555]) &amp; &quot;-&quot; &amp; DAY([.B555]) &amp; &quot;', '&quot; &amp; [.C555] &amp; &quot;', '&quot; &amp; [.D555] &amp; &quot;', '&quot; &amp; [.E555] &amp; &quot;', '&quot; &amp; [.F555] &amp; &quot;'],&quot;" office:value-type="string" office:string-value="['Truly Epic Dragon's Tale', '2020-5-26', '0:17', 'Zach, Lyle', 'hKHSvHYgyAo', '']," calcext:value-type="string">
            <text:p>['Truly Epic Dragon's Tale', '2020-5-26', '0:17', 'Zach, Lyle', 'hKHSvHYgyAo', ''],</text:p>
          </table:table-cell>
        </table:table-row>
        <table:table-row table:style-name="ro1">
          <table:table-cell office:value-type="string" calcext:value-type="string">
            <text:p>Twelve Minutes</text:p>
          </table:table-cell>
          <table:table-cell office:value-type="date" office:date-value="2021-09-10" calcext:value-type="date">
            <text:p>2021-09-10</text:p>
          </table:table-cell>
          <table:table-cell office:value-type="string" calcext:value-type="string">
            <text:p>0:44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pVM7Ot-PA3M</text:p>
          </table:table-cell>
          <table:table-cell/>
          <table:table-cell table:formula="of:=&quot;['&quot; &amp; [.A556] &amp; &quot;', '&quot; &amp; YEAR([.B556]) &amp; &quot;-&quot; &amp; MONTH([.B556]) &amp; &quot;-&quot; &amp; DAY([.B556]) &amp; &quot;', '&quot; &amp; [.C556] &amp; &quot;', '&quot; &amp; [.D556] &amp; &quot;', '&quot; &amp; [.E556] &amp; &quot;', '&quot; &amp; [.F556] &amp; &quot;'],&quot;" office:value-type="string" office:string-value="['Twelve Minutes', '2021-9-10', '0:44', 'Lyle, Tomar', 'pVM7Ot-PA3M', '']," calcext:value-type="string">
            <text:p>['Twelve Minutes', '2021-9-10', '0:44', 'Lyle, Tomar', 'pVM7Ot-PA3M', ''],</text:p>
          </table:table-cell>
        </table:table-row>
        <table:table-row table:style-name="ro1">
          <table:table-cell office:value-type="string" calcext:value-type="string">
            <text:p>Twinsen's Little Big Adveture 2</text:p>
          </table:table-cell>
          <table:table-cell office:value-type="date" office:date-value="2024-05-18" calcext:value-type="date">
            <text:p>2024-05-18</text:p>
          </table:table-cell>
          <table:table-cell office:value-type="string" calcext:value-type="string">
            <text:p>2:04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B7jHU5uVvGA</text:p>
          </table:table-cell>
          <table:table-cell/>
          <table:table-cell table:formula="of:=&quot;['&quot; &amp; [.A557] &amp; &quot;', '&quot; &amp; YEAR([.B557]) &amp; &quot;-&quot; &amp; MONTH([.B557]) &amp; &quot;-&quot; &amp; DAY([.B557]) &amp; &quot;', '&quot; &amp; [.C557] &amp; &quot;', '&quot; &amp; [.D557] &amp; &quot;', '&quot; &amp; [.E557] &amp; &quot;', '&quot; &amp; [.F557] &amp; &quot;'],&quot;" office:value-type="string" office:string-value="['Twinsen's Little Big Adveture 2', '2024-5-18', '2:04', 'Lyle, Cory', 'B7jHU5uVvGA', '']," calcext:value-type="string">
            <text:p>['Twinsen's Little Big Adveture 2', '2024-5-18', '2:04', 'Lyle, Cory', 'B7jHU5uVvGA', ''],</text:p>
          </table:table-cell>
        </table:table-row>
        <table:table-row table:style-name="ro1">
          <table:table-cell office:value-type="string" calcext:value-type="string">
            <text:p>Uncharted 2</text:p>
          </table:table-cell>
          <table:table-cell office:value-type="date" office:date-value="2018-03-29" calcext:value-type="date">
            <text:p>2018-03-29</text:p>
          </table:table-cell>
          <table:table-cell office:value-type="string" calcext:value-type="string">
            <text:p>2:24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LsD5zMolU2s</text:p>
          </table:table-cell>
          <table:table-cell office:value-type="string" calcext:value-type="string">
            <text:p>6d_swc9SRH8</text:p>
          </table:table-cell>
          <table:table-cell table:formula="of:=&quot;['&quot; &amp; [.A558] &amp; &quot;', '&quot; &amp; YEAR([.B558]) &amp; &quot;-&quot; &amp; MONTH([.B558]) &amp; &quot;-&quot; &amp; DAY([.B558]) &amp; &quot;', '&quot; &amp; [.C558] &amp; &quot;', '&quot; &amp; [.D558] &amp; &quot;', '&quot; &amp; [.E558] &amp; &quot;', '&quot; &amp; [.F558] &amp; &quot;'],&quot;" office:value-type="string" office:string-value="['Uncharted 2', '2018-3-29', '2:24', 'Zach, Lyle', 'LsD5zMolU2s', '6d_swc9SRH8']," calcext:value-type="string">
            <text:p>['Uncharted 2', '2018-3-29', '2:24', 'Zach, Lyle', 'LsD5zMolU2s', '6d_swc9SRH8'],</text:p>
          </table:table-cell>
        </table:table-row>
        <table:table-row table:style-name="ro1">
          <table:table-cell office:value-type="string" calcext:value-type="string">
            <text:p>Uncharted 4</text:p>
          </table:table-cell>
          <table:table-cell office:value-type="date" office:date-value="2016-07-13" calcext:value-type="date">
            <text:p>2016-07-13</text:p>
          </table:table-cell>
          <table:table-cell office:value-type="string" calcext:value-type="string">
            <text:p>3:31</text:p>
          </table:table-cell>
          <table:table-cell office:value-type="string" calcext:value-type="string">
            <text:p>Egoraptor</text:p>
          </table:table-cell>
          <table:table-cell office:value-type="string" calcext:value-type="string">
            <text:p>ZTjYxA8mbO4</text:p>
          </table:table-cell>
          <table:table-cell/>
          <table:table-cell table:formula="of:=&quot;['&quot; &amp; [.A559] &amp; &quot;', '&quot; &amp; YEAR([.B559]) &amp; &quot;-&quot; &amp; MONTH([.B559]) &amp; &quot;-&quot; &amp; DAY([.B559]) &amp; &quot;', '&quot; &amp; [.C559] &amp; &quot;', '&quot; &amp; [.D559] &amp; &quot;', '&quot; &amp; [.E559] &amp; &quot;', '&quot; &amp; [.F559] &amp; &quot;'],&quot;" office:value-type="string" office:string-value="['Uncharted 4', '2016-7-13', '3:31', 'Egoraptor', 'ZTjYxA8mbO4', '']," calcext:value-type="string">
            <text:p>['Uncharted 4', '2016-7-13', '3:31', 'Egoraptor', 'ZTjYxA8mbO4', ''],</text:p>
          </table:table-cell>
        </table:table-row>
        <table:table-row table:style-name="ro1">
          <table:table-cell office:value-type="string" calcext:value-type="string">
            <text:p>Undertale</text:p>
          </table:table-cell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Adam, Tomar</text:p>
          </table:table-cell>
          <table:table-cell office:value-type="string" calcext:value-type="string">
            <text:p>0xeZ_nzI-3M</text:p>
          </table:table-cell>
          <table:table-cell/>
          <table:table-cell table:formula="of:=&quot;['&quot; &amp; [.A560] &amp; &quot;', '&quot; &amp; YEAR([.B560]) &amp; &quot;-&quot; &amp; MONTH([.B560]) &amp; &quot;-&quot; &amp; DAY([.B560]) &amp; &quot;', '&quot; &amp; [.C560] &amp; &quot;', '&quot; &amp; [.D560] &amp; &quot;', '&quot; &amp; [.E560] &amp; &quot;', '&quot; &amp; [.F560] &amp; &quot;'],&quot;" office:value-type="string" office:string-value="['Undertale', '2022-3-5', '8:47', 'Adam, Tomar', '0xeZ_nzI-3M', '']," calcext:value-type="string">
            <text:p>['Undertale', '2022-3-5', '8:47', 'Adam, Tomar', '0xeZ_nzI-3M', ''],</text:p>
          </table:table-cell>
        </table:table-row>
        <table:table-row table:style-name="ro1">
          <table:table-cell office:value-type="string" calcext:value-type="string">
            <text:p>Unearthed</text:p>
          </table:table-cell>
          <table:table-cell office:value-type="date" office:date-value="2020-08-11" calcext:value-type="date">
            <text:p>2020-08-11</text:p>
          </table:table-cell>
          <table:table-cell office:value-type="string" calcext:value-type="string">
            <text:p>1:07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P7xNwYDPtM</text:p>
          </table:table-cell>
          <table:table-cell/>
          <table:table-cell table:formula="of:=&quot;['&quot; &amp; [.A561] &amp; &quot;', '&quot; &amp; YEAR([.B561]) &amp; &quot;-&quot; &amp; MONTH([.B561]) &amp; &quot;-&quot; &amp; DAY([.B561]) &amp; &quot;', '&quot; &amp; [.C561] &amp; &quot;', '&quot; &amp; [.D561] &amp; &quot;', '&quot; &amp; [.E561] &amp; &quot;', '&quot; &amp; [.F561] &amp; &quot;'],&quot;" office:value-type="string" office:string-value="['Unearthed', '2020-8-11', '1:07', 'Lyle, Tomar', 'OP7xNwYDPtM', '']," calcext:value-type="string">
            <text:p>['Unearthed', '2020-8-11', '1:07', 'Lyle, Tomar', 'OP7xNwYDPtM', ''],</text:p>
          </table:table-cell>
        </table:table-row>
        <table:table-row table:style-name="ro1">
          <table:table-cell office:value-type="string" calcext:value-type="string">
            <text:p>Universal Studios Theme Park Adventure - Ep 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0:19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14hzrJV6n6k</text:p>
          </table:table-cell>
          <table:table-cell/>
          <table:table-cell table:formula="of:=&quot;['&quot; &amp; [.A562] &amp; &quot;', '&quot; &amp; YEAR([.B562]) &amp; &quot;-&quot; &amp; MONTH([.B562]) &amp; &quot;-&quot; &amp; DAY([.B562]) &amp; &quot;', '&quot; &amp; [.C562] &amp; &quot;', '&quot; &amp; [.D562] &amp; &quot;', '&quot; &amp; [.E562] &amp; &quot;', '&quot; &amp; [.F562] &amp; &quot;'],&quot;" office:value-type="string" office:string-value="['Universal Studios Theme Park Adventure - Ep 1', '2019-7-25', '0:19', 'Lyle, Tomar', '14hzrJV6n6k', '']," calcext:value-type="string">
            <text:p>['Universal Studios Theme Park Adventure - Ep 1', '2019-7-25', '0:19', 'Lyle, Tomar', '14hzrJV6n6k', ''],</text:p>
          </table:table-cell>
        </table:table-row>
        <table:table-row table:style-name="ro1">
          <table:table-cell office:value-type="string" calcext:value-type="string">
            <text:p>Universal Studios Theme Park Adventure - Ep 2</text:p>
          </table:table-cell>
          <table:table-cell office:value-type="date" office:date-value="2019-07-27" calcext:value-type="date">
            <text:p>2019-07-27</text:p>
          </table:table-cell>
          <table:table-cell office:value-type="string" calcext:value-type="string">
            <text:p>0:1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Sqh8Dh5O-KI</text:p>
          </table:table-cell>
          <table:table-cell/>
          <table:table-cell table:formula="of:=&quot;['&quot; &amp; [.A563] &amp; &quot;', '&quot; &amp; YEAR([.B563]) &amp; &quot;-&quot; &amp; MONTH([.B563]) &amp; &quot;-&quot; &amp; DAY([.B563]) &amp; &quot;', '&quot; &amp; [.C563] &amp; &quot;', '&quot; &amp; [.D563] &amp; &quot;', '&quot; &amp; [.E563] &amp; &quot;', '&quot; &amp; [.F563] &amp; &quot;'],&quot;" office:value-type="string" office:string-value="['Universal Studios Theme Park Adventure - Ep 2', '2019-7-27', '0:16', 'Lyle, Tomar', 'Sqh8Dh5O-KI', '']," calcext:value-type="string">
            <text:p>['Universal Studios Theme Park Adventure - Ep 2', '2019-7-27', '0:16', 'Lyle, Tomar', 'Sqh8Dh5O-KI', ''],</text:p>
          </table:table-cell>
        </table:table-row>
        <table:table-row table:style-name="ro1">
          <table:table-cell office:value-type="string" calcext:value-type="string">
            <text:p>Valheim</text:p>
          </table:table-cell>
          <table:table-cell office:value-type="date" office:date-value="2021-03-27" calcext:value-type="date">
            <text:p>2021-03-27</text:p>
          </table:table-cell>
          <table:table-cell office:value-type="string" calcext:value-type="string">
            <text:p>0:35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f8vluUHo9Dc</text:p>
          </table:table-cell>
          <table:table-cell/>
          <table:table-cell table:formula="of:=&quot;['&quot; &amp; [.A564] &amp; &quot;', '&quot; &amp; YEAR([.B564]) &amp; &quot;-&quot; &amp; MONTH([.B564]) &amp; &quot;-&quot; &amp; DAY([.B564]) &amp; &quot;', '&quot; &amp; [.C564] &amp; &quot;', '&quot; &amp; [.D564] &amp; &quot;', '&quot; &amp; [.E564] &amp; &quot;', '&quot; &amp; [.F564] &amp; &quot;'],&quot;" office:value-type="string" office:string-value="['Valheim', '2021-3-27', '0:35', 'Zach, Lyle, Tomar', 'f8vluUHo9Dc', '']," calcext:value-type="string">
            <text:p>['Valheim', '2021-3-27', '0:35', 'Zach, Lyle, Tomar', 'f8vluUHo9Dc', ''],</text:p>
          </table:table-cell>
        </table:table-row>
        <table:table-row table:style-name="ro1">
          <table:table-cell office:value-type="string" calcext:value-type="string">
            <text:p>Vampire Survivors</text:p>
          </table:table-cell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1:04</text:p>
          </table:table-cell>
          <table:table-cell office:value-type="string" calcext:value-type="string">
            <text:p>Lyle, Cory</text:p>
          </table:table-cell>
          <table:table-cell office:value-type="string" calcext:value-type="string">
            <text:p>EhbE_5baWlw</text:p>
          </table:table-cell>
          <table:table-cell/>
          <table:table-cell table:formula="of:=&quot;['&quot; &amp; [.A565] &amp; &quot;', '&quot; &amp; YEAR([.B565]) &amp; &quot;-&quot; &amp; MONTH([.B565]) &amp; &quot;-&quot; &amp; DAY([.B565]) &amp; &quot;', '&quot; &amp; [.C565] &amp; &quot;', '&quot; &amp; [.D565] &amp; &quot;', '&quot; &amp; [.E565] &amp; &quot;', '&quot; &amp; [.F565] &amp; &quot;'],&quot;" office:value-type="string" office:string-value="['Vampire Survivors', '2022-10-14', '1:04', 'Lyle, Cory', 'EhbE_5baWlw', '']," calcext:value-type="string">
            <text:p>['Vampire Survivors', '2022-10-14', '1:04', 'Lyle, Cory', 'EhbE_5baWlw', ''],</text:p>
          </table:table-cell>
        </table:table-row>
        <table:table-row table:style-name="ro1">
          <table:table-cell office:value-type="string" calcext:value-type="string">
            <text:p>Viewtiful Joe - Ep 1</text:p>
          </table:table-cell>
          <table:table-cell office:value-type="date" office:date-value="2022-12-25" calcext:value-type="date">
            <text:p>2022-12-25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DC6UedHWpCg</text:p>
          </table:table-cell>
          <table:table-cell/>
          <table:table-cell table:formula="of:=&quot;['&quot; &amp; [.A566] &amp; &quot;', '&quot; &amp; YEAR([.B566]) &amp; &quot;-&quot; &amp; MONTH([.B566]) &amp; &quot;-&quot; &amp; DAY([.B566]) &amp; &quot;', '&quot; &amp; [.C566] &amp; &quot;', '&quot; &amp; [.D566] &amp; &quot;', '&quot; &amp; [.E566] &amp; &quot;', '&quot; &amp; [.F566] &amp; &quot;'],&quot;" office:value-type="string" office:string-value="['Viewtiful Joe - Ep 1', '2022-12-25', '0:21', 'Cory, Lyle', 'DC6UedHWpCg', '']," calcext:value-type="string">
            <text:p>['Viewtiful Joe - Ep 1', '2022-12-25', '0:21', 'Cory, Lyle', 'DC6UedHWpCg', ''],</text:p>
          </table:table-cell>
        </table:table-row>
        <table:table-row table:style-name="ro1">
          <table:table-cell office:value-type="string" calcext:value-type="string">
            <text:p>Viewtiful Joe - Ep 2</text:p>
          </table:table-cell>
          <table:table-cell office:value-type="date" office:date-value="2023-01-18" calcext:value-type="date">
            <text:p>2023-01-18</text:p>
          </table:table-cell>
          <table:table-cell office:value-type="string" calcext:value-type="string">
            <text:p>0:22</text:p>
          </table:table-cell>
          <table:table-cell office:value-type="string" calcext:value-type="string">
            <text:p>Cory, Lyle</text:p>
          </table:table-cell>
          <table:table-cell office:value-type="string" calcext:value-type="string">
            <text:p>SeM2c3ttC-k</text:p>
          </table:table-cell>
          <table:table-cell/>
          <table:table-cell table:formula="of:=&quot;['&quot; &amp; [.A567] &amp; &quot;', '&quot; &amp; YEAR([.B567]) &amp; &quot;-&quot; &amp; MONTH([.B567]) &amp; &quot;-&quot; &amp; DAY([.B567]) &amp; &quot;', '&quot; &amp; [.C567] &amp; &quot;', '&quot; &amp; [.D567] &amp; &quot;', '&quot; &amp; [.E567] &amp; &quot;', '&quot; &amp; [.F567] &amp; &quot;'],&quot;" office:value-type="string" office:string-value="['Viewtiful Joe - Ep 2', '2023-1-18', '0:22', 'Cory, Lyle', 'SeM2c3ttC-k', '']," calcext:value-type="string">
            <text:p>['Viewtiful Joe - Ep 2', '2023-1-18', '0:22', 'Cory, Lyle', 'SeM2c3ttC-k', ''],</text:p>
          </table:table-cell>
        </table:table-row>
        <table:table-row table:style-name="ro1">
          <table:table-cell office:value-type="string" calcext:value-type="string">
            <text:p>Visage</text:p>
          </table:table-cell>
          <table:table-cell office:value-type="date" office:date-value="2018-10-18" calcext:value-type="date">
            <text:p>2018-10-18</text:p>
          </table:table-cell>
          <table:table-cell office:value-type="string" calcext:value-type="string">
            <text:p>1:50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x_9YTZyKe5o</text:p>
          </table:table-cell>
          <table:table-cell/>
          <table:table-cell table:formula="of:=&quot;['&quot; &amp; [.A568] &amp; &quot;', '&quot; &amp; YEAR([.B568]) &amp; &quot;-&quot; &amp; MONTH([.B568]) &amp; &quot;-&quot; &amp; DAY([.B568]) &amp; &quot;', '&quot; &amp; [.C568] &amp; &quot;', '&quot; &amp; [.D568] &amp; &quot;', '&quot; &amp; [.E568] &amp; &quot;', '&quot; &amp; [.F568] &amp; &quot;'],&quot;" office:value-type="string" office:string-value="['Visage', '2018-10-18', '1:50', 'Zach, Tomar', 'x_9YTZyKe5o', '']," calcext:value-type="string">
            <text:p>['Visage', '2018-10-18', '1:50', 'Zach, Tomar', 'x_9YTZyKe5o', ''],</text:p>
          </table:table-cell>
        </table:table-row>
        <table:table-row table:style-name="ro1">
          <table:table-cell office:value-type="string" calcext:value-type="string">
            <text:p>Warhammer - Vermintide 2</text:p>
          </table:table-cell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PpytibO2wCc</text:p>
          </table:table-cell>
          <table:table-cell/>
          <table:table-cell table:formula="of:=&quot;['&quot; &amp; [.A569] &amp; &quot;', '&quot; &amp; YEAR([.B569]) &amp; &quot;-&quot; &amp; MONTH([.B569]) &amp; &quot;-&quot; &amp; DAY([.B569]) &amp; &quot;', '&quot; &amp; [.C569] &amp; &quot;', '&quot; &amp; [.D569] &amp; &quot;', '&quot; &amp; [.E569] &amp; &quot;', '&quot; &amp; [.F569] &amp; &quot;'],&quot;" office:value-type="string" office:string-value="['Warhammer - Vermintide 2', '2020-3-30', '0:50', 'Zach, Lyle, Tomar', 'PpytibO2wCc', '']," calcext:value-type="string">
            <text:p>['Warhammer - Vermintide 2', '2020-3-30', '0:50', 'Zach, Lyle, Tomar', 'PpytibO2wCc', ''],</text:p>
          </table:table-cell>
        </table:table-row>
        <table:table-row table:style-name="ro1">
          <table:table-cell office:value-type="string" calcext:value-type="string">
            <text:p>Warioware</text:p>
          </table:table-cell>
          <table:table-cell office:value-type="date" office:date-value="2021-06-13" calcext:value-type="date">
            <text:p>2021-06-13</text:p>
          </table:table-cell>
          <table:table-cell office:value-type="string" calcext:value-type="string">
            <text:p>1:3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0pe2HUYnlrM</text:p>
          </table:table-cell>
          <table:table-cell/>
          <table:table-cell table:formula="of:=&quot;['&quot; &amp; [.A570] &amp; &quot;', '&quot; &amp; YEAR([.B570]) &amp; &quot;-&quot; &amp; MONTH([.B570]) &amp; &quot;-&quot; &amp; DAY([.B570]) &amp; &quot;', '&quot; &amp; [.C570] &amp; &quot;', '&quot; &amp; [.D570] &amp; &quot;', '&quot; &amp; [.E570] &amp; &quot;', '&quot; &amp; [.F570] &amp; &quot;'],&quot;" office:value-type="string" office:string-value="['Warioware', '2021-6-13', '1:32', 'Dingdong, Julian', '0pe2HUYnlrM', '']," calcext:value-type="string">
            <text:p>['Warioware', '2021-6-13', '1:32', 'Dingdong, Julian', '0pe2HUYnlrM', ''],</text:p>
          </table:table-cell>
        </table:table-row>
        <table:table-row table:style-name="ro1">
          <table:table-cell office:value-type="string" calcext:value-type="string">
            <text:p>Webbed</text:p>
          </table:table-cell>
          <table:table-cell office:value-type="date" office:date-value="2021-09-29" calcext:value-type="date">
            <text:p>2021-09-29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eTSINo3ruLk</text:p>
          </table:table-cell>
          <table:table-cell/>
          <table:table-cell table:formula="of:=&quot;['&quot; &amp; [.A571] &amp; &quot;', '&quot; &amp; YEAR([.B571]) &amp; &quot;-&quot; &amp; MONTH([.B571]) &amp; &quot;-&quot; &amp; DAY([.B571]) &amp; &quot;', '&quot; &amp; [.C571] &amp; &quot;', '&quot; &amp; [.D571] &amp; &quot;', '&quot; &amp; [.E571] &amp; &quot;', '&quot; &amp; [.F571] &amp; &quot;'],&quot;" office:value-type="string" office:string-value="['Webbed', '2021-9-29', '0:45', 'Lyle, Tomar', 'eTSINo3ruLk', '']," calcext:value-type="string">
            <text:p>['Webbed', '2021-9-29', '0:45', 'Lyle, Tomar', 'eTSINo3ruLk', ''],</text:p>
          </table:table-cell>
        </table:table-row>
        <table:table-row table:style-name="ro1">
          <table:table-cell office:value-type="string" calcext:value-type="string">
            <text:p>Websplorers - Volume 1</text:p>
          </table:table-cell>
          <table:table-cell office:value-type="date" office:date-value="2021-12-22" calcext:value-type="date">
            <text:p>2021-12-22</text:p>
          </table:table-cell>
          <table:table-cell office:value-type="string" calcext:value-type="string">
            <text:p>2: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OyTFoTVJBs</text:p>
          </table:table-cell>
          <table:table-cell/>
          <table:table-cell table:formula="of:=&quot;['&quot; &amp; [.A572] &amp; &quot;', '&quot; &amp; YEAR([.B572]) &amp; &quot;-&quot; &amp; MONTH([.B572]) &amp; &quot;-&quot; &amp; DAY([.B572]) &amp; &quot;', '&quot; &amp; [.C572] &amp; &quot;', '&quot; &amp; [.D572] &amp; &quot;', '&quot; &amp; [.E572] &amp; &quot;', '&quot; &amp; [.F572] &amp; &quot;'],&quot;" office:value-type="string" office:string-value="['Websplorers - Volume 1', '2021-12-22', '2:46', 'null', '2OyTFoTVJBs', '']," calcext:value-type="string">
            <text:p>['Websplorers - Volume 1', '2021-12-22', '2:46', 'null', '2OyTFoTVJBs', ''],</text:p>
          </table:table-cell>
        </table:table-row>
        <table:table-row table:style-name="ro1">
          <table:table-cell office:value-type="string" calcext:value-type="string">
            <text:p>Weed Games</text:p>
          </table:table-cell>
          <table:table-cell office:value-type="date" office:date-value="2018-04-20" calcext:value-type="date">
            <text:p>2018-04-20</text:p>
          </table:table-cell>
          <table:table-cell office:value-type="string" calcext:value-type="string">
            <text:p>0:17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em2N6j1MpMA</text:p>
          </table:table-cell>
          <table:table-cell/>
          <table:table-cell table:formula="of:=&quot;['&quot; &amp; [.A573] &amp; &quot;', '&quot; &amp; YEAR([.B573]) &amp; &quot;-&quot; &amp; MONTH([.B573]) &amp; &quot;-&quot; &amp; DAY([.B573]) &amp; &quot;', '&quot; &amp; [.C573] &amp; &quot;', '&quot; &amp; [.D573] &amp; &quot;', '&quot; &amp; [.E573] &amp; &quot;', '&quot; &amp; [.F573] &amp; &quot;'],&quot;" office:value-type="string" office:string-value="['Weed Games', '2018-4-20', '0:17', 'Zach', 'em2N6j1MpMA', '']," calcext:value-type="string">
            <text:p>['Weed Games', '2018-4-20', '0:17', 'Zach', 'em2N6j1MpMA', ''],</text:p>
          </table:table-cell>
        </table:table-row>
        <table:table-row table:style-name="ro1">
          <table:table-cell office:value-type="string" calcext:value-type="string">
            <text:p>Wheel Travel</text:p>
          </table:table-cell>
          <table:table-cell office:value-type="date" office:date-value="2019-04-27" calcext:value-type="date">
            <text:p>2019-04-27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SF3Qi-rrqr8</text:p>
          </table:table-cell>
          <table:table-cell/>
          <table:table-cell table:formula="of:=&quot;['&quot; &amp; [.A574] &amp; &quot;', '&quot; &amp; YEAR([.B574]) &amp; &quot;-&quot; &amp; MONTH([.B574]) &amp; &quot;-&quot; &amp; DAY([.B574]) &amp; &quot;', '&quot; &amp; [.C574] &amp; &quot;', '&quot; &amp; [.D574] &amp; &quot;', '&quot; &amp; [.E574] &amp; &quot;', '&quot; &amp; [.F574] &amp; &quot;'],&quot;" office:value-type="string" office:string-value="['Wheel Travel', '2019-4-27', '0:50', 'Mick, Tomar', 'SF3Qi-rrqr8', '']," calcext:value-type="string">
            <text:p>['Wheel Travel', '2019-4-27', '0:50', 'Mick, Tomar', 'SF3Qi-rrqr8', ''],</text:p>
          </table:table-cell>
        </table:table-row>
        <table:table-row table:style-name="ro1">
          <table:table-cell office:value-type="string" calcext:value-type="string">
            <text:p>Whiplash</text:p>
          </table:table-cell>
          <table:table-cell office:value-type="date" office:date-value="2021-12-06" calcext:value-type="date">
            <text:p>2021-12-06</text:p>
          </table:table-cell>
          <table:table-cell office:value-type="string" calcext:value-type="string">
            <text:p>1:19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5yDZAiseIds</text:p>
          </table:table-cell>
          <table:table-cell/>
          <table:table-cell table:formula="of:=&quot;['&quot; &amp; [.A575] &amp; &quot;', '&quot; &amp; YEAR([.B575]) &amp; &quot;-&quot; &amp; MONTH([.B575]) &amp; &quot;-&quot; &amp; DAY([.B575]) &amp; &quot;', '&quot; &amp; [.C575] &amp; &quot;', '&quot; &amp; [.D575] &amp; &quot;', '&quot; &amp; [.E575] &amp; &quot;', '&quot; &amp; [.F575] &amp; &quot;'],&quot;" office:value-type="string" office:string-value="['Whiplash', '2021-12-6', '1:19', 'Zach, Lyle', '5yDZAiseIds', '']," calcext:value-type="string">
            <text:p>['Whiplash', '2021-12-6', '1:19', 'Zach, Lyle', '5yDZAiseIds', ''],</text:p>
          </table:table-cell>
        </table:table-row>
        <table:table-row table:style-name="ro1">
          <table:table-cell office:value-type="string" calcext:value-type="string">
            <text:p>Wild Woody</text:p>
          </table:table-cell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0:33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wh8bthQVNks</text:p>
          </table:table-cell>
          <table:table-cell/>
          <table:table-cell table:formula="of:=&quot;['&quot; &amp; [.A576] &amp; &quot;', '&quot; &amp; YEAR([.B576]) &amp; &quot;-&quot; &amp; MONTH([.B576]) &amp; &quot;-&quot; &amp; DAY([.B576]) &amp; &quot;', '&quot; &amp; [.C576] &amp; &quot;', '&quot; &amp; [.D576] &amp; &quot;', '&quot; &amp; [.E576] &amp; &quot;', '&quot; &amp; [.F576] &amp; &quot;'],&quot;" office:value-type="string" office:string-value="['Wild Woody', '2016-12-9', '0:33', 'Dingdong, Julian', 'wh8bthQVNks', '']," calcext:value-type="string">
            <text:p>['Wild Woody', '2016-12-9', '0:33', 'Dingdong, Julian', 'wh8bthQVNks', ''],</text:p>
          </table:table-cell>
        </table:table-row>
        <table:table-row table:style-name="ro1">
          <table:table-cell office:value-type="string" calcext:value-type="string">
            <text:p>Witch Hunt (2018 - 2020)</text:p>
          </table:table-cell>
          <table:table-cell office:value-type="date" office:date-value="2018-06-14" calcext:value-type="date">
            <text:p>2018-06-14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Zach, Tomar</text:p>
          </table:table-cell>
          <table:table-cell office:value-type="string" calcext:value-type="string">
            <text:p>rw3Vh0laXVI</text:p>
          </table:table-cell>
          <table:table-cell/>
          <table:table-cell table:formula="of:=&quot;['&quot; &amp; [.A577] &amp; &quot;', '&quot; &amp; YEAR([.B577]) &amp; &quot;-&quot; &amp; MONTH([.B577]) &amp; &quot;-&quot; &amp; DAY([.B577]) &amp; &quot;', '&quot; &amp; [.C577] &amp; &quot;', '&quot; &amp; [.D577] &amp; &quot;', '&quot; &amp; [.E577] &amp; &quot;', '&quot; &amp; [.F577] &amp; &quot;'],&quot;" office:value-type="string" office:string-value="['Witch Hunt (2018 - 2020)', '2018-6-14', '7:11', 'Zach, Tomar', 'rw3Vh0laXVI', '']," calcext:value-type="string">
            <text:p>['Witch Hunt (2018 - 2020)', '2018-6-14', '7:11', 'Zach, Tomar', 'rw3Vh0laXVI', ''],</text:p>
          </table:table-cell>
        </table:table-row>
        <table:table-row table:style-name="ro1">
          <table:table-cell office:value-type="string" calcext:value-type="string">
            <text:p>Wonderful 101 Remastered</text:p>
          </table:table-cell>
          <table:table-cell office:value-type="date" office:date-value="2020-09-28" calcext:value-type="date">
            <text:p>2020-09-28</text:p>
          </table:table-cell>
          <table:table-cell office:value-type="string" calcext:value-type="string">
            <text:p>0:30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fgyraEyqRBM</text:p>
          </table:table-cell>
          <table:table-cell/>
          <table:table-cell table:formula="of:=&quot;['&quot; &amp; [.A578] &amp; &quot;', '&quot; &amp; YEAR([.B578]) &amp; &quot;-&quot; &amp; MONTH([.B578]) &amp; &quot;-&quot; &amp; DAY([.B578]) &amp; &quot;', '&quot; &amp; [.C578] &amp; &quot;', '&quot; &amp; [.D578] &amp; &quot;', '&quot; &amp; [.E578] &amp; &quot;', '&quot; &amp; [.F578] &amp; &quot;'],&quot;" office:value-type="string" office:string-value="['Wonderful 101 Remastered', '2020-9-28', '0:30', 'Lyle, Tomar', 'fgyraEyqRBM', '']," calcext:value-type="string">
            <text:p>['Wonderful 101 Remastered', '2020-9-28', '0:30', 'Lyle, Tomar', 'fgyraEyqRBM', ''],</text:p>
          </table:table-cell>
        </table:table-row>
        <table:table-row table:style-name="ro1">
          <table:table-cell office:value-type="string" calcext:value-type="string">
            <text:p>World Of Warcraft</text:p>
          </table:table-cell>
          <table:table-cell office:value-type="date" office:date-value="2024-03-22" calcext:value-type="date">
            <text:p>2024-03-22</text:p>
          </table:table-cell>
          <table:table-cell office:value-type="string" calcext:value-type="string">
            <text:p>0:33</text:p>
          </table:table-cell>
          <table:table-cell office:value-type="string" calcext:value-type="string">
            <text:p>Cory, Adam, Dave</text:p>
          </table:table-cell>
          <table:table-cell office:value-type="string" calcext:value-type="string">
            <text:p>HqPwZaAzZwM</text:p>
          </table:table-cell>
          <table:table-cell/>
          <table:table-cell table:formula="of:=&quot;['&quot; &amp; [.A579] &amp; &quot;', '&quot; &amp; YEAR([.B579]) &amp; &quot;-&quot; &amp; MONTH([.B579]) &amp; &quot;-&quot; &amp; DAY([.B579]) &amp; &quot;', '&quot; &amp; [.C579] &amp; &quot;', '&quot; &amp; [.D579] &amp; &quot;', '&quot; &amp; [.E579] &amp; &quot;', '&quot; &amp; [.F579] &amp; &quot;'],&quot;" office:value-type="string" office:string-value="['World Of Warcraft', '2024-3-22', '0:33', 'Cory, Adam, Dave', 'HqPwZaAzZwM', '']," calcext:value-type="string">
            <text:p>['World Of Warcraft', '2024-3-22', '0:33', 'Cory, Adam, Dave', 'HqPwZaAzZwM', ''],</text:p>
          </table:table-cell>
        </table:table-row>
        <table:table-row table:style-name="ro1">
          <table:table-cell office:value-type="string" calcext:value-type="string">
            <text:p>Worms Armageddon</text:p>
          </table:table-cell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4:31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-VwAMsgAUvA</text:p>
          </table:table-cell>
          <table:table-cell/>
          <table:table-cell table:formula="of:=&quot;['&quot; &amp; [.A580] &amp; &quot;', '&quot; &amp; YEAR([.B580]) &amp; &quot;-&quot; &amp; MONTH([.B580]) &amp; &quot;-&quot; &amp; DAY([.B580]) &amp; &quot;', '&quot; &amp; [.C580] &amp; &quot;', '&quot; &amp; [.D580] &amp; &quot;', '&quot; &amp; [.E580] &amp; &quot;', '&quot; &amp; [.F580] &amp; &quot;'],&quot;" office:value-type="string" office:string-value="['Worms Armageddon', '2020-5-28', '4:31', 'Zach, Lyle, Tomar', '-VwAMsgAUvA', '']," calcext:value-type="string">
            <text:p>['Worms Armageddon', '2020-5-28', '4:31', 'Zach, Lyle, Tomar', '-VwAMsgAUvA', ''],</text:p>
          </table:table-cell>
        </table:table-row>
        <table:table-row table:style-name="ro1">
          <table:table-cell office:value-type="string" calcext:value-type="string">
            <text:p>Worms Reloaded</text:p>
          </table:table-cell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3:33</text:p>
          </table:table-cell>
          <table:table-cell office:value-type="string" calcext:value-type="string">
            <text:p>Zach, Lyle, Tomar</text:p>
          </table:table-cell>
          <table:table-cell office:value-type="string" calcext:value-type="string">
            <text:p>FhrsZIcXLvw</text:p>
          </table:table-cell>
          <table:table-cell/>
          <table:table-cell table:formula="of:=&quot;['&quot; &amp; [.A581] &amp; &quot;', '&quot; &amp; YEAR([.B581]) &amp; &quot;-&quot; &amp; MONTH([.B581]) &amp; &quot;-&quot; &amp; DAY([.B581]) &amp; &quot;', '&quot; &amp; [.C581] &amp; &quot;', '&quot; &amp; [.D581] &amp; &quot;', '&quot; &amp; [.E581] &amp; &quot;', '&quot; &amp; [.F581] &amp; &quot;'],&quot;" office:value-type="string" office:string-value="['Worms Reloaded', '2020-4-23', '3:33', 'Zach, Lyle, Tomar', 'FhrsZIcXLvw', '']," calcext:value-type="string">
            <text:p>['Worms Reloaded', '2020-4-23', '3:33', 'Zach, Lyle, Tomar', 'FhrsZIcXLvw', ''],</text:p>
          </table:table-cell>
        </table:table-row>
        <table:table-row table:style-name="ro1">
          <table:table-cell office:value-type="string" calcext:value-type="string">
            <text:p>Yellow Baby, The</text:p>
          </table:table-cell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0:29</text:p>
          </table:table-cell>
          <table:table-cell office:value-type="string" calcext:value-type="string">
            <text:p>Zach, Cory</text:p>
          </table:table-cell>
          <table:table-cell office:value-type="string" calcext:value-type="string">
            <text:p>z8sJ73__pII</text:p>
          </table:table-cell>
          <table:table-cell/>
          <table:table-cell table:formula="of:=&quot;['&quot; &amp; [.A582] &amp; &quot;', '&quot; &amp; YEAR([.B582]) &amp; &quot;-&quot; &amp; MONTH([.B582]) &amp; &quot;-&quot; &amp; DAY([.B582]) &amp; &quot;', '&quot; &amp; [.C582] &amp; &quot;', '&quot; &amp; [.D582] &amp; &quot;', '&quot; &amp; [.E582] &amp; &quot;', '&quot; &amp; [.F582] &amp; &quot;'],&quot;" office:value-type="string" office:string-value="['Yellow Baby, The', '2022-10-20', '0:29', 'Zach, Cory', 'z8sJ73__pII', '']," calcext:value-type="string">
            <text:p>['Yellow Baby, The', '2022-10-20', '0:29', 'Zach, Cory', 'z8sJ73__pII', ''],</text:p>
          </table:table-cell>
        </table:table-row>
        <table:table-row table:style-name="ro1">
          <table:table-cell office:value-type="string" calcext:value-type="string">
            <text:p>YIIK - Ep1</text:p>
          </table:table-cell>
          <table:table-cell office:value-type="date" office:date-value="2021-04-02" calcext:value-type="date">
            <text:p>2021-04-02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YR7_eHJ5vME</text:p>
          </table:table-cell>
          <table:table-cell/>
          <table:table-cell table:formula="of:=&quot;['&quot; &amp; [.A583] &amp; &quot;', '&quot; &amp; YEAR([.B583]) &amp; &quot;-&quot; &amp; MONTH([.B583]) &amp; &quot;-&quot; &amp; DAY([.B583]) &amp; &quot;', '&quot; &amp; [.C583] &amp; &quot;', '&quot; &amp; [.D583] &amp; &quot;', '&quot; &amp; [.E583] &amp; &quot;', '&quot; &amp; [.F583] &amp; &quot;'],&quot;" office:value-type="string" office:string-value="['YIIK - Ep1', '2021-4-2', '12:00', 'Dingdong, Julian', 'YR7_eHJ5vME', '']," calcext:value-type="string">
            <text:p>['YIIK - Ep1', '2021-4-2', '12:00', 'Dingdong, Julian', 'YR7_eHJ5vME', ''],</text:p>
          </table:table-cell>
        </table:table-row>
        <table:table-row table:style-name="ro1">
          <table:table-cell office:value-type="string" calcext:value-type="string">
            <text:p>YIIK - Ep2</text:p>
          </table:table-cell>
          <table:table-cell office:value-type="date" office:date-value="2021-04-02" calcext:value-type="date">
            <text:p>2021-04-02</text:p>
          </table:table-cell>
          <table:table-cell office:value-type="string" calcext:value-type="string">
            <text:p>3:00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pzHt3y2Bcro</text:p>
          </table:table-cell>
          <table:table-cell/>
          <table:table-cell table:formula="of:=&quot;['&quot; &amp; [.A584] &amp; &quot;', '&quot; &amp; YEAR([.B584]) &amp; &quot;-&quot; &amp; MONTH([.B584]) &amp; &quot;-&quot; &amp; DAY([.B584]) &amp; &quot;', '&quot; &amp; [.C584] &amp; &quot;', '&quot; &amp; [.D584] &amp; &quot;', '&quot; &amp; [.E584] &amp; &quot;', '&quot; &amp; [.F584] &amp; &quot;'],&quot;" office:value-type="string" office:string-value="['YIIK - Ep2', '2021-4-2', '3:00', 'Dingdong, Julian', 'pzHt3y2Bcro', '']," calcext:value-type="string">
            <text:p>['YIIK - Ep2', '2021-4-2', '3:00', 'Dingdong, Julian', 'pzHt3y2Bcro', ''],</text:p>
          </table:table-cell>
        </table:table-row>
        <table:table-row table:style-name="ro1">
          <table:table-cell office:value-type="string" calcext:value-type="string">
            <text:p>Yo Noid 2</text:p>
          </table:table-cell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0:38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2gmj6oJmygk</text:p>
          </table:table-cell>
          <table:table-cell/>
          <table:table-cell table:formula="of:=&quot;['&quot; &amp; [.A585] &amp; &quot;', '&quot; &amp; YEAR([.B585]) &amp; &quot;-&quot; &amp; MONTH([.B585]) &amp; &quot;-&quot; &amp; DAY([.B585]) &amp; &quot;', '&quot; &amp; [.C585] &amp; &quot;', '&quot; &amp; [.D585] &amp; &quot;', '&quot; &amp; [.E585] &amp; &quot;', '&quot; &amp; [.F585] &amp; &quot;'],&quot;" office:value-type="string" office:string-value="['Yo Noid 2', '2017-8-16', '0:38', 'Dingdong, Julian', '2gmj6oJmygk', '']," calcext:value-type="string">
            <text:p>['Yo Noid 2', '2017-8-16', '0:38', 'Dingdong, Julian', '2gmj6oJmygk', ''],</text:p>
          </table:table-cell>
        </table:table-row>
        <table:table-row table:style-name="ro1">
          <table:table-cell office:value-type="string" calcext:value-type="string">
            <text:p>Yooka-Laylee</text:p>
          </table:table-cell>
          <table:table-cell office:value-type="date" office:date-value="2017-04-19" calcext:value-type="date">
            <text:p>2017-04-19</text:p>
          </table:table-cell>
          <table:table-cell office:value-type="string" calcext:value-type="string">
            <text:p>2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Bf4kH3m-sB0</text:p>
          </table:table-cell>
          <table:table-cell/>
          <table:table-cell table:formula="of:=&quot;['&quot; &amp; [.A586] &amp; &quot;', '&quot; &amp; YEAR([.B586]) &amp; &quot;-&quot; &amp; MONTH([.B586]) &amp; &quot;-&quot; &amp; DAY([.B586]) &amp; &quot;', '&quot; &amp; [.C586] &amp; &quot;', '&quot; &amp; [.D586] &amp; &quot;', '&quot; &amp; [.E586] &amp; &quot;', '&quot; &amp; [.F586] &amp; &quot;'],&quot;" office:value-type="string" office:string-value="['Yooka-Laylee', '2017-4-19', '2:12', 'Dingdong, Julian', 'Bf4kH3m-sB0', '']," calcext:value-type="string">
            <text:p>['Yooka-Laylee', '2017-4-19', '2:12', 'Dingdong, Julian', 'Bf4kH3m-sB0', ''],</text:p>
          </table:table-cell>
        </table:table-row>
        <table:table-row table:style-name="ro1">
          <table:table-cell office:value-type="string" calcext:value-type="string">
            <text:p>Yoshi Dead And Loving It!</text:p>
          </table:table-cell>
          <table:table-cell office:value-type="date" office:date-value="2016-10-24" calcext:value-type="date">
            <text:p>2016-10-24</text:p>
          </table:table-cell>
          <table:table-cell office:value-type="string" calcext:value-type="string">
            <text:p>0:11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BOak3tnFqSQ</text:p>
          </table:table-cell>
          <table:table-cell/>
          <table:table-cell table:formula="of:=&quot;['&quot; &amp; [.A587] &amp; &quot;', '&quot; &amp; YEAR([.B587]) &amp; &quot;-&quot; &amp; MONTH([.B587]) &amp; &quot;-&quot; &amp; DAY([.B587]) &amp; &quot;', '&quot; &amp; [.C587] &amp; &quot;', '&quot; &amp; [.D587] &amp; &quot;', '&quot; &amp; [.E587] &amp; &quot;', '&quot; &amp; [.F587] &amp; &quot;'],&quot;" office:value-type="string" office:string-value="['Yoshi Dead And Loving It!', '2016-10-24', '0:11', 'Dingdong, Julian', 'BOak3tnFqSQ', '']," calcext:value-type="string">
            <text:p>['Yoshi Dead And Loving It!', '2016-10-24', '0:11', 'Dingdong, Julian', 'BOak3tnFqSQ', ''],</text:p>
          </table:table-cell>
        </table:table-row>
        <table:table-row table:style-name="ro1">
          <table:table-cell office:value-type="string" calcext:value-type="string">
            <text:p>Yuppie Psycho</text:p>
          </table:table-cell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2:00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Zwx3G06bxPA</text:p>
          </table:table-cell>
          <table:table-cell/>
          <table:table-cell table:formula="of:=&quot;['&quot; &amp; [.A588] &amp; &quot;', '&quot; &amp; YEAR([.B588]) &amp; &quot;-&quot; &amp; MONTH([.B588]) &amp; &quot;-&quot; &amp; DAY([.B588]) &amp; &quot;', '&quot; &amp; [.C588] &amp; &quot;', '&quot; &amp; [.D588] &amp; &quot;', '&quot; &amp; [.E588] &amp; &quot;', '&quot; &amp; [.F588] &amp; &quot;'],&quot;" office:value-type="string" office:string-value="['Yuppie Psycho', '2022-11-5', '2:00', 'Cory, Tomar', 'Zwx3G06bxPA', '']," calcext:value-type="string">
            <text:p>['Yuppie Psycho', '2022-11-5', '2:00', 'Cory, Tomar', 'Zwx3G06bxPA', ''],</text:p>
          </table:table-cell>
        </table:table-row>
        <table:table-row table:style-name="ro1">
          <table:table-cell office:value-type="string" calcext:value-type="string">
            <text:p>Zelda - A Link To The Past - Ep 1</text:p>
          </table:table-cell>
          <table:table-cell office:value-type="date" office:date-value="2019-07-21" calcext:value-type="date">
            <text:p>2019-07-21</text:p>
          </table:table-cell>
          <table:table-cell office:value-type="string" calcext:value-type="string">
            <text:p>0:21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OCEDXBKVRLM</text:p>
          </table:table-cell>
          <table:table-cell/>
          <table:table-cell table:formula="of:=&quot;['&quot; &amp; [.A589] &amp; &quot;', '&quot; &amp; YEAR([.B589]) &amp; &quot;-&quot; &amp; MONTH([.B589]) &amp; &quot;-&quot; &amp; DAY([.B589]) &amp; &quot;', '&quot; &amp; [.C589] &amp; &quot;', '&quot; &amp; [.D589] &amp; &quot;', '&quot; &amp; [.E589] &amp; &quot;', '&quot; &amp; [.F589] &amp; &quot;'],&quot;" office:value-type="string" office:string-value="['Zelda - A Link To The Past - Ep 1', '2019-7-21', '0:21', 'Lyle, Tomar', 'OCEDXBKVRLM', '']," calcext:value-type="string">
            <text:p>['Zelda - A Link To The Past - Ep 1', '2019-7-21', '0:21', 'Lyle, Tomar', 'OCEDXBKVRLM', ''],</text:p>
          </table:table-cell>
        </table:table-row>
        <table:table-row table:style-name="ro1">
          <table:table-cell office:value-type="string" calcext:value-type="string">
            <text:p>Zelda - A Link To The Past - Ep 2</text:p>
          </table:table-cell>
          <table:table-cell office:value-type="date" office:date-value="2019-07-23" calcext:value-type="date">
            <text:p>2019-07-23</text:p>
          </table:table-cell>
          <table:table-cell office:value-type="string" calcext:value-type="string">
            <text:p>0:26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GnwysUrAfF0</text:p>
          </table:table-cell>
          <table:table-cell/>
          <table:table-cell table:formula="of:=&quot;['&quot; &amp; [.A590] &amp; &quot;', '&quot; &amp; YEAR([.B590]) &amp; &quot;-&quot; &amp; MONTH([.B590]) &amp; &quot;-&quot; &amp; DAY([.B590]) &amp; &quot;', '&quot; &amp; [.C590] &amp; &quot;', '&quot; &amp; [.D590] &amp; &quot;', '&quot; &amp; [.E590] &amp; &quot;', '&quot; &amp; [.F590] &amp; &quot;'],&quot;" office:value-type="string" office:string-value="['Zelda - A Link To The Past - Ep 2', '2019-7-23', '0:26', 'Lyle, Tomar', 'GnwysUrAfF0', '']," calcext:value-type="string">
            <text:p>['Zelda - A Link To The Past - Ep 2', '2019-7-23', '0:26', 'Lyle, Tomar', 'GnwysUrAfF0', ''],</text:p>
          </table:table-cell>
        </table:table-row>
        <table:table-row table:style-name="ro1">
          <table:table-cell office:value-type="string" calcext:value-type="string">
            <text:p>Zelda - Breath Of The Wild</text:p>
          </table:table-cell>
          <table:table-cell office:value-type="date" office:date-value="2018-09-18" calcext:value-type="date">
            <text:p>2018-09-18</text:p>
          </table:table-cell>
          <table:table-cell office:value-type="string" calcext:value-type="string">
            <text:p>0:31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QrEqp4IAey4</text:p>
          </table:table-cell>
          <table:table-cell/>
          <table:table-cell table:formula="of:=&quot;['&quot; &amp; [.A591] &amp; &quot;', '&quot; &amp; YEAR([.B591]) &amp; &quot;-&quot; &amp; MONTH([.B591]) &amp; &quot;-&quot; &amp; DAY([.B591]) &amp; &quot;', '&quot; &amp; [.C591] &amp; &quot;', '&quot; &amp; [.D591] &amp; &quot;', '&quot; &amp; [.E591] &amp; &quot;', '&quot; &amp; [.F591] &amp; &quot;'],&quot;" office:value-type="string" office:string-value="['Zelda - Breath Of The Wild', '2018-9-18', '0:31', 'Zach, Lyle', 'QrEqp4IAey4', '']," calcext:value-type="string">
            <text:p>['Zelda - Breath Of The Wild', '2018-9-18', '0:31', 'Zach, Lyle', 'QrEqp4IAey4', ''],</text:p>
          </table:table-cell>
        </table:table-row>
        <table:table-row table:style-name="ro1">
          <table:table-cell office:value-type="string" calcext:value-type="string">
            <text:p>Zelda - Link's Awakening</text:p>
          </table:table-cell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2:16</text:p>
          </table:table-cell>
          <table:table-cell office:value-type="string" calcext:value-type="string">
            <text:p>Cory, Tomar</text:p>
          </table:table-cell>
          <table:table-cell office:value-type="string" calcext:value-type="string">
            <text:p>7fmlYxqf9SE</text:p>
          </table:table-cell>
          <table:table-cell/>
          <table:table-cell table:formula="of:=&quot;['&quot; &amp; [.A592] &amp; &quot;', '&quot; &amp; YEAR([.B592]) &amp; &quot;-&quot; &amp; MONTH([.B592]) &amp; &quot;-&quot; &amp; DAY([.B592]) &amp; &quot;', '&quot; &amp; [.C592] &amp; &quot;', '&quot; &amp; [.D592] &amp; &quot;', '&quot; &amp; [.E592] &amp; &quot;', '&quot; &amp; [.F592] &amp; &quot;'],&quot;" office:value-type="string" office:string-value="['Zelda - Link's Awakening', '2022-9-24', '2:16', 'Cory, Tomar', '7fmlYxqf9SE', '']," calcext:value-type="string">
            <text:p>['Zelda - Link's Awakening', '2022-9-24', '2:16', 'Cory, Tomar', '7fmlYxqf9SE', ''],</text:p>
          </table:table-cell>
        </table:table-row>
        <table:table-row table:style-name="ro1">
          <table:table-cell office:value-type="string" calcext:value-type="string">
            <text:p>Zelda - Majora's Mask</text:p>
          </table:table-cell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1:04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e2D1D5KEDvM</text:p>
          </table:table-cell>
          <table:table-cell/>
          <table:table-cell table:formula="of:=&quot;['&quot; &amp; [.A593] &amp; &quot;', '&quot; &amp; YEAR([.B593]) &amp; &quot;-&quot; &amp; MONTH([.B593]) &amp; &quot;-&quot; &amp; DAY([.B593]) &amp; &quot;', '&quot; &amp; [.C593] &amp; &quot;', '&quot; &amp; [.D593] &amp; &quot;', '&quot; &amp; [.E593] &amp; &quot;', '&quot; &amp; [.F593] &amp; &quot;'],&quot;" office:value-type="string" office:string-value="['Zelda - Majora's Mask', '2019-11-1', '1:04', 'Cory, Dave', 'e2D1D5KEDvM', '']," calcext:value-type="string">
            <text:p>['Zelda - Majora's Mask', '2019-11-1', '1:04', 'Cory, Dave', 'e2D1D5KEDvM', ''],</text:p>
          </table:table-cell>
        </table:table-row>
        <table:table-row table:style-name="ro1">
          <table:table-cell office:value-type="string" calcext:value-type="string">
            <text:p>Zelda - Ocarina Of Time</text:p>
          </table:table-cell>
          <table:table-cell office:value-type="date" office:date-value="2018-04-29" calcext:value-type="date">
            <text:p>2018-04-29</text:p>
          </table:table-cell>
          <table:table-cell office:value-type="string" calcext:value-type="string">
            <text:p>2:12</text:p>
          </table:table-cell>
          <table:table-cell office:value-type="string" calcext:value-type="string">
            <text:p>Dingdong, Julian</text:p>
          </table:table-cell>
          <table:table-cell office:value-type="string" calcext:value-type="string">
            <text:p>H1ngFbboqKY</text:p>
          </table:table-cell>
          <table:table-cell/>
          <table:table-cell table:formula="of:=&quot;['&quot; &amp; [.A594] &amp; &quot;', '&quot; &amp; YEAR([.B594]) &amp; &quot;-&quot; &amp; MONTH([.B594]) &amp; &quot;-&quot; &amp; DAY([.B594]) &amp; &quot;', '&quot; &amp; [.C594] &amp; &quot;', '&quot; &amp; [.D594] &amp; &quot;', '&quot; &amp; [.E594] &amp; &quot;', '&quot; &amp; [.F594] &amp; &quot;'],&quot;" office:value-type="string" office:string-value="['Zelda - Ocarina Of Time', '2018-4-29', '2:12', 'Dingdong, Julian', 'H1ngFbboqKY', '']," calcext:value-type="string">
            <text:p>['Zelda - Ocarina Of Time', '2018-4-29', '2:12', 'Dingdong, Julian', 'H1ngFbboqKY', ''],</text:p>
          </table:table-cell>
        </table:table-row>
        <table:table-row table:style-name="ro1">
          <table:table-cell office:value-type="string" calcext:value-type="string">
            <text:p>Zelda - Tears Of The Kingdom</text:p>
          </table:table-cell>
          <table:table-cell office:value-type="date" office:date-value="2023-06-08" calcext:value-type="date">
            <text:p>2023-06-08</text:p>
          </table:table-cell>
          <table:table-cell office:value-type="string" calcext:value-type="string">
            <text:p>1:05</text:p>
          </table:table-cell>
          <table:table-cell office:value-type="string" calcext:value-type="string">
            <text:p>Zach, Lyle</text:p>
          </table:table-cell>
          <table:table-cell office:value-type="string" calcext:value-type="string">
            <text:p>Vpmb0oJUvf8</text:p>
          </table:table-cell>
          <table:table-cell/>
          <table:table-cell table:formula="of:=&quot;['&quot; &amp; [.A595] &amp; &quot;', '&quot; &amp; YEAR([.B595]) &amp; &quot;-&quot; &amp; MONTH([.B595]) &amp; &quot;-&quot; &amp; DAY([.B595]) &amp; &quot;', '&quot; &amp; [.C595] &amp; &quot;', '&quot; &amp; [.D595] &amp; &quot;', '&quot; &amp; [.E595] &amp; &quot;', '&quot; &amp; [.F595] &amp; &quot;'],&quot;" office:value-type="string" office:string-value="['Zelda - Tears Of The Kingdom', '2023-6-8', '1:05', 'Zach, Lyle', 'Vpmb0oJUvf8', '']," calcext:value-type="string">
            <text:p>['Zelda - Tears Of The Kingdom', '2023-6-8', '1:05', 'Zach, Lyle', 'Vpmb0oJUvf8', ''],</text:p>
          </table:table-cell>
        </table:table-row>
        <table:table-row table:style-name="ro1">
          <table:table-cell office:value-type="string" calcext:value-type="string">
            <text:p>Zelda - The Wind Waker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Cory, Dave</text:p>
          </table:table-cell>
          <table:table-cell office:value-type="string" calcext:value-type="string">
            <text:p>JB2HEsjghAU</text:p>
          </table:table-cell>
          <table:table-cell/>
          <table:table-cell table:formula="of:=&quot;['&quot; &amp; [.A596] &amp; &quot;', '&quot; &amp; YEAR([.B596]) &amp; &quot;-&quot; &amp; MONTH([.B596]) &amp; &quot;-&quot; &amp; DAY([.B596]) &amp; &quot;', '&quot; &amp; [.C596] &amp; &quot;', '&quot; &amp; [.D596] &amp; &quot;', '&quot; &amp; [.E596] &amp; &quot;', '&quot; &amp; [.F596] &amp; &quot;'],&quot;" office:value-type="string" office:string-value="['Zelda - The Wind Waker', '2019-8-18', '10:52', 'Cory, Dave', 'JB2HEsjghAU', '']," calcext:value-type="string">
            <text:p>['Zelda - The Wind Waker', '2019-8-18', '10:52', 'Cory, Dave', 'JB2HEsjghAU', ''],</text:p>
          </table:table-cell>
        </table:table-row>
        <table:table-row table:style-name="ro1">
          <table:table-cell office:value-type="string" calcext:value-type="string">
            <text:p>Zelda 2</text:p>
          </table:table-cell>
          <table:table-cell office:value-type="date" office:date-value="2019-05-18" calcext:value-type="date">
            <text:p>2019-05-18</text:p>
          </table:table-cell>
          <table:table-cell office:value-type="string" calcext:value-type="string">
            <text:p>2:00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RQm3RwWeOnA</text:p>
          </table:table-cell>
          <table:table-cell/>
          <table:table-cell table:formula="of:=&quot;['&quot; &amp; [.A597] &amp; &quot;', '&quot; &amp; YEAR([.B597]) &amp; &quot;-&quot; &amp; MONTH([.B597]) &amp; &quot;-&quot; &amp; DAY([.B597]) &amp; &quot;', '&quot; &amp; [.C597] &amp; &quot;', '&quot; &amp; [.D597] &amp; &quot;', '&quot; &amp; [.E597] &amp; &quot;', '&quot; &amp; [.F597] &amp; &quot;'],&quot;" office:value-type="string" office:string-value="['Zelda 2', '2019-5-18', '2:00', 'Mick, Tomar', 'RQm3RwWeOnA', '']," calcext:value-type="string">
            <text:p>['Zelda 2', '2019-5-18', '2:00', 'Mick, Tomar', 'RQm3RwWeOnA', ''],</text:p>
          </table:table-cell>
        </table:table-row>
        <table:table-row table:style-name="ro1">
          <table:table-cell office:value-type="string" calcext:value-type="string">
            <text:p>Zelda Rom Hack (Parallel Worlds)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0:39</text:p>
          </table:table-cell>
          <table:table-cell office:value-type="string" calcext:value-type="string">
            <text:p>Mick, Tomar</text:p>
          </table:table-cell>
          <table:table-cell office:value-type="string" calcext:value-type="string">
            <text:p>7xrYkTgOpLE</text:p>
          </table:table-cell>
          <table:table-cell/>
          <table:table-cell table:formula="of:=&quot;['&quot; &amp; [.A598] &amp; &quot;', '&quot; &amp; YEAR([.B598]) &amp; &quot;-&quot; &amp; MONTH([.B598]) &amp; &quot;-&quot; &amp; DAY([.B598]) &amp; &quot;', '&quot; &amp; [.C598] &amp; &quot;', '&quot; &amp; [.D598] &amp; &quot;', '&quot; &amp; [.E598] &amp; &quot;', '&quot; &amp; [.F598] &amp; &quot;'],&quot;" office:value-type="string" office:string-value="['Zelda Rom Hack (Parallel Worlds)', '2019-6-5', '0:39', 'Mick, Tomar', '7xrYkTgOpLE', '']," calcext:value-type="string">
            <text:p>['Zelda Rom Hack (Parallel Worlds)', '2019-6-5', '0:39', 'Mick, Tomar', '7xrYkTgOpLE', ''],</text:p>
          </table:table-cell>
        </table:table-row>
        <table:table-row table:style-name="ro1">
          <table:table-cell office:value-type="string" calcext:value-type="string">
            <text:p>Zeno Clash</text:p>
          </table:table-cell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0:33</text:p>
          </table:table-cell>
          <table:table-cell office:value-type="string" calcext:value-type="string">
            <text:p>Lyle, Tomar</text:p>
          </table:table-cell>
          <table:table-cell office:value-type="string" calcext:value-type="string">
            <text:p>1g6GWxvMv24</text:p>
          </table:table-cell>
          <table:table-cell/>
          <table:table-cell table:formula="of:=&quot;['&quot; &amp; [.A599] &amp; &quot;', '&quot; &amp; YEAR([.B599]) &amp; &quot;-&quot; &amp; MONTH([.B599]) &amp; &quot;-&quot; &amp; DAY([.B599]) &amp; &quot;', '&quot; &amp; [.C599] &amp; &quot;', '&quot; &amp; [.D599] &amp; &quot;', '&quot; &amp; [.E599] &amp; &quot;', '&quot; &amp; [.F599] &amp; &quot;'],&quot;" office:value-type="string" office:string-value="['Zeno Clash', '2020-7-24', '0:33', 'Lyle, Tomar', '1g6GWxvMv24', '']," calcext:value-type="string">
            <text:p>['Zeno Clash', '2020-7-24', '0:33', 'Lyle, Tomar', '1g6GWxvMv24', '']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Noto Sans1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/00/0000</text:date>, <text:time style:data-style-name="N2" text:time-value="23:07:31.731833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19T23:28:41.745372139</dc:date>
    <meta:editing-duration>PT22M6S</meta:editing-duration>
    <meta:editing-cycles>3</meta:editing-cycles>
    <meta:generator>LibreOffice/26.2.4.2$Linux_X86_64 LibreOffice_project/f4d82cf4d44730936b3f1a72d05a6253f577d3e9</meta:generator>
    <meta:document-statistic meta:table-count="1" meta:cell-count="3610" meta:object-count="0"/>
  </office:meta>
</office:document-meta>
</file>